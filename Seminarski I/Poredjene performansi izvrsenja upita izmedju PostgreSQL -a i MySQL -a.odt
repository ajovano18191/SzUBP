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D3000000D3BEEA7A65.png" manifest:media-type="image/png"/>
  <manifest:file-entry manifest:full-path="Pictures/10000001000000B0000000B03A3C75E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118cm" fo:margin-left="-0.078cm" fo:margin-top="0cm" fo:margin-bottom="0cm" table:align="left" style:writing-mode="lr-tb"/>
    </style:style>
    <style:style style:name="Table1.A" style:family="table-column">
      <style:table-column-properties style:column-width="8.1cm"/>
    </style:style>
    <style:style style:name="Table1.B" style:family="table-column">
      <style:table-column-properties style:column-width="8.019cm"/>
    </style:style>
    <style:style style:name="Table1.1" style:family="table-row">
      <style:table-row-properties style:min-row-height="0.72cm" fo:keep-together="auto"/>
    </style:style>
    <style:style style:name="Table1.A1" style:family="table-cell">
      <style:table-cell-properties fo:padding="0cm" fo:border="none"/>
    </style:style>
    <style:style style:name="Table2" style:family="table">
      <style:table-properties style:width="15.998cm" table:align="margins" style:writing-mode="lr-tb"/>
    </style:style>
    <style:style style:name="Table2.A" style:family="table-column">
      <style:table-column-properties style:column-width="1.612cm" style:rel-column-width="6604*"/>
    </style:style>
    <style:style style:name="Table2.B" style:family="table-column">
      <style:table-column-properties style:column-width="2.189cm" style:rel-column-width="8966*"/>
    </style:style>
    <style:style style:name="Table2.C" style:family="table-column">
      <style:table-column-properties style:column-width="5.988cm" style:rel-column-width="24530*"/>
    </style:style>
    <style:style style:name="Table2.D" style:family="table-column">
      <style:table-column-properties style:column-width="6.209cm" style:rel-column-width="25435*"/>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0.5pt solid #000000"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none" fo:border-top="none" fo:border-bottom="0.5pt solid #000000"/>
    </style:style>
    <style:style style:name="Table2.D5" style:family="table-cell">
      <style:table-cell-properties fo:padding="0.097cm" fo:border-left="0.5pt solid #000000" fo:border-right="0.5pt solid #000000" fo:border-top="none" fo:border-bottom="0.5pt solid #000000"/>
    </style:style>
    <style:style style:name="Table2.A6" style:family="table-cell">
      <style:table-cell-properties fo:padding="0.097cm" fo:border-left="0.5pt solid #000000" fo:border-right="none" fo:border-top="none" fo:border-bottom="0.5pt solid #000000"/>
    </style:style>
    <style:style style:name="Table2.B6" style:family="table-cell">
      <style:table-cell-properties fo:padding="0.097cm" fo:border-left="0.5pt solid #000000" fo:border-right="none" fo:border-top="none" fo:border-bottom="0.5pt solid #000000"/>
    </style:style>
    <style:style style:name="Table2.C6" style:family="table-cell">
      <style:table-cell-properties fo:padding="0.097cm" fo:border-left="0.5pt solid #000000" fo:border-right="none" fo:border-top="none" fo:border-bottom="0.5pt solid #000000"/>
    </style:style>
    <style:style style:name="Table2.D6" style:family="table-cell">
      <style:table-cell-properties fo:padding="0.097cm" fo:border-left="0.5pt solid #000000" fo:border-right="0.5pt solid #000000" fo:border-top="none" fo:border-bottom="0.5pt solid #000000"/>
    </style:style>
    <style:style style:name="Table2.A7" style:family="table-cell">
      <style:table-cell-properties fo:padding="0.097cm" fo:border-left="0.5pt solid #000000" fo:border-right="none" fo:border-top="none" fo:border-bottom="0.5pt solid #000000"/>
    </style:style>
    <style:style style:name="Table2.B7" style:family="table-cell">
      <style:table-cell-properties fo:padding="0.097cm" fo:border-left="0.5pt solid #000000" fo:border-right="none" fo:border-top="none" fo:border-bottom="0.5pt solid #000000"/>
    </style:style>
    <style:style style:name="Table2.C7" style:family="table-cell">
      <style:table-cell-properties fo:padding="0.097cm" fo:border-left="0.5pt solid #000000" fo:border-right="none" fo:border-top="none" fo:border-bottom="0.5pt solid #000000"/>
    </style:style>
    <style:style style:name="Table2.D7" style:family="table-cell">
      <style:table-cell-properties fo:padding="0.097cm" fo:border-left="0.5pt solid #000000" fo:border-right="0.5pt solid #000000" fo:border-top="none" fo:border-bottom="0.5pt solid #000000"/>
    </style:style>
    <style:style style:name="Table2.A8" style:family="table-cell">
      <style:table-cell-properties fo:padding="0.097cm" fo:border-left="0.5pt solid #000000" fo:border-right="none" fo:border-top="none" fo:border-bottom="0.5pt solid #000000"/>
    </style:style>
    <style:style style:name="Table2.B8" style:family="table-cell">
      <style:table-cell-properties fo:padding="0.097cm" fo:border-left="0.5pt solid #000000" fo:border-right="none" fo:border-top="none" fo:border-bottom="0.5pt solid #000000"/>
    </style:style>
    <style:style style:name="Table2.C8" style:family="table-cell">
      <style:table-cell-properties fo:padding="0.097cm" fo:border-left="0.5pt solid #000000" fo:border-right="none" fo:border-top="none" fo:border-bottom="0.5pt solid #000000"/>
    </style:style>
    <style:style style:name="Table2.D8" style:family="table-cell">
      <style:table-cell-properties fo:padding="0.097cm" fo:border-left="0.5pt solid #000000" fo:border-right="0.5pt solid #000000" fo:border-top="none" fo:border-bottom="0.5pt solid #000000"/>
    </style:style>
    <style:style style:name="Table2.A9" style:family="table-cell">
      <style:table-cell-properties fo:padding="0.097cm" fo:border-left="0.5pt solid #000000" fo:border-right="none" fo:border-top="none" fo:border-bottom="0.5pt solid #000000"/>
    </style:style>
    <style:style style:name="Table2.B9" style:family="table-cell">
      <style:table-cell-properties fo:padding="0.097cm" fo:border-left="0.5pt solid #000000" fo:border-right="none" fo:border-top="none" fo:border-bottom="0.5pt solid #000000"/>
    </style:style>
    <style:style style:name="Table2.C9" style:family="table-cell">
      <style:table-cell-properties fo:padding="0.097cm" fo:border-left="0.5pt solid #000000" fo:border-right="none" fo:border-top="none" fo:border-bottom="0.5pt solid #000000"/>
    </style:style>
    <style:style style:name="Table2.D9" style:family="table-cell">
      <style:table-cell-properties fo:padding="0.097cm" fo:border-left="0.5pt solid #000000" fo:border-right="0.5pt solid #000000" fo:border-top="none" fo:border-bottom="0.5pt solid #000000"/>
    </style:style>
    <style:style style:name="Table2.B10" style:family="table-cell">
      <style:table-cell-properties fo:padding="0.097cm" fo:border-left="0.5pt solid #000000" fo:border-right="none" fo:border-top="none" fo:border-bottom="0.5pt solid #000000"/>
    </style:style>
    <style:style style:name="Table2.C10" style:family="table-cell">
      <style:table-cell-properties fo:padding="0.097cm" fo:border-left="0.5pt solid #000000" fo:border-right="none" fo:border-top="none" fo:border-bottom="0.5pt solid #000000"/>
    </style:style>
    <style:style style:name="Table2.D10" style:family="table-cell">
      <style:table-cell-properties fo:padding="0.097cm" fo:border-left="0.5pt solid #000000" fo:border-right="0.5pt solid #000000" fo:border-top="none" fo:border-bottom="0.5pt solid #000000"/>
    </style:style>
    <style:style style:name="Table2.A11" style:family="table-cell">
      <style:table-cell-properties fo:padding="0.097cm" fo:border-left="0.5pt solid #000000" fo:border-right="none" fo:border-top="none" fo:border-bottom="0.5pt solid #000000"/>
    </style:style>
    <style:style style:name="Table2.B11" style:family="table-cell">
      <style:table-cell-properties fo:padding="0.097cm" fo:border-left="0.5pt solid #000000" fo:border-right="none" fo:border-top="none" fo:border-bottom="0.5pt solid #000000"/>
    </style:style>
    <style:style style:name="Table2.C11" style:family="table-cell">
      <style:table-cell-properties fo:padding="0.097cm" fo:border-left="0.5pt solid #000000" fo:border-right="none" fo:border-top="none" fo:border-bottom="0.5pt solid #000000"/>
    </style:style>
    <style:style style:name="Table2.D11" style:family="table-cell">
      <style:table-cell-properties fo:padding="0.097cm" fo:border-left="0.5pt solid #000000" fo:border-right="0.5pt solid #000000" fo:border-top="none" fo:border-bottom="0.5pt solid #000000"/>
    </style:style>
    <style:style style:name="Table2.A12" style:family="table-cell">
      <style:table-cell-properties fo:padding="0.097cm" fo:border-left="0.5pt solid #000000" fo:border-right="none" fo:border-top="none" fo:border-bottom="0.5pt solid #000000"/>
    </style:style>
    <style:style style:name="Table2.B12" style:family="table-cell">
      <style:table-cell-properties fo:padding="0.097cm" fo:border-left="0.5pt solid #000000" fo:border-right="none" fo:border-top="none" fo:border-bottom="0.5pt solid #000000"/>
    </style:style>
    <style:style style:name="Table2.C12" style:family="table-cell">
      <style:table-cell-properties fo:padding="0.097cm" fo:border-left="0.5pt solid #000000" fo:border-right="none" fo:border-top="none" fo:border-bottom="0.5pt solid #000000"/>
    </style:style>
    <style:style style:name="Table2.D12" style:family="table-cell">
      <style:table-cell-properties fo:padding="0.097cm" fo:border-left="0.5pt solid #000000" fo:border-right="0.5pt solid #000000" fo:border-top="none" fo:border-bottom="0.5pt solid #000000"/>
    </style:style>
    <style:style style:name="Table2.A13" style:family="table-cell">
      <style:table-cell-properties fo:padding="0.097cm" fo:border-left="0.5pt solid #000000" fo:border-right="none" fo:border-top="none" fo:border-bottom="0.5pt solid #000000"/>
    </style:style>
    <style:style style:name="Table2.B13" style:family="table-cell">
      <style:table-cell-properties fo:padding="0.097cm" fo:border-left="0.5pt solid #000000" fo:border-right="none" fo:border-top="none" fo:border-bottom="0.5pt solid #000000"/>
    </style:style>
    <style:style style:name="Table2.C13" style:family="table-cell">
      <style:table-cell-properties fo:padding="0.097cm" fo:border-left="0.5pt solid #000000" fo:border-right="none" fo:border-top="none" fo:border-bottom="0.5pt solid #000000"/>
    </style:style>
    <style:style style:name="Table2.D13" style:family="table-cell">
      <style:table-cell-properties fo:padding="0.097cm" fo:border-left="0.5pt solid #000000" fo:border-right="0.5pt solid #000000" fo:border-top="none" fo:border-bottom="0.5pt solid #000000"/>
    </style:style>
    <style:style style:name="Table2.A14" style:family="table-cell">
      <style:table-cell-properties fo:padding="0.097cm" fo:border-left="0.5pt solid #000000" fo:border-right="none" fo:border-top="none" fo:border-bottom="0.5pt solid #000000"/>
    </style:style>
    <style:style style:name="Table2.B14" style:family="table-cell">
      <style:table-cell-properties fo:padding="0.097cm" fo:border-left="0.5pt solid #000000" fo:border-right="none" fo:border-top="none" fo:border-bottom="0.5pt solid #000000"/>
    </style:style>
    <style:style style:name="Table2.C14" style:family="table-cell">
      <style:table-cell-properties fo:padding="0.097cm" fo:border-left="0.5pt solid #000000" fo:border-right="none" fo:border-top="none" fo:border-bottom="0.5pt solid #000000"/>
    </style:style>
    <style:style style:name="Table2.D14"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fo:color="#000000" loext:opacity="100%" fo:font-size="18pt" fo:language="sr" fo:country="RS" fo:font-weight="bold" officeooo:paragraph-rsid="001da82d" fo:background-color="#ffffff" style:font-name-asian="Times New Roman1" style:font-size-asian="18pt" style:font-weight-asian="bold" style:font-name-complex="Times New Roman1" style:font-size-complex="18pt" style:font-weight-complex="bold"/>
    </style:style>
    <style:style style:name="P2" style:family="paragraph" style:parent-style-name="Text_20_body">
      <style:paragraph-properties fo:text-align="center" style:justify-single-word="false"/>
      <style:text-properties fo:color="#000000" loext:opacity="100%" fo:font-size="18pt" fo:language="sr" fo:country="RS" fo:font-weight="bold" fo:background-color="#ffffff" style:font-name-asian="Times New Roman1" style:font-size-asian="18pt" style:font-weight-asian="bold" style:font-name-complex="Times New Roman1" style:font-size-complex="18pt" style:font-weight-complex="bold"/>
    </style:style>
    <style:style style:name="P3" style:family="paragraph" style:parent-style-name="Text_20_body">
      <style:paragraph-properties fo:text-align="center" style:justify-single-word="false"/>
      <style:text-properties officeooo:paragraph-rsid="00cf7fe5"/>
    </style:style>
    <style:style style:name="P4" style:family="paragraph" style:parent-style-name="Text_20_body">
      <style:paragraph-properties fo:text-align="center" style:justify-single-word="false"/>
      <style:text-properties style:use-window-font-color="true" loext:opacity="0%" fo:font-size="10pt" style:font-size-asian="10pt"/>
    </style:style>
    <style:style style:name="P5" style:family="paragraph" style:parent-style-name="Text_20_body">
      <style:text-properties style:use-window-font-color="true" loext:opacity="0%" fo:font-size="10pt" style:font-size-asian="10pt"/>
    </style:style>
    <style:style style:name="P6" style:family="paragraph" style:parent-style-name="paragraph">
      <style:paragraph-properties fo:margin-top="0cm" fo:margin-bottom="0cm" style:contextual-spacing="false" fo:text-align="center" style:justify-single-word="false" style:vertical-align="baseline"/>
    </style:style>
    <style:style style:name="P7" style:family="paragraph" style:parent-style-name="paragraph">
      <style:paragraph-properties fo:margin-top="0cm" fo:margin-bottom="0cm" style:contextual-spacing="false" fo:text-align="center" style:justify-single-word="false" style:vertical-align="baseline"/>
      <style:text-properties officeooo:paragraph-rsid="00413cb9"/>
    </style:style>
    <style:style style:name="P8" style:family="paragraph" style:parent-style-name="paragraph">
      <style:paragraph-properties fo:margin-top="0cm" fo:margin-bottom="0cm" style:contextual-spacing="false" fo:text-align="center" style:justify-single-word="false" style:vertical-align="baseline"/>
      <style:text-properties fo:font-size="14pt" style:font-size-asian="14pt" style:font-size-complex="14pt"/>
    </style:style>
    <style:style style:name="P9" style:family="paragraph" style:parent-style-name="Text_20_body">
      <style:paragraph-properties fo:margin-top="0.019cm" fo:margin-bottom="0cm" style:contextual-spacing="false"/>
      <style:text-properties style:use-window-font-color="true" loext:opacity="0%" fo:font-size="10pt" style:font-size-asian="10pt"/>
    </style:style>
    <style:style style:name="P10" style:family="paragraph" style:parent-style-name="Table_20_Paragraph">
      <style:paragraph-properties fo:margin-left="0.321cm" fo:margin-right="1.027cm" fo:line-height="0.469cm" fo:text-align="center" style:justify-single-word="false" fo:orphans="0" fo:widows="0" fo:text-indent="0cm" style:auto-text-indent="false"/>
      <style:text-properties style:use-window-font-color="true" loext:opacity="0%" fo:font-size="12pt" fo:language="sr" fo:country="RS" style:font-name-asian="Times New Roman1" style:font-size-asian="12pt" style:font-name-complex="Times New Roman1"/>
    </style:style>
    <style:style style:name="P11" style:family="paragraph" style:parent-style-name="Table_20_Paragraph">
      <style:paragraph-properties fo:margin-left="1.032cm" fo:margin-right="0.321cm" fo:line-height="0.469cm" fo:text-align="center" style:justify-single-word="false" fo:orphans="0" fo:widows="0" fo:text-indent="0cm" style:auto-text-indent="false"/>
      <style:text-properties style:use-window-font-color="true" loext:opacity="0%" fo:font-size="12pt" fo:language="sr" fo:country="RS" style:font-name-asian="Times New Roman1" style:font-size-asian="12pt" style:font-name-complex="Times New Roman1"/>
    </style:style>
    <style:style style:name="P12" style:family="paragraph" style:parent-style-name="Table_20_Paragraph">
      <style:paragraph-properties fo:margin-left="0.321cm" fo:margin-right="1.028cm" fo:margin-top="0.235cm" fo:margin-bottom="0cm" style:contextual-spacing="false" fo:text-align="center" style:justify-single-word="false" fo:orphans="0" fo:widows="0" fo:text-indent="0cm" style:auto-text-indent="false"/>
      <style:text-properties style:use-window-font-color="true" loext:opacity="0%" fo:font-size="12pt" fo:language="sr" fo:country="RS" style:font-name-asian="Times New Roman1" style:font-size-asian="12pt" style:font-name-complex="Times New Roman1"/>
    </style:style>
    <style:style style:name="P13" style:family="paragraph" style:parent-style-name="Table_20_Paragraph">
      <style:paragraph-properties fo:margin-left="0.499cm" fo:margin-right="0.3cm" fo:margin-top="0.235cm" fo:margin-bottom="0cm" style:contextual-spacing="false" fo:line-height="0.452cm" fo:text-align="center" style:justify-single-word="false" fo:orphans="0" fo:widows="0" fo:text-indent="0cm" style:auto-text-indent="false" style:writing-mode="lr-tb"/>
      <style:text-properties style:use-window-font-color="true" loext:opacity="0%" fo:font-size="12pt" fo:language="sr" fo:country="RS" style:font-name-asian="Times New Roman1" style:font-size-asian="12pt" style:font-name-complex="Times New Roman1"/>
    </style:style>
    <style:style style:name="P14" style:family="paragraph" style:parent-style-name="Text_20_body">
      <style:text-properties style:use-window-font-color="true" loext:opacity="0%" fo:font-size="10pt" style:font-size-asian="10pt" style:font-size-complex="10pt"/>
    </style:style>
    <style:style style:name="P15" style:family="paragraph" style:parent-style-name="Text_20_body">
      <style:paragraph-properties fo:margin-top="0.159cm" fo:margin-bottom="0cm" style:contextual-spacing="false" fo:text-align="center" style:justify-single-word="false"/>
      <style:text-properties style:use-window-font-color="true" loext:opacity="0%" fo:font-size="12pt" fo:language="sr" fo:country="RS" style:font-name-asian="Times New Roman1" style:font-size-asian="12pt" style:font-name-complex="Times New Roman1" style:font-size-complex="12pt"/>
    </style:style>
    <style:style style:name="P16" style:family="paragraph" style:parent-style-name="Standard" style:master-page-name="Converted1">
      <style:paragraph-properties fo:margin-left="0.4cm" fo:margin-right="0cm" fo:margin-top="0.122cm" fo:margin-bottom="0cm" style:contextual-spacing="false" fo:text-align="start" style:justify-single-word="false" fo:orphans="0" fo:widows="0" fo:text-indent="0cm" style:auto-text-indent="false" style:page-number="auto" style:writing-mode="lr-tb"/>
      <style:text-properties style:use-window-font-color="true" loext:opacity="0%"/>
    </style:style>
    <style:style style:name="P17" style:family="paragraph" style:parent-style-name="Standard">
      <style:paragraph-properties fo:margin-left="0.4cm" fo:margin-right="0cm" fo:margin-top="0.122cm" fo:margin-bottom="0cm" style:contextual-spacing="false" fo:text-align="start" style:justify-single-word="false" fo:orphans="0" fo:widows="0" fo:text-indent="0cm" style:auto-text-indent="false" style:writing-mode="lr-tb"/>
      <style:text-properties style:use-window-font-color="true" loext:opacity="0%" fo:font-size="16pt" fo:letter-spacing="0.002cm" fo:language="sr" fo:country="RS" style:font-name-asian="Times New Roman1" style:font-size-asian="16pt" style:font-name-complex="Times New Roman1" style:font-size-complex="16pt"/>
    </style:style>
    <style:style style:name="P18" style:family="paragraph" style:parent-style-name="Text_20_body">
      <style:paragraph-properties fo:margin-top="0.007cm" fo:margin-bottom="0cm" style:contextual-spacing="false"/>
      <style:text-properties style:use-window-font-color="true" loext:opacity="0%" fo:font-size="24pt" style:font-size-asian="24pt"/>
    </style:style>
    <style:style style:name="P19" style:family="paragraph" style:parent-style-name="Text_20_body">
      <style:text-properties officeooo:paragraph-rsid="00413cb9"/>
    </style:style>
    <style:style style:name="P20" style:family="paragraph" style:parent-style-name="Text_20_body">
      <style:text-properties style:use-window-font-color="true" loext:opacity="0%" fo:font-size="13pt" fo:font-weight="bold" fo:background-color="transparent" style:font-size-asian="13pt" style:font-weight-asian="bold"/>
    </style:style>
    <style:style style:name="P21" style:family="paragraph" style:parent-style-name="paragraph" style:master-page-name="">
      <loext:graphic-properties draw:fill="none"/>
      <style:paragraph-properties fo:margin-left="0cm" fo:margin-right="0cm" fo:margin-top="0cm" fo:margin-bottom="0cm" style:contextual-spacing="false" fo:text-align="justify" style:justify-single-word="false" fo:orphans="2" fo:widows="2" fo:hyphenation-ladder-count="no-limit" fo:hyphenation-keep="auto" loext:hyphenation-keep-type="column" loext:hyphenation-keep-line="false" fo:text-indent="0cm" style:auto-text-indent="false" style:page-number="auto" fo:background-color="transparent" style:punctuation-wrap="simple"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P22" style:family="paragraph" style:parent-style-name="paragraph">
      <style:paragraph-properties fo:margin-top="0cm" fo:margin-bottom="0cm" style:contextual-spacing="false" style:vertical-align="baseline"/>
    </style:style>
    <style:style style:name="P23" style:family="paragraph" style:parent-style-name="paragraph" style:master-page-name="">
      <loext:graphic-properties draw:fill="none"/>
      <style:paragraph-properties fo:margin-left="0cm" fo:margin-right="0cm" fo:margin-top="0cm" fo:margin-bottom="0cm" style:contextual-spacing="false" fo:text-align="justify" style:justify-single-word="false" fo:orphans="2" fo:widows="2" fo:hyphenation-ladder-count="no-limit" fo:hyphenation-keep="auto" loext:hyphenation-keep-type="column" loext:hyphenation-keep-line="false" fo:text-indent="0cm" style:auto-text-indent="false" style:page-number="auto" fo:background-color="transparent" style:punctuation-wrap="simple" style:vertical-align="baseline" style:writing-mode="lr-tb"/>
      <style:text-properties officeooo:paragraph-rsid="00428376" fo:hyphenate="false" fo:hyphenation-remain-char-count="2" fo:hyphenation-push-char-count="2" loext:hyphenation-no-caps="false" loext:hyphenation-no-last-word="false" loext:hyphenation-word-char-count="no-limit" loext:hyphenation-zone="no-limit"/>
    </style:style>
    <style:style style:name="P24" style:family="paragraph" style:parent-style-name="paragraph">
      <loext:graphic-properties draw:fill="none"/>
      <style:paragraph-properties fo:margin-left="0cm" fo:margin-right="0cm" fo:margin-top="0cm" fo:margin-bottom="0cm" style:contextual-spacing="false" fo:text-align="justify" style:justify-single-word="false" fo:orphans="2" fo:widows="2" fo:hyphenation-ladder-count="no-limit" fo:hyphenation-keep="auto" loext:hyphenation-keep-type="column" loext:hyphenation-keep-line="false" fo:text-indent="0cm" style:auto-text-indent="false" fo:background-color="transparent" style:punctuation-wrap="simple" style:vertical-align="baseline" style:writing-mode="lr-tb"/>
      <style:text-properties officeooo:paragraph-rsid="00be3553" fo:hyphenate="false" fo:hyphenation-remain-char-count="2" fo:hyphenation-push-char-count="2" loext:hyphenation-no-caps="false" loext:hyphenation-no-last-word="false" loext:hyphenation-word-char-count="no-limit" loext:hyphenation-zone="no-limit"/>
    </style:style>
    <style:style style:name="P25" style:family="paragraph" style:parent-style-name="Text_20_body">
      <style:text-properties style:use-window-font-color="true" loext:opacity="0%"/>
    </style:style>
    <style:style style:name="P26" style:family="paragraph" style:parent-style-name="paragraph" style:master-page-name="">
      <loext:graphic-properties draw:fill="none"/>
      <style:paragraph-properties fo:margin-left="0cm" fo:margin-right="0cm" fo:margin-top="0.494cm" fo:margin-bottom="0.494cm" style:contextual-spacing="false" fo:text-align="justify" style:justify-single-word="false" fo:orphans="2" fo:widows="2" fo:hyphenation-ladder-count="no-limit" fo:hyphenation-keep="auto" loext:hyphenation-keep-type="column" loext:hyphenation-keep-line="false" fo:text-indent="0cm" style:auto-text-indent="false" style:page-number="auto" fo:background-color="transparent" style:punctuation-wrap="simple" style:writing-mode="lr-tb"/>
      <style:text-properties officeooo:paragraph-rsid="00896c18" fo:hyphenate="false" fo:hyphenation-remain-char-count="2" fo:hyphenation-push-char-count="2" loext:hyphenation-no-caps="false" loext:hyphenation-no-last-word="false" loext:hyphenation-word-char-count="no-limit" loext:hyphenation-zone="no-limit"/>
    </style:style>
    <style:style style:name="P27" style:family="paragraph" style:parent-style-name="Text_20_body">
      <style:text-properties fo:font-size="10pt" fo:font-style="italic" style:font-size-asian="10pt" style:font-style-asian="italic"/>
    </style:style>
    <style:style style:name="P28" style:family="paragraph" style:parent-style-name="Text_20_body">
      <style:paragraph-properties fo:margin-top="0.012cm" fo:margin-bottom="0cm" style:contextual-spacing="false"/>
      <style:text-properties fo:font-size="11pt" fo:font-style="italic" style:font-size-asian="11pt" style:font-style-asian="italic"/>
    </style:style>
    <style:style style:name="P29" style:family="paragraph" style:parent-style-name="Text_20_body">
      <style:paragraph-properties fo:margin-left="0.349cm" fo:margin-right="11.088cm" fo:margin-top="0.159cm" fo:margin-bottom="0cm" style:contextual-spacing="false" fo:line-height="143%" fo:text-align="justify" style:justify-single-word="false" fo:text-indent="0cm" style:auto-text-indent="false"/>
      <style:text-properties fo:font-size="8pt" style:font-size-asian="8pt"/>
    </style:style>
    <style:style style:name="P30" style:family="paragraph" style:parent-style-name="Contents_20_Heading" style:master-page-name="Converted2">
      <style:paragraph-properties style:page-number="auto"/>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7cm" style:type="right" style:leader-style="dotted" style:leader-text="."/>
        </style:tab-stops>
      </style:paragraph-properties>
    </style:style>
    <style:style style:name="P34" style:family="paragraph" style:parent-style-name="Heading_20_1" style:master-page-name="Converted3">
      <style:paragraph-properties fo:margin-left="1.302cm" fo:margin-right="0cm" fo:text-indent="-0.954cm" style:auto-text-indent="false" style:page-number="auto"/>
      <style:text-properties fo:font-size="18pt" fo:language="sr" fo:country="RS" fo:font-weight="bold" style:font-name-asian="Times New Roman1" style:font-size-asian="18pt" style:font-weight-asian="bold" style:font-name-complex="Times New Roman1" style:font-size-complex="18pt" style:font-weight-complex="bold"/>
    </style:style>
    <style:style style:name="P35" style:family="paragraph" style:parent-style-name="paragraph">
      <style:text-properties fo:font-size="12pt" fo:language="sr" fo:country="RS" officeooo:rsid="00be3553" officeooo:paragraph-rsid="00be3553" style:font-name-asian="Times New Roman1" style:font-size-asian="12pt" style:font-name-complex="Times New Roman1" style:font-size-complex="12pt"/>
    </style:style>
    <style:style style:name="P36" style:family="paragraph" style:parent-style-name="paragraph">
      <style:text-properties fo:font-size="12pt" fo:language="sr" fo:country="RS" officeooo:rsid="00be3553" officeooo:paragraph-rsid="00be7ac5" style:font-name-asian="Times New Roman1" style:font-size-asian="12pt" style:font-name-complex="Times New Roman1" style:font-size-complex="12pt"/>
    </style:style>
    <style:style style:name="P37" style:family="paragraph" style:parent-style-name="paragraph">
      <style:text-properties fo:font-size="12pt" fo:language="sr" fo:country="RS" officeooo:rsid="00be7ac5" officeooo:paragraph-rsid="00be7ac5" style:font-name-asian="Times New Roman1" style:font-size-asian="12pt" style:font-name-complex="Times New Roman1" style:font-size-complex="12pt"/>
    </style:style>
    <style:style style:name="P38" style:family="paragraph" style:parent-style-name="paragraph" style:list-style-name="L1">
      <style:text-properties fo:font-size="12pt" fo:language="en" fo:country="US" officeooo:rsid="00c03028" officeooo:paragraph-rsid="00c03028" style:font-name-asian="Times New Roman1" style:font-size-asian="12pt" style:font-name-complex="Times New Roman1" style:font-size-complex="12pt"/>
    </style:style>
    <style:style style:name="P39" style:family="paragraph" style:parent-style-name="paragraph" style:list-style-name="L1">
      <style:text-properties fo:font-size="12pt" fo:language="sr" fo:country="RS" officeooo:rsid="00c03028" officeooo:paragraph-rsid="00c03028" style:font-name-asian="Times New Roman1" style:font-size-asian="12pt" style:font-name-complex="Times New Roman1" style:font-size-complex="12pt"/>
    </style:style>
    <style:style style:name="P40" style:family="paragraph" style:parent-style-name="Heading_20_1">
      <style:paragraph-properties fo:margin-left="1.302cm" fo:margin-right="0cm" fo:text-indent="-0.954cm" style:auto-text-indent="false" fo:break-before="page"/>
      <style:text-properties fo:language="en" fo:country="US" officeooo:rsid="00c03028" officeooo:paragraph-rsid="00c03028"/>
    </style:style>
    <style:style style:name="P41" style:family="paragraph" style:parent-style-name="paragraph">
      <style:text-properties fo:font-size="12pt" fo:language="sr" fo:country="RS" officeooo:rsid="00c03028" officeooo:paragraph-rsid="00c03028" style:font-name-asian="Times New Roman1" style:font-size-asian="12pt" style:font-name-complex="Times New Roman1" style:font-size-complex="12pt"/>
    </style:style>
    <style:style style:name="P42" style:family="paragraph" style:parent-style-name="Heading_20_2">
      <style:paragraph-properties fo:margin-left="1.302cm" fo:margin-right="0cm" fo:text-indent="-0.954cm" style:auto-text-indent="false"/>
      <style:text-properties fo:language="sr" fo:country="RS" officeooo:rsid="00c197a3" officeooo:paragraph-rsid="00c197a3"/>
    </style:style>
    <style:style style:name="P43" style:family="paragraph" style:parent-style-name="paragraph">
      <style:text-properties fo:font-size="12pt" fo:language="sr" fo:country="RS" officeooo:rsid="00c197a3" officeooo:paragraph-rsid="00c197a3" style:font-size-asian="12pt" style:font-size-complex="12pt"/>
    </style:style>
    <style:style style:name="P44" style:family="paragraph" style:parent-style-name="Heading_20_2">
      <style:paragraph-properties fo:margin-left="1.302cm" fo:margin-right="0cm" fo:text-indent="-0.954cm" style:auto-text-indent="false"/>
      <style:text-properties fo:language="sr" fo:country="RS" officeooo:rsid="00c2bfa3" officeooo:paragraph-rsid="00c2bfa3"/>
    </style:style>
    <style:style style:name="P45" style:family="paragraph" style:parent-style-name="paragraph">
      <style:text-properties fo:font-size="12pt" fo:language="sr" fo:country="RS" officeooo:rsid="00c2bfa3" officeooo:paragraph-rsid="00c2bfa3" style:font-name-asian="Times New Roman1" style:font-size-asian="12pt" style:font-name-complex="Times New Roman1" style:font-size-complex="12pt"/>
    </style:style>
    <style:style style:name="P46" style:family="paragraph" style:parent-style-name="paragraph">
      <style:text-properties officeooo:paragraph-rsid="00c2bfa3"/>
    </style:style>
    <style:style style:name="P47" style:family="paragraph" style:parent-style-name="Heading_20_2">
      <style:paragraph-properties fo:margin-left="1.302cm" fo:margin-right="0cm" fo:text-indent="-0.954cm" style:auto-text-indent="false"/>
      <style:text-properties fo:language="sr" fo:country="RS" officeooo:rsid="00c2bfa3" officeooo:paragraph-rsid="00c399fc"/>
    </style:style>
    <style:style style:name="P48" style:family="paragraph" style:parent-style-name="paragraph">
      <style:text-properties fo:font-size="12pt" fo:language="sr" fo:country="RS" officeooo:rsid="00c359c8" officeooo:paragraph-rsid="00c359c8" style:font-name-asian="Times New Roman1" style:font-size-asian="12pt" style:font-name-complex="Times New Roman1" style:font-size-complex="12pt"/>
    </style:style>
    <style:style style:name="P49" style:family="paragraph" style:parent-style-name="Heading_20_2">
      <style:paragraph-properties fo:margin-left="1.302cm" fo:margin-right="0cm" fo:text-indent="-0.954cm" style:auto-text-indent="false"/>
      <style:text-properties fo:language="sr" fo:country="RS" officeooo:rsid="00c404a4" officeooo:paragraph-rsid="00c404a4"/>
    </style:style>
    <style:style style:name="P50" style:family="paragraph" style:parent-style-name="paragraph">
      <style:text-properties fo:font-size="12pt" fo:language="sr" fo:country="RS" officeooo:rsid="00c404a4" officeooo:paragraph-rsid="00c404a4" style:font-name-asian="Times New Roman1" style:font-size-asian="12pt" style:font-name-complex="Times New Roman1" style:font-size-complex="12pt"/>
    </style:style>
    <style:style style:name="P51" style:family="paragraph" style:parent-style-name="paragraph">
      <style:text-properties officeooo:paragraph-rsid="00c404a4"/>
    </style:style>
    <style:style style:name="P52" style:family="paragraph" style:parent-style-name="paragraph">
      <style:text-properties fo:language="sr" fo:country="RS" officeooo:rsid="00c404a4" officeooo:paragraph-rsid="00c404a4"/>
    </style:style>
    <style:style style:name="P53" style:family="paragraph" style:parent-style-name="paragraph">
      <style:text-properties fo:font-size="12pt" fo:language="sr" fo:country="RS" officeooo:rsid="00c817e6" officeooo:paragraph-rsid="00c817e6" style:font-name-asian="Times New Roman1" style:font-size-asian="12pt" style:font-name-complex="Times New Roman1" style:font-size-complex="12pt"/>
    </style:style>
    <style:style style:name="P54" style:family="paragraph" style:parent-style-name="paragraph" style:list-style-name="L2">
      <style:text-properties fo:font-size="12pt" fo:language="en" fo:country="US" officeooo:rsid="00c817e6" officeooo:paragraph-rsid="00c817e6" style:font-name-asian="Times New Roman1" style:font-size-asian="12pt" style:font-name-complex="Times New Roman1" style:font-size-complex="12pt"/>
    </style:style>
    <style:style style:name="P55" style:family="paragraph" style:parent-style-name="paragraph">
      <style:text-properties fo:font-size="12pt" fo:language="sr" fo:country="RS" officeooo:rsid="00c8416f" officeooo:paragraph-rsid="00c8416f" style:font-name-asian="Times New Roman1" style:font-size-asian="12pt" style:font-name-complex="Times New Roman1" style:font-size-complex="12pt"/>
    </style:style>
    <style:style style:name="P56" style:family="paragraph" style:parent-style-name="Heading_20_2">
      <style:paragraph-properties fo:margin-left="1.302cm" fo:margin-right="0cm" fo:text-indent="-0.954cm" style:auto-text-indent="false"/>
      <style:text-properties fo:language="sr" fo:country="RS" officeooo:rsid="00c8416f" officeooo:paragraph-rsid="00c8416f"/>
    </style:style>
    <style:style style:name="P57" style:family="paragraph" style:parent-style-name="paragraph">
      <style:text-properties fo:font-size="12pt" fo:language="sr" fo:country="RS" officeooo:rsid="007e6512" officeooo:paragraph-rsid="007e6512" style:font-name-asian="Times New Roman1" style:font-size-asian="12pt" style:font-name-complex="Times New Roman1" style:font-size-complex="12pt"/>
    </style:style>
    <style:style style:name="P58" style:family="paragraph" style:parent-style-name="paragraph">
      <style:text-properties fo:font-size="12pt" fo:language="sr" fo:country="RS" officeooo:rsid="00c9ee78" officeooo:paragraph-rsid="00c9ee78" style:font-name-asian="Times New Roman1" style:font-size-asian="12pt" style:font-name-complex="Times New Roman1" style:font-size-complex="12pt"/>
    </style:style>
    <style:style style:name="P59" style:family="paragraph" style:parent-style-name="Heading_20_1">
      <style:paragraph-properties fo:margin-left="1.302cm" fo:margin-right="0cm" fo:text-indent="-0.954cm" style:auto-text-indent="false" fo:break-before="page"/>
      <style:text-properties fo:language="en" fo:country="US" officeooo:rsid="00c03028" officeooo:paragraph-rsid="00cf7fe5"/>
    </style:style>
    <style:style style:name="P60" style:family="paragraph" style:parent-style-name="paragraph">
      <style:text-properties fo:font-size="12pt" fo:language="en" fo:country="US" officeooo:rsid="00d0faf6" officeooo:paragraph-rsid="00d0faf6" style:font-name-asian="Times New Roman1" style:font-size-asian="12pt" style:font-name-complex="Times New Roman1" style:font-size-complex="12pt"/>
    </style:style>
    <style:style style:name="P61" style:family="paragraph" style:parent-style-name="Heading_20_2">
      <style:paragraph-properties fo:margin-left="1.302cm" fo:margin-right="0cm" fo:text-indent="-0.954cm" style:auto-text-indent="false"/>
      <style:text-properties fo:language="sr" fo:country="RS" officeooo:rsid="00d0faf6" officeooo:paragraph-rsid="00d0faf6"/>
    </style:style>
    <style:style style:name="P62" style:family="paragraph" style:parent-style-name="paragraph">
      <style:text-properties fo:font-size="12pt" fo:language="sr" fo:country="RS" officeooo:rsid="00d21758" officeooo:paragraph-rsid="00d21758" style:font-name-asian="Times New Roman1" style:font-size-asian="12pt" style:font-name-complex="Times New Roman1" style:font-size-complex="12pt"/>
    </style:style>
    <style:style style:name="P63" style:family="paragraph" style:parent-style-name="Heading_20_3">
      <style:paragraph-properties fo:margin-left="1.302cm" fo:margin-right="0cm" fo:text-indent="-0.954cm" style:auto-text-indent="false"/>
      <style:text-properties fo:language="sr" fo:country="RS" officeooo:rsid="00d21758" officeooo:paragraph-rsid="00d21758"/>
    </style:style>
    <style:style style:name="P64" style:family="paragraph" style:parent-style-name="paragraph">
      <style:text-properties fo:font-size="12pt" fo:language="sr" fo:country="RS" officeooo:rsid="00d2b3ac" officeooo:paragraph-rsid="00d2b3ac" style:font-name-asian="Times New Roman1" style:font-size-asian="12pt" style:font-name-complex="Times New Roman1" style:font-size-complex="12pt"/>
    </style:style>
    <style:style style:name="P65" style:family="paragraph" style:parent-style-name="Heading_20_3">
      <style:paragraph-properties fo:margin-left="1.302cm" fo:margin-right="0cm" fo:text-indent="-0.954cm" style:auto-text-indent="false"/>
      <style:text-properties fo:language="sr" fo:country="RS" officeooo:rsid="00d2b3ac" officeooo:paragraph-rsid="00d2b3ac"/>
    </style:style>
    <style:style style:name="P66" style:family="paragraph" style:parent-style-name="Heading_20_2">
      <style:paragraph-properties fo:margin-left="1.302cm" fo:margin-right="0cm" fo:text-indent="-0.954cm" style:auto-text-indent="false"/>
      <style:text-properties fo:language="sr" fo:country="RS" officeooo:rsid="00d2b3ac" officeooo:paragraph-rsid="00d2b3ac"/>
    </style:style>
    <style:style style:name="P67" style:family="paragraph" style:parent-style-name="Text_20_body" style:master-page-name="">
      <loext:graphic-properties draw:fill="none"/>
      <style:paragraph-properties fo:margin-left="0cm" fo:margin-right="0cm" fo:margin-top="0.494cm" fo:margin-bottom="0.494cm" style:contextual-spacing="false" fo:text-align="justify" style:justify-single-word="false" fo:orphans="2" fo:widows="2" fo:hyphenation-ladder-count="no-limit" fo:hyphenation-keep="auto" loext:hyphenation-keep-type="column" loext:hyphenation-keep-line="false" fo:text-indent="1.3cm" style:auto-text-indent="false" style:page-number="auto" fo:background-color="transparent" style:punctuation-wrap="simple" style:writing-mode="lr-tb">
        <style:tab-stops/>
      </style:paragraph-properties>
      <style:text-properties style:font-name="Times New Roman" fo:language="sr" fo:country="RS" officeooo:rsid="00cc5bad" fo:hyphenate="false" fo:hyphenation-remain-char-count="2" fo:hyphenation-push-char-count="2" loext:hyphenation-no-caps="false" loext:hyphenation-no-last-word="false" loext:hyphenation-word-char-count="no-limit" loext:hyphenation-zone="no-limit"/>
    </style:style>
    <style:style style:name="P68" style:family="paragraph" style:parent-style-name="Text_20_body" style:master-page-name="">
      <loext:graphic-properties draw:fill="none"/>
      <style:paragraph-properties fo:margin-left="0cm" fo:margin-right="0cm" fo:margin-top="0.494cm" fo:margin-bottom="0.494cm" style:contextual-spacing="false" fo:text-align="justify" style:justify-single-word="false" fo:orphans="2" fo:widows="2" fo:hyphenation-ladder-count="no-limit" fo:hyphenation-keep="auto" loext:hyphenation-keep-type="column" loext:hyphenation-keep-line="false" fo:text-indent="1.3cm" style:auto-text-indent="false" style:page-number="auto" fo:background-color="transparent" style:punctuation-wrap="simple" style:writing-mode="lr-tb"/>
      <style:text-properties style:font-name="Times New Roman" fo:language="sr" fo:country="RS" officeooo:rsid="00cc5bad" fo:hyphenate="false" fo:hyphenation-remain-char-count="2" fo:hyphenation-push-char-count="2" loext:hyphenation-no-caps="false" loext:hyphenation-no-last-word="false" loext:hyphenation-word-char-count="no-limit" loext:hyphenation-zone="no-limit"/>
    </style:style>
    <style:style style:name="P69" style:family="paragraph" style:parent-style-name="Text_20_body" style:list-style-name="L3">
      <style:paragraph-properties fo:margin-top="0.494cm" fo:margin-bottom="0.494cm" style:contextual-spacing="false" fo:text-align="justify" style:justify-single-word="false" fo:orphans="2" fo:widows="2"/>
      <style:text-properties style:font-name="Times New Roman" fo:language="sr" fo:country="RS" officeooo:rsid="00cc5bad"/>
    </style:style>
    <style:style style:name="P70" style:family="paragraph" style:parent-style-name="Text_20_body" style:list-style-name="L3">
      <style:paragraph-properties fo:margin-top="0.494cm" fo:margin-bottom="0.494cm" style:contextual-spacing="false" fo:text-align="justify" style:justify-single-word="false" fo:orphans="2" fo:widows="2"/>
      <style:text-properties fo:language="sr" fo:country="RS" officeooo:rsid="00cc5bad"/>
    </style:style>
    <style:style style:name="P71" style:family="paragraph" style:parent-style-name="Text_20_body" style:list-style-name="L4">
      <style:paragraph-properties fo:margin-top="0.494cm" fo:margin-bottom="0.494cm" style:contextual-spacing="false" fo:text-align="justify" style:justify-single-word="false" fo:orphans="2" fo:widows="2"/>
      <style:text-properties style:font-name="Times New Roman" fo:language="sr" fo:country="RS" officeooo:rsid="00cc5bad"/>
    </style:style>
    <style:style style:name="P72" style:family="paragraph" style:parent-style-name="Text_20_body" style:list-style-name="L4">
      <style:paragraph-properties fo:margin-top="0.494cm" fo:margin-bottom="0.494cm" style:contextual-spacing="false" fo:text-align="justify" style:justify-single-word="false" fo:orphans="2" fo:widows="2"/>
      <style:text-properties fo:language="sr" fo:country="RS" officeooo:rsid="00cc5bad"/>
    </style:style>
    <style:style style:name="P73" style:family="paragraph" style:parent-style-name="Text_20_body" style:master-page-name="">
      <loext:graphic-properties draw:fill="none"/>
      <style:paragraph-properties fo:margin-left="0cm" fo:margin-right="0cm" fo:margin-top="0.494cm" fo:margin-bottom="0.494cm" style:contextual-spacing="false" fo:text-align="justify" style:justify-single-word="false" fo:orphans="2" fo:widows="2" fo:hyphenation-ladder-count="no-limit" fo:hyphenation-keep="auto" loext:hyphenation-keep-type="column" loext:hyphenation-keep-line="false" fo:text-indent="1.3cm" style:auto-text-indent="false" style:page-number="auto" fo:background-color="transparent" style:punctuation-wrap="simple" style:writing-mode="lr-tb"/>
      <style:text-properties fo:language="sr" fo:country="RS" officeooo:rsid="00cc5bad" fo:hyphenate="false" fo:hyphenation-remain-char-count="2" fo:hyphenation-push-char-count="2" loext:hyphenation-no-caps="false" loext:hyphenation-no-last-word="false" loext:hyphenation-word-char-count="no-limit" loext:hyphenation-zone="no-limit"/>
    </style:style>
    <style:style style:name="P74" style:family="paragraph" style:parent-style-name="Heading_20_2">
      <style:paragraph-properties fo:margin-left="1.302cm" fo:margin-right="0cm" fo:text-indent="-0.954cm" style:auto-text-indent="false"/>
      <style:text-properties fo:language="sr" fo:country="RS" officeooo:rsid="00d7ca48" officeooo:paragraph-rsid="00d7ca48"/>
    </style:style>
    <style:style style:name="P75" style:family="paragraph" style:parent-style-name="Text_20_body" style:master-page-name="">
      <loext:graphic-properties draw:fill="none"/>
      <style:paragraph-properties fo:margin-left="0cm" fo:margin-right="0cm" fo:margin-top="0.494cm" fo:margin-bottom="0.494cm" style:contextual-spacing="false" fo:text-align="justify" style:justify-single-word="false" fo:orphans="2" fo:widows="2" fo:hyphenation-ladder-count="no-limit" fo:hyphenation-keep="auto" loext:hyphenation-keep-type="column" loext:hyphenation-keep-line="false" fo:text-indent="1.3cm" style:auto-text-indent="false" style:page-number="auto" fo:background-color="transparent" style:punctuation-wrap="simple" style:writing-mode="lr-tb"/>
      <style:text-properties fo:language="sr" fo:country="RS" officeooo:rsid="00d848fd" officeooo:paragraph-rsid="00d848fd" fo:hyphenate="false" fo:hyphenation-remain-char-count="2" fo:hyphenation-push-char-count="2" loext:hyphenation-no-caps="false" loext:hyphenation-no-last-word="false" loext:hyphenation-word-char-count="no-limit" loext:hyphenation-zone="no-limit"/>
    </style:style>
    <style:style style:name="P76" style:family="paragraph" style:parent-style-name="Text_20_body">
      <loext:graphic-properties draw:fill="none"/>
      <style:paragraph-properties fo:margin-left="0cm" fo:margin-right="0cm" fo:margin-top="0.494cm" fo:margin-bottom="0.494cm" style:contextual-spacing="false" fo:text-align="justify" style:justify-single-word="false" fo:orphans="2" fo:widows="2" fo:hyphenation-ladder-count="no-limit" fo:hyphenation-keep="auto" loext:hyphenation-keep-type="column" loext:hyphenation-keep-line="false" fo:text-indent="1.3cm" style:auto-text-indent="false" fo:background-color="transparent" style:punctuation-wrap="simple" style:writing-mode="lr-tb"/>
      <style:text-properties style:font-name="Times New Roman" fo:language="sr" fo:country="RS" officeooo:rsid="00d848fd" officeooo:paragraph-rsid="00d848fd" fo:hyphenate="false" fo:hyphenation-remain-char-count="2" fo:hyphenation-push-char-count="2" loext:hyphenation-no-caps="false" loext:hyphenation-no-last-word="false" loext:hyphenation-word-char-count="no-limit" loext:hyphenation-zone="no-limit"/>
    </style:style>
    <style:style style:name="P77" style:family="paragraph" style:parent-style-name="Heading_20_1" style:list-style-name="">
      <style:paragraph-properties fo:margin-left="1.302cm" fo:margin-right="0cm" fo:text-align="start" style:justify-single-word="false" fo:orphans="0" fo:widows="0" fo:hyphenation-ladder-count="no-limit" fo:hyphenation-keep="auto" loext:hyphenation-keep-type="column" loext:hyphenation-keep-line="false" fo:text-indent="-0.954cm" style:auto-text-indent="false" style:punctuation-wrap="simple"/>
      <style:text-properties fo:language="en" fo:country="US" officeooo:rsid="00cc5bad" officeooo:paragraph-rsid="00cc5bad" fo:hyphenate="false" fo:hyphenation-remain-char-count="2" fo:hyphenation-push-char-count="2" loext:hyphenation-no-caps="false" loext:hyphenation-no-last-word="false" loext:hyphenation-word-char-count="no-limit" loext:hyphenation-zone="no-limit"/>
    </style:style>
    <style:style style:name="P78" style:family="paragraph" style:parent-style-name="Heading_20_1">
      <style:paragraph-properties fo:margin-left="1.302cm" fo:margin-right="0cm" fo:text-indent="-0.954cm" style:auto-text-indent="false" fo:break-before="page"/>
      <style:text-properties fo:language="en" fo:country="US" officeooo:rsid="00cc5bad" officeooo:paragraph-rsid="00cc5bad"/>
    </style:style>
    <style:style style:name="P79" style:family="paragraph" style:parent-style-name="paragraph">
      <style:text-properties fo:font-size="12pt" fo:language="sr" fo:country="RS" officeooo:rsid="00cc5bad" officeooo:paragraph-rsid="00cc5bad" style:font-name-asian="Times New Roman1" style:font-size-asian="12pt" style:font-name-complex="Times New Roman1" style:font-size-complex="12pt"/>
    </style:style>
    <style:style style:name="P80" style:family="paragraph" style:parent-style-name="Heading_20_2">
      <style:paragraph-properties fo:margin-left="1.302cm" fo:margin-right="0cm" fo:text-indent="-0.954cm" style:auto-text-indent="false"/>
      <style:text-properties fo:language="sr" fo:country="RS" officeooo:rsid="00cd4511" officeooo:paragraph-rsid="00d87c99"/>
    </style:style>
    <style:style style:name="P81" style:family="paragraph" style:parent-style-name="paragraph">
      <style:text-properties fo:font-size="12pt" fo:language="en" fo:country="US" fo:font-style="normal" officeooo:rsid="00cc5bad" officeooo:paragraph-rsid="00cc5bad" style:font-name-asian="Times New Roman1" style:font-size-asian="12pt" style:font-style-asian="normal" style:font-name-complex="Times New Roman1" style:font-size-complex="12pt" style:font-style-complex="normal"/>
    </style:style>
    <style:style style:name="P82" style:family="paragraph" style:parent-style-name="paragraph">
      <style:text-properties fo:font-size="12pt" fo:language="sr" fo:country="RS" fo:font-style="normal" officeooo:rsid="00cce36e" officeooo:paragraph-rsid="00cce36e" style:font-name-asian="Times New Roman1" style:font-size-asian="12pt" style:font-style-asian="normal" style:font-name-complex="Times New Roman1" style:font-size-complex="12pt" style:font-style-complex="normal"/>
    </style:style>
    <style:style style:name="P83" style:family="paragraph" style:parent-style-name="paragraph">
      <style:text-properties fo:font-size="12pt" fo:language="sr" fo:country="RS" fo:font-style="normal" officeooo:rsid="00cd4511" officeooo:paragraph-rsid="00cd4511" style:font-name-asian="Times New Roman1" style:font-size-asian="12pt" style:font-style-asian="normal" style:font-name-complex="Times New Roman1" style:font-size-complex="12pt" style:font-style-complex="normal"/>
    </style:style>
    <style:style style:name="P84" style:family="paragraph" style:parent-style-name="paragraph">
      <style:text-properties officeooo:paragraph-rsid="00cd4511"/>
    </style:style>
    <style:style style:name="P85" style:family="paragraph" style:parent-style-name="Preformatted_20_Text">
      <style:paragraph-properties fo:margin-top="0.494cm" fo:margin-bottom="0.494cm" style:contextual-spacing="false" fo:text-align="start" style:justify-single-word="false" fo:orphans="2" fo:widows="2"/>
      <style:text-properties style:font-name="Times New Roman" fo:font-size="12pt" fo:language="sr" fo:country="RS" officeooo:rsid="00cd4511" officeooo:paragraph-rsid="00cd4511" style:font-name-asian="Times New Roman1" style:font-size-asian="12pt" style:font-name-complex="Times New Roman1" style:font-size-complex="12pt"/>
    </style:style>
    <style:style style:name="P86" style:family="paragraph" style:parent-style-name="Heading_20_3">
      <style:paragraph-properties fo:margin-left="1.302cm" fo:margin-right="0cm" fo:text-indent="-0.954cm" style:auto-text-indent="false"/>
      <style:text-properties fo:language="sr" fo:country="RS" officeooo:rsid="00cd4511" officeooo:paragraph-rsid="00cd4511"/>
    </style:style>
    <style:style style:name="P87" style:family="paragraph" style:parent-style-name="paragraph" style:list-style-name="L5">
      <style:text-properties fo:font-size="12pt" fo:language="en" fo:country="US" officeooo:rsid="00cdd470" officeooo:paragraph-rsid="00cdd470" style:font-name-asian="Times New Roman1" style:font-size-asian="12pt" style:font-name-complex="Times New Roman1" style:font-size-complex="12pt"/>
    </style:style>
    <style:style style:name="P88" style:family="paragraph" style:parent-style-name="paragraph" style:list-style-name="L5">
      <style:text-properties officeooo:paragraph-rsid="00da6a84"/>
    </style:style>
    <style:style style:name="P89" style:family="paragraph" style:parent-style-name="paragraph" style:list-style-name="L5">
      <style:text-properties officeooo:paragraph-rsid="00cdd470"/>
    </style:style>
    <style:style style:name="P90" style:family="paragraph" style:parent-style-name="paragraph">
      <style:text-properties fo:font-size="12pt" fo:language="sr" fo:country="RS" officeooo:rsid="00cc5bad" officeooo:paragraph-rsid="00d87c99" style:font-name-asian="Times New Roman1" style:font-size-asian="12pt" style:font-name-complex="Times New Roman1" style:font-size-complex="12pt"/>
    </style:style>
    <style:style style:name="P91" style:family="paragraph" style:parent-style-name="paragraph">
      <style:text-properties fo:font-size="12pt" fo:language="sr" fo:country="RS" fo:font-style="normal" officeooo:rsid="00cc5bad" officeooo:paragraph-rsid="00d87c99" style:font-name-asian="Times New Roman1" style:font-size-asian="12pt" style:font-style-asian="normal" style:font-name-complex="Times New Roman1" style:font-size-complex="12pt" style:font-style-complex="normal"/>
    </style:style>
    <style:style style:name="P92" style:family="paragraph" style:parent-style-name="Heading_20_1" style:list-style-name="">
      <style:paragraph-properties fo:margin-left="1.302cm" fo:margin-right="0cm" fo:text-align="start" style:justify-single-word="false" fo:orphans="0" fo:widows="0" fo:hyphenation-ladder-count="no-limit" fo:hyphenation-keep="auto" loext:hyphenation-keep-type="column" loext:hyphenation-keep-line="false" fo:text-indent="-0.954cm" style:auto-text-indent="false" style:punctuation-wrap="simple"/>
      <style:text-properties fo:language="sr" fo:country="RS" officeooo:rsid="00de2eb5" officeooo:paragraph-rsid="00de2eb5" fo:hyphenate="false" fo:hyphenation-remain-char-count="2" fo:hyphenation-push-char-count="2" loext:hyphenation-no-caps="false" loext:hyphenation-no-last-word="false" loext:hyphenation-word-char-count="no-limit" loext:hyphenation-zone="no-limit"/>
    </style:style>
    <style:style style:name="P93" style:family="paragraph" style:parent-style-name="Heading_20_1">
      <style:paragraph-properties fo:margin-left="1.302cm" fo:margin-right="0cm" fo:text-indent="-0.954cm" style:auto-text-indent="false" fo:break-before="page"/>
      <style:text-properties fo:language="sr" fo:country="RS" officeooo:rsid="00de2eb5" officeooo:paragraph-rsid="00de2eb5"/>
    </style:style>
    <style:style style:name="P94" style:family="paragraph" style:parent-style-name="paragraph">
      <style:text-properties fo:font-size="12pt" fo:language="sr" fo:country="RS" officeooo:rsid="00cc5bad" officeooo:paragraph-rsid="00de2eb5" style:font-name-asian="Times New Roman1" style:font-size-asian="12pt" style:font-name-complex="Times New Roman1" style:font-size-complex="12pt"/>
    </style:style>
    <style:style style:name="P95" style:family="paragraph" style:parent-style-name="Table_20_Contents">
      <style:text-properties fo:font-size="12pt" fo:language="sr" fo:country="RS" fo:font-weight="bold" officeooo:rsid="00de2eb5" officeooo:paragraph-rsid="00de2eb5" style:font-size-asian="12pt" style:font-weight-asian="bold" style:font-size-complex="12pt" style:font-weight-complex="bold"/>
    </style:style>
    <style:style style:name="P96" style:family="paragraph" style:parent-style-name="Table_20_Contents">
      <style:text-properties fo:font-size="12pt" fo:font-weight="bold" officeooo:rsid="00de2eb5" officeooo:paragraph-rsid="00de2eb5"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fo:font-size="12pt" fo:font-weight="bold" officeooo:rsid="00de2eb5" officeooo:paragraph-rsid="00de2eb5" style:font-size-asian="12pt" style:font-weight-asian="bold" style:font-size-complex="12pt" style:font-weight-complex="bold" style:text-rotation-angle="90" style:text-rotation-scale="line-height"/>
    </style:style>
    <style:style style:name="P98" style:family="paragraph" style:parent-style-name="Table_20_Contents">
      <style:text-properties fo:font-size="12pt" officeooo:rsid="00de2eb5" officeooo:paragraph-rsid="00de2eb5" style:font-size-asian="12pt" style:font-size-complex="12pt"/>
    </style:style>
    <style:style style:name="P99" style:family="paragraph" style:parent-style-name="Table_20_Contents">
      <style:text-properties fo:font-size="12pt" style:font-size-asian="12pt" style:font-size-complex="12pt"/>
    </style:style>
    <style:style style:name="P100" style:family="paragraph" style:parent-style-name="paragraph" style:list-style-name="L6">
      <style:text-properties fo:font-size="12pt" fo:language="sr" fo:country="RS" officeooo:rsid="00dee195" officeooo:paragraph-rsid="00e3124b" style:font-name-asian="Times New Roman1" style:font-size-asian="12pt" style:font-name-complex="Times New Roman1" style:font-size-complex="12pt"/>
    </style:style>
    <style:style style:name="P101" style:family="paragraph" style:parent-style-name="paragraph">
      <style:paragraph-properties fo:text-align="start" style:justify-single-word="false"/>
      <style:text-properties fo:font-size="12pt" fo:language="sr" fo:country="RS" officeooo:rsid="00df08cf" officeooo:paragraph-rsid="00df08cf" style:font-name-asian="Times New Roman1" style:font-size-asian="12pt" style:font-name-complex="Times New Roman1" style:font-size-complex="12pt"/>
    </style:style>
    <style:style style:name="P102" style:family="paragraph" style:parent-style-name="paragraph" style:list-style-name="L7">
      <style:paragraph-properties fo:text-align="start" style:justify-single-word="false"/>
      <style:text-properties fo:font-size="12pt" fo:language="sr" fo:country="RS" officeooo:rsid="00df08cf" officeooo:paragraph-rsid="00df08cf" style:font-name-asian="Times New Roman1" style:font-size-asian="12pt" style:font-name-complex="Times New Roman1" style:font-size-complex="12pt"/>
    </style:style>
    <style:style style:name="P103" style:family="paragraph" style:parent-style-name="paragraph" style:list-style-name="L7">
      <style:paragraph-properties fo:text-align="start" style:justify-single-word="false"/>
      <style:text-properties fo:font-size="12pt" fo:language="en" fo:country="US" officeooo:rsid="00df08cf" officeooo:paragraph-rsid="00df08cf" style:font-name-asian="Times New Roman1" style:font-size-asian="12pt" style:font-name-complex="Times New Roman1" style:font-size-complex="12pt"/>
    </style:style>
    <style:style style:name="P104" style:family="paragraph" style:parent-style-name="paragraph" style:list-style-name="L7">
      <style:paragraph-properties fo:text-align="start" style:justify-single-word="false"/>
      <style:text-properties officeooo:paragraph-rsid="00df08cf"/>
    </style:style>
    <style:style style:name="P105" style:family="paragraph" style:parent-style-name="paragraph" style:list-style-name="L7">
      <style:paragraph-properties fo:text-align="start" style:justify-single-word="false"/>
      <style:text-properties fo:font-size="12pt" fo:language="en" fo:country="US" officeooo:rsid="00df08cf" officeooo:paragraph-rsid="00e05502" style:font-name-asian="Times New Roman1" style:font-size-asian="12pt" style:font-name-complex="Times New Roman1" style:font-size-complex="12pt"/>
    </style:style>
    <style:style style:name="P106" style:family="paragraph" style:parent-style-name="paragraph" style:list-style-name="L7">
      <style:paragraph-properties fo:text-align="start" style:justify-single-word="false"/>
      <style:text-properties officeooo:paragraph-rsid="00e3124b"/>
    </style:style>
    <style:style style:name="P107" style:family="paragraph" style:parent-style-name="paragraph" style:list-style-name="L7">
      <style:paragraph-properties fo:text-align="start" style:justify-single-word="false"/>
      <style:text-properties fo:font-size="12pt" fo:language="sr" fo:country="RS" officeooo:rsid="00e05502" officeooo:paragraph-rsid="00e05502" style:font-name-asian="Times New Roman1" style:font-size-asian="12pt" style:font-name-complex="Times New Roman1" style:font-size-complex="12pt"/>
    </style:style>
    <style:style style:name="P108" style:family="paragraph" style:parent-style-name="paragraph" style:list-style-name="L7">
      <style:paragraph-properties fo:text-align="start" style:justify-single-word="false"/>
      <style:text-properties fo:language="en" fo:country="US" officeooo:rsid="00df08cf" officeooo:paragraph-rsid="00e05502"/>
    </style:style>
    <style:style style:name="P109" style:family="paragraph" style:parent-style-name="paragraph" style:list-style-name="L7">
      <style:paragraph-properties fo:text-align="start" style:justify-single-word="false"/>
      <style:text-properties fo:language="en" fo:country="US" officeooo:rsid="00e4aa07" officeooo:paragraph-rsid="00e4aa07"/>
    </style:style>
    <style:style style:name="P110" style:family="paragraph" style:parent-style-name="paragraph" style:list-style-name="L8">
      <style:paragraph-properties fo:text-align="start" style:justify-single-word="false"/>
      <style:text-properties fo:language="sr" fo:country="RS" officeooo:rsid="00e614b0" officeooo:paragraph-rsid="00f747ef"/>
    </style:style>
    <style:style style:name="P111" style:family="paragraph" style:parent-style-name="paragraph" style:list-style-name="L7">
      <style:paragraph-properties fo:text-align="start" style:justify-single-word="false"/>
      <style:text-properties fo:language="sr" fo:country="RS" officeooo:rsid="00e614b0" officeooo:paragraph-rsid="00e614b0"/>
    </style:style>
    <style:style style:name="P112" style:family="paragraph" style:parent-style-name="paragraph" style:list-style-name="L7">
      <style:paragraph-properties fo:text-align="start" style:justify-single-word="false"/>
      <style:text-properties fo:language="en" fo:country="US" officeooo:rsid="00e614b0" officeooo:paragraph-rsid="00e614b0"/>
    </style:style>
    <style:style style:name="P113" style:family="paragraph" style:parent-style-name="paragraph" style:list-style-name="L7">
      <style:paragraph-properties fo:text-align="start" style:justify-single-word="false"/>
      <style:text-properties fo:language="en" fo:country="US" officeooo:rsid="00e7a780" officeooo:paragraph-rsid="00e7a780"/>
    </style:style>
    <style:style style:name="P114" style:family="paragraph" style:parent-style-name="paragraph" style:list-style-name="L7">
      <style:paragraph-properties fo:text-align="start" style:justify-single-word="false"/>
      <style:text-properties fo:language="en" fo:country="US" officeooo:rsid="00e9f096" officeooo:paragraph-rsid="00e9f096"/>
    </style:style>
    <style:style style:name="P115" style:family="paragraph" style:parent-style-name="paragraph" style:list-style-name="L7">
      <style:paragraph-properties fo:text-align="start" style:justify-single-word="false"/>
      <style:text-properties fo:language="sr" fo:country="RS" officeooo:rsid="00ead773" officeooo:paragraph-rsid="00ead773"/>
    </style:style>
    <style:style style:name="P116" style:family="paragraph" style:parent-style-name="paragraph" style:list-style-name="L7">
      <style:paragraph-properties fo:text-align="start" style:justify-single-word="false"/>
      <style:text-properties fo:language="en" fo:country="US" officeooo:rsid="00eb6e70" officeooo:paragraph-rsid="00eb6e70"/>
    </style:style>
    <style:style style:name="P117" style:family="paragraph" style:parent-style-name="paragraph" style:list-style-name="L7">
      <style:paragraph-properties fo:text-align="start" style:justify-single-word="false"/>
      <style:text-properties fo:language="sr" fo:country="RS" officeooo:rsid="00eb6e70" officeooo:paragraph-rsid="00eb6e70"/>
    </style:style>
    <style:style style:name="P118" style:family="paragraph" style:parent-style-name="paragraph" style:list-style-name="L7">
      <style:paragraph-properties fo:text-align="start" style:justify-single-word="false"/>
      <style:text-properties fo:language="sr" fo:country="RS" officeooo:rsid="00ebd067" officeooo:paragraph-rsid="00ebd067"/>
    </style:style>
    <style:style style:name="P119" style:family="paragraph" style:parent-style-name="Heading_20_1">
      <style:paragraph-properties fo:margin-left="1.302cm" fo:margin-right="0cm" fo:text-indent="-0.954cm" style:auto-text-indent="false" fo:break-before="page"/>
      <style:text-properties fo:language="sr" fo:country="RS" officeooo:rsid="0051367e" officeooo:paragraph-rsid="0051367e"/>
    </style:style>
    <style:style style:name="P120" style:family="paragraph" style:parent-style-name="paragraph">
      <style:text-properties fo:font-size="12pt" fo:language="sr" fo:country="RS" officeooo:rsid="00f68571" officeooo:paragraph-rsid="00f68f19" style:font-name-asian="Times New Roman1" style:font-size-asian="12pt" style:font-name-complex="Times New Roman1" style:font-size-complex="12pt"/>
    </style:style>
    <style:style style:name="P121" style:family="paragraph" style:parent-style-name="paragraph">
      <style:text-properties fo:font-size="12pt" fo:language="sr" fo:country="RS" officeooo:rsid="00f68f19" officeooo:paragraph-rsid="00f747ef" style:font-name-asian="Times New Roman1" style:font-size-asian="12pt" style:font-name-complex="Times New Roman1" style:font-size-complex="12pt"/>
    </style:style>
    <style:style style:name="P122" style:family="paragraph" style:parent-style-name="paragraph">
      <style:text-properties fo:font-size="12pt" fo:language="sr" fo:country="RS" officeooo:rsid="00f8c9ba" officeooo:paragraph-rsid="00f8c9ba" style:font-name-asian="Times New Roman1" style:font-size-asian="12pt" style:font-name-complex="Times New Roman1" style:font-size-complex="12pt"/>
    </style:style>
    <style:style style:name="P123" style:family="paragraph" style:parent-style-name="Heading_20_1">
      <style:paragraph-properties fo:margin-left="1.302cm" fo:margin-right="0cm" fo:text-indent="-0.954cm" style:auto-text-indent="false" fo:break-before="page"/>
      <style:text-properties fo:language="sr" fo:country="RS"/>
    </style:style>
    <style:style style:name="P124" style:family="paragraph" style:parent-style-name="paragraph" style:list-style-name="WWNum2">
      <style:paragraph-properties fo:margin-left="1.27cm" fo:margin-right="0cm" fo:text-indent="-0.635cm" style:auto-text-indent="false"/>
      <style:text-properties fo:language="en" fo:country="US" officeooo:rsid="00d82327" officeooo:paragraph-rsid="00d82327"/>
    </style:style>
    <style:style style:name="P125" style:family="paragraph" style:parent-style-name="paragraph" style:list-style-name="WWNum2">
      <style:paragraph-properties fo:margin-left="1.27cm" fo:margin-right="0cm" fo:text-indent="-0.635cm" style:auto-text-indent="false"/>
      <style:text-properties fo:language="sr" fo:country="RS" officeooo:paragraph-rsid="00b34908"/>
    </style:style>
    <style:style style:name="P126" style:family="paragraph" style:parent-style-name="paragraph" style:list-style-name="WWNum2">
      <style:paragraph-properties fo:margin-left="1.27cm" fo:margin-right="0cm" fo:text-indent="-0.635cm" style:auto-text-indent="false"/>
      <style:text-properties fo:language="en" fo:country="US" officeooo:rsid="00d82327" officeooo:paragraph-rsid="00b34908"/>
    </style:style>
    <style:style style:name="T1" style:family="text">
      <style:text-properties style:use-window-font-color="true" loext:opacity="0%" fo:font-size="16pt" fo:font-weight="normal" officeooo:rsid="001da82d" fo:background-color="transparent" loext:char-shading-value="0" style:font-size-asian="16pt" style:font-weight-asian="normal" style:font-size-complex="16pt" style:font-weight-complex="normal"/>
    </style:style>
    <style:style style:name="T2" style:family="text">
      <style:text-properties fo:color="#000000" loext:opacity="100%" fo:font-size="18pt" fo:language="sr" fo:country="RS" fo:font-weight="bold" fo:background-color="#ffffff" loext:char-shading-value="0" style:font-name-asian="Times New Roman1" style:font-size-asian="18pt" style:font-weight-asian="bold" style:font-name-complex="Times New Roman1" style:font-size-complex="18pt" style:font-weight-complex="bold"/>
    </style:style>
    <style:style style:name="T3" style:family="text">
      <style:text-properties style:use-window-font-color="true" loext:opacity="0%" fo:font-size="18pt" fo:language="sr" fo:country="RS" fo:font-weight="bold" officeooo:rsid="00cf7fe5" fo:background-color="transparent" loext:char-shading-value="0" style:font-name-asian="Times New Roman1" style:font-size-asian="18pt" style:font-weight-asian="bold" style:font-name-complex="Times New Roman1" style:font-size-complex="18pt" style:font-weight-complex="bold"/>
    </style:style>
    <style:style style:name="T4" style:family="text">
      <style:text-properties style:use-window-font-color="true" loext:opacity="0%" fo:font-size="18pt" fo:language="en" fo:country="US" fo:font-weight="bold" officeooo:rsid="00cf7fe5" fo:background-color="transparent" loext:char-shading-value="0" style:font-name-asian="Times New Roman1" style:font-size-asian="18pt" style:font-weight-asian="bold" style:font-name-complex="Times New Roman1" style:font-size-complex="18pt" style:font-weight-complex="bold"/>
    </style:style>
    <style:style style:name="T5" style:family="text">
      <style:text-properties style:use-window-font-color="true" loext:opacity="0%" fo:font-size="14pt" fo:language="sr" fo:country="RS" officeooo:rsid="00413cb9" style:font-name-asian="Times New Roman1" style:font-size-asian="14pt" style:font-name-complex="Times New Roman1" style:font-size-complex="14pt"/>
    </style:style>
    <style:style style:name="T6" style:family="text">
      <style:text-properties style:use-window-font-color="true" loext:opacity="0%" fo:font-size="14pt" style:font-size-asian="14pt" style:font-size-complex="14pt"/>
    </style:style>
    <style:style style:name="T7" style:family="text">
      <style:text-properties style:use-window-font-color="true" loext:opacity="0%" fo:font-size="14pt" fo:language="sr" fo:country="RS" style:font-name-asian="Times New Roman1" style:font-size-asian="14pt" style:font-name-complex="Times New Roman1" style:font-size-complex="14pt"/>
    </style:style>
    <style:style style:name="T8" style:family="text">
      <style:text-properties style:use-window-font-color="true" loext:opacity="0%" fo:font-size="14pt" fo:language="sr" fo:country="RS" officeooo:rsid="00be3553" style:font-name-asian="Times New Roman1" style:font-size-asian="14pt" style:font-name-complex="Times New Roman1" style:font-size-complex="14pt"/>
    </style:style>
    <style:style style:name="T9" style:family="text">
      <style:text-properties officeooo:rsid="00413cb9"/>
    </style:style>
    <style:style style:name="T10" style:family="text">
      <style:text-properties officeooo:rsid="00be3553"/>
    </style:style>
    <style:style style:name="T11" style:family="text">
      <style:text-properties fo:font-size="16pt" fo:letter-spacing="0.002cm" fo:language="sr" fo:country="RS" style:font-name-asian="Times New Roman1" style:font-size-asian="16pt" style:font-name-complex="Times New Roman1" style:font-size-complex="16pt"/>
    </style:style>
    <style:style style:name="T12" style:family="text">
      <style:text-properties fo:font-size="16pt" fo:letter-spacing="0.002cm" style:font-size-asian="16pt" style:font-size-complex="16pt"/>
    </style:style>
    <style:style style:name="T13" style:family="text">
      <style:text-properties style:use-window-font-color="true" loext:opacity="0%" fo:font-size="12pt" fo:language="sr" fo:country="RS" fo:font-weight="bold" officeooo:rsid="00cf7fe5" fo:background-color="transparent" loext:char-shading-value="0" style:font-name-asian="Times New Roman1" style:font-size-asian="12pt" style:font-weight-asian="bold" style:font-name-complex="Times New Roman1" style:font-size-complex="12pt" style:font-weight-complex="bold"/>
    </style:style>
    <style:style style:name="T14" style:family="text">
      <style:text-properties style:use-window-font-color="true" loext:opacity="0%" fo:font-size="12pt" fo:language="en" fo:country="US" fo:font-weight="bold" officeooo:rsid="00cf7fe5" fo:background-color="transparent" loext:char-shading-value="0" style:font-name-asian="Times New Roman1" style:font-size-asian="12pt" style:font-weight-asian="bold" style:font-name-complex="Times New Roman1" style:font-size-complex="12pt" style:font-weight-complex="bold"/>
    </style:style>
    <style:style style:name="T15" style:family="text">
      <style:text-properties style:use-window-font-color="true" loext:opacity="0%" fo:font-size="14pt" fo:language="sr" fo:country="RS" fo:font-weight="bold" officeooo:rsid="0054ab56" style:font-name-asian="Times New Roman1" style:font-size-asian="14pt" style:font-weight-asian="bold" style:font-name-complex="Times New Roman1" style:font-size-complex="14pt" style:font-weight-complex="bold"/>
    </style:style>
    <style:style style:name="T16" style:family="text">
      <style:text-properties style:use-window-font-color="true" loext:opacity="0%" fo:font-size="14pt" fo:language="sr" fo:country="RS" fo:font-weight="bold" style:font-name-asian="Times New Roman1" style:font-size-asian="14pt" style:font-weight-asian="bold" style:font-name-complex="Times New Roman1" style:font-size-complex="14pt" style:font-weight-complex="bold"/>
    </style:style>
    <style:style style:name="T17" style:family="text">
      <style:text-properties style:use-window-font-color="true" loext:opacity="0%" fo:font-size="14pt" fo:language="sr" fo:country="RS" officeooo:rsid="00428376" style:font-name-asian="Times New Roman1" style:font-size-asian="14pt" style:font-name-complex="Times New Roman1" style:font-size-complex="14pt"/>
    </style:style>
    <style:style style:name="T18" style:family="text">
      <style:text-properties style:use-window-font-color="true" loext:opacity="0%" fo:language="sr" fo:country="RS" style:text-underline-style="solid" style:text-underline-width="auto" style:text-underline-color="font-color" fo:background-color="transparent" loext:char-shading-value="0"/>
    </style:style>
    <style:style style:name="T19" style:family="text">
      <style:text-properties style:use-window-font-color="true" loext:opacity="0%" fo:background-color="transparent" loext:char-shading-value="0"/>
    </style:style>
    <style:style style:name="T20" style:family="text">
      <style:text-properties style:use-window-font-color="true" loext:opacity="0%" officeooo:rsid="00eff771" fo:background-color="transparent" loext:char-shading-value="0"/>
    </style:style>
    <style:style style:name="T21" style:family="text">
      <style:text-properties style:use-window-font-color="true" loext:opacity="0%" fo:language="sr" fo:country="RS" officeooo:rsid="00eff771" fo:background-color="transparent" loext:char-shading-value="0"/>
    </style:style>
    <style:style style:name="T22" style:family="text">
      <style:text-properties style:use-window-font-color="true" loext:opacity="0%" fo:language="en" fo:country="US" officeooo:rsid="00eff771" fo:background-color="transparent" loext:char-shading-value="0"/>
    </style:style>
    <style:style style:name="T23" style:family="text">
      <style:text-properties fo:font-style="italic" style:font-style-asian="italic" style:font-style-complex="italic"/>
    </style:style>
    <style:style style:name="T24" style:family="text">
      <style:text-properties fo:language="en" fo:country="US" fo:font-style="italic" style:font-style-asian="italic" style:font-style-complex="italic"/>
    </style:style>
    <style:style style:name="T25" style:family="text">
      <style:text-properties style:rfc-language-tag="sr-Latn-RS" fo:language="sr" fo:script="Latn" fo:country="RS" fo:font-style="italic" style:font-style-asian="italic" style:font-style-complex="italic"/>
    </style:style>
    <style:style style:name="T26" style:family="text">
      <style:text-properties officeooo:rsid="00f68571"/>
    </style:style>
    <style:style style:name="T27" style:family="text">
      <style:text-properties officeooo:rsid="00be7ac5"/>
    </style:style>
    <style:style style:name="T28" style:family="text">
      <style:text-properties fo:language="en" fo:country="US"/>
    </style:style>
    <style:style style:name="T29" style:family="text">
      <style:text-properties officeooo:rsid="00c03028"/>
    </style:style>
    <style:style style:name="T30" style:family="text">
      <style:text-properties fo:language="sr" fo:country="RS"/>
    </style:style>
    <style:style style:name="T31" style:family="text">
      <style:text-properties style:font-name-asian="Times New Roman1" style:font-name-complex="Times New Roman1"/>
    </style:style>
    <style:style style:name="T32" style:family="text">
      <style:text-properties fo:font-size="12pt" fo:language="sr" fo:country="RS" officeooo:rsid="00c2bfa3" style:font-name-asian="Times New Roman1" style:font-size-asian="12pt" style:font-name-complex="Times New Roman1" style:font-size-complex="12pt"/>
    </style:style>
    <style:style style:name="T33" style:family="text">
      <style:text-properties fo:language="sr" fo:country="RS" officeooo:rsid="00c2bfa3"/>
    </style:style>
    <style:style style:name="T34" style:family="text">
      <style:text-properties officeooo:rsid="00c399fc"/>
    </style:style>
    <style:style style:name="T35" style:family="text">
      <style:text-properties fo:language="en" fo:country="US" officeooo:rsid="00c399fc"/>
    </style:style>
    <style:style style:name="T36" style:family="text">
      <style:text-properties fo:font-size="12pt" fo:language="sr" fo:country="RS" officeooo:rsid="00c404a4" style:font-name-asian="Times New Roman1" style:font-size-asian="12pt" style:font-name-complex="Times New Roman1" style:font-size-complex="12pt"/>
    </style:style>
    <style:style style:name="T37" style:family="text">
      <style:text-properties style:rfc-language-tag="sr-Latn-RS" fo:language="sr" fo:script="Latn" fo:country="RS"/>
    </style:style>
    <style:style style:name="T38" style:family="text">
      <style:text-properties fo:font-weight="bold" style:font-weight-asian="bold" style:font-weight-complex="bold"/>
    </style:style>
    <style:style style:name="T39" style:family="text">
      <style:text-properties officeooo:rsid="00c8ea57"/>
    </style:style>
    <style:style style:name="T40" style:family="text">
      <style:text-properties officeooo:rsid="00c9ee78"/>
    </style:style>
    <style:style style:name="T41" style:family="text">
      <style:text-properties officeooo:rsid="00ca4b09"/>
    </style:style>
    <style:style style:name="T42" style:family="text">
      <style:text-properties fo:language="en" fo:country="US" officeooo:rsid="00ca4b09"/>
    </style:style>
    <style:style style:name="T43" style:family="text">
      <style:text-properties officeooo:rsid="00cf7fe5"/>
    </style:style>
    <style:style style:name="T44" style:family="text">
      <style:text-properties fo:language="en" fo:country="US" officeooo:rsid="00cf7fe5"/>
    </style:style>
    <style:style style:name="T45" style:family="text">
      <style:text-properties officeooo:rsid="00d5cea9"/>
    </style:style>
    <style:style style:name="T46" style:family="text">
      <style:text-properties fo:font-weight="bold"/>
    </style:style>
    <style:style style:name="T47" style:family="text">
      <style:text-properties style:font-name="Times New Roman" fo:font-weight="bold"/>
    </style:style>
    <style:style style:name="T48" style:family="text">
      <style:text-properties style:font-name="Times New Roman"/>
    </style:style>
    <style:style style:name="T49" style:family="text">
      <style:text-properties fo:font-style="italic"/>
    </style:style>
    <style:style style:name="T50" style:family="text">
      <style:text-properties style:font-name="Times New Roman" fo:language="en" fo:country="US"/>
    </style:style>
    <style:style style:name="T51" style:family="text">
      <style:text-properties officeooo:rsid="00d87c99"/>
    </style:style>
    <style:style style:name="T52" style:family="text">
      <style:text-properties fo:language="en" fo:country="US" officeooo:rsid="00d87c99"/>
    </style:style>
    <style:style style:name="T53" style:family="text">
      <style:text-properties officeooo:rsid="00cce36e"/>
    </style:style>
    <style:style style:name="T54" style:family="text">
      <style:text-properties fo:font-style="normal" style:font-style-asian="normal" style:font-style-complex="normal"/>
    </style:style>
    <style:style style:name="T55" style:family="text">
      <style:text-properties style:rfc-language-tag="sr-Latn-RS" fo:language="sr" fo:script="Latn" fo:country="RS" fo:font-style="normal" style:font-style-asian="normal" style:font-style-complex="normal"/>
    </style:style>
    <style:style style:name="T56" style:family="text">
      <style:text-properties fo:language="en" fo:country="US" fo:font-style="normal" style:font-style-asian="normal" style:font-style-complex="normal"/>
    </style:style>
    <style:style style:name="T57" style:family="text">
      <style:text-properties fo:font-size="12pt" fo:language="sr" fo:country="RS" fo:font-style="normal" officeooo:rsid="00cd4511" style:font-name-asian="Times New Roman1" style:font-size-asian="12pt" style:font-style-asian="normal" style:font-name-complex="Times New Roman1" style:font-size-complex="12pt" style:font-style-complex="normal"/>
    </style:style>
    <style:style style:name="T58" style:family="text">
      <style:text-properties fo:font-size="12pt" fo:language="en" fo:country="US" fo:font-style="normal" officeooo:rsid="00cd4511" style:font-name-asian="Times New Roman1" style:font-size-asian="12pt" style:font-style-asian="normal" style:font-name-complex="Times New Roman1" style:font-size-complex="12pt" style:font-style-complex="normal"/>
    </style:style>
    <style:style style:name="T59" style:family="text">
      <style:text-properties fo:language="sr" fo:country="RS" officeooo:rsid="00cd4511"/>
    </style:style>
    <style:style style:name="T60" style:family="text">
      <style:text-properties fo:language="sr" fo:country="RS" officeooo:rsid="00d97c81"/>
    </style:style>
    <style:style style:name="T61" style:family="text">
      <style:text-properties officeooo:rsid="00d97c81"/>
    </style:style>
    <style:style style:name="T62" style:family="text">
      <style:text-properties fo:language="sr" fo:country="RS" officeooo:rsid="00da6a84"/>
    </style:style>
    <style:style style:name="T63" style:family="text">
      <style:text-properties officeooo:rsid="00da6a84"/>
    </style:style>
    <style:style style:name="T64" style:family="text">
      <style:text-properties fo:font-size="12pt" fo:language="en" fo:country="US" fo:font-weight="bold" officeooo:rsid="00cdd470" style:font-name-asian="Times New Roman1" style:font-size-asian="12pt" style:font-weight-asian="bold" style:font-name-complex="Times New Roman1" style:font-size-complex="12pt" style:font-weight-complex="bold"/>
    </style:style>
    <style:style style:name="T65" style:family="text">
      <style:text-properties fo:font-size="12pt" fo:language="en" fo:country="US" officeooo:rsid="00cdd470" style:font-name-asian="Times New Roman1" style:font-size-asian="12pt" style:font-name-complex="Times New Roman1" style:font-size-complex="12pt"/>
    </style:style>
    <style:style style:name="T66" style:family="text">
      <style:text-properties fo:font-size="12pt" fo:language="sr" fo:country="RS" officeooo:rsid="00da6a84" style:font-name-asian="Times New Roman1" style:font-size-asian="12pt" style:font-name-complex="Times New Roman1" style:font-size-complex="12pt"/>
    </style:style>
    <style:style style:name="T67" style:family="text">
      <style:text-properties fo:font-size="12pt" fo:language="en" fo:country="US" officeooo:rsid="00da6a84" style:font-name-asian="Times New Roman1" style:font-size-asian="12pt" style:font-name-complex="Times New Roman1" style:font-size-complex="12pt"/>
    </style:style>
    <style:style style:name="T68" style:family="text">
      <style:text-properties fo:font-size="12pt" fo:language="en" fo:country="US" officeooo:rsid="00daac0a" style:font-name-asian="Times New Roman1" style:font-size-asian="12pt" style:font-name-complex="Times New Roman1" style:font-size-complex="12pt"/>
    </style:style>
    <style:style style:name="T69" style:family="text">
      <style:text-properties fo:language="sr" fo:country="RS" officeooo:rsid="00daac0a"/>
    </style:style>
    <style:style style:name="T70" style:family="text">
      <style:text-properties fo:font-size="12pt" fo:language="sr" fo:country="RS" officeooo:rsid="00cdd470" style:font-name-asian="Times New Roman1" style:font-size-asian="12pt" style:font-name-complex="Times New Roman1" style:font-size-complex="12pt"/>
    </style:style>
    <style:style style:name="T71" style:family="text">
      <style:text-properties fo:font-size="12pt" fo:language="sr" fo:country="RS" officeooo:rsid="00daac0a" style:font-name-asian="Times New Roman1" style:font-size-asian="12pt" style:font-name-complex="Times New Roman1" style:font-size-complex="12pt"/>
    </style:style>
    <style:style style:name="T72" style:family="text">
      <style:text-properties fo:font-size="12pt" fo:language="en" fo:country="US" fo:font-style="italic" officeooo:rsid="00cdd470" style:font-name-asian="Times New Roman1" style:font-size-asian="12pt" style:font-style-asian="italic" style:font-name-complex="Times New Roman1" style:font-size-complex="12pt" style:font-style-complex="italic"/>
    </style:style>
    <style:style style:name="T73" style:family="text">
      <style:text-properties officeooo:rsid="00de2eb5"/>
    </style:style>
    <style:style style:name="T74" style:family="text">
      <style:text-properties fo:language="en" fo:country="US" officeooo:rsid="00de2eb5"/>
    </style:style>
    <style:style style:name="T75" style:family="text">
      <style:text-properties officeooo:rsid="00e3124b"/>
    </style:style>
    <style:style style:name="T76" style:family="text">
      <style:text-properties fo:language="sr" fo:country="RS" officeooo:rsid="00e3124b"/>
    </style:style>
    <style:style style:name="T77" style:family="text">
      <style:text-properties fo:language="sr" fo:country="RS" officeooo:rsid="00e05502"/>
    </style:style>
    <style:style style:name="T78" style:family="text">
      <style:text-properties fo:font-size="12pt" fo:language="en" fo:country="US" officeooo:rsid="00df08cf" style:font-name-asian="Times New Roman1" style:font-size-asian="12pt" style:font-name-complex="Times New Roman1" style:font-size-complex="12pt"/>
    </style:style>
    <style:style style:name="T79" style:family="text">
      <style:text-properties fo:font-size="12pt" fo:language="sr" fo:country="RS" officeooo:rsid="00e05502" style:font-name-asian="Times New Roman1" style:font-size-asian="12pt" style:font-name-complex="Times New Roman1" style:font-size-complex="12pt"/>
    </style:style>
    <style:style style:name="T80" style:family="text">
      <style:text-properties fo:font-size="12pt" fo:language="en" fo:country="US" officeooo:rsid="00e3124b" style:font-name-asian="Times New Roman1" style:font-size-asian="12pt" style:font-name-complex="Times New Roman1" style:font-size-complex="12pt"/>
    </style:style>
    <style:style style:name="T81" style:family="text">
      <style:text-properties fo:font-size="12pt" fo:language="sr" fo:country="RS" officeooo:rsid="00e3124b" style:font-name-asian="Times New Roman1" style:font-size-asian="12pt" style:font-name-complex="Times New Roman1" style:font-size-complex="12pt"/>
    </style:style>
    <style:style style:name="T82" style:family="text">
      <style:text-properties fo:font-size="12pt" style:rfc-language-tag="sr-Latn-RS" fo:language="sr" fo:script="Latn" fo:country="RS" officeooo:rsid="00e3124b" style:font-name-asian="Times New Roman1" style:font-size-asian="12pt" style:font-name-complex="Times New Roman1" style:font-size-complex="12pt"/>
    </style:style>
    <style:style style:name="T83" style:family="text">
      <style:text-properties fo:language="en" fo:country="US" officeooo:rsid="00e7a780"/>
    </style:style>
    <style:style style:name="T84" style:family="text">
      <style:text-properties officeooo:rsid="00e9f096"/>
    </style:style>
    <style:style style:name="T85" style:family="text">
      <style:text-properties fo:language="en" fo:country="US" officeooo:rsid="00ebd067"/>
    </style:style>
    <style:style style:name="T86" style:family="text">
      <style:text-properties officeooo:rsid="00ebd067"/>
    </style:style>
    <style:style style:name="T87" style:family="text">
      <style:text-properties fo:language="sr" fo:country="RS" officeooo:rsid="00ebd067"/>
    </style:style>
    <style:style style:name="T88" style:family="text">
      <style:text-properties officeooo:rsid="00f82d6a"/>
    </style:style>
    <style:style style:name="T89" style:family="text">
      <style:text-properties fo:language="en" fo:country="US" officeooo:rsid="00f82d6a"/>
    </style:style>
    <style:style style:name="T90" style:family="text">
      <style:text-properties officeooo:rsid="00f68f19"/>
    </style:style>
    <style:style style:name="T91" style:family="text">
      <style:text-properties fo:language="en" fo:country="US" officeooo:rsid="00f68f19"/>
    </style:style>
    <style:style style:name="T92" style:family="text">
      <style:text-properties officeooo:rsid="00f747ef"/>
    </style:style>
    <style:style style:name="T93" style:family="text">
      <style:text-properties fo:language="en" fo:country="US" officeooo:rsid="00f747ef"/>
    </style:style>
    <style:style style:name="T94" style:family="text">
      <style:text-properties officeooo:rsid="00e614b0"/>
    </style:style>
    <style:style style:name="T95" style:family="text">
      <style:text-properties fo:language="en" fo:country="US" officeooo:rsid="00e614b0"/>
    </style:style>
    <style:style style:name="T96" style:family="text">
      <style:text-properties officeooo:rsid="00eb6e70"/>
    </style:style>
    <style:style style:name="T97" style:family="text">
      <style:text-properties fo:language="en" fo:country="US" officeooo:rsid="00d82327"/>
    </style:style>
    <style:style style:name="fr1" style:family="graphic" style:parent-style-name="Graphics">
      <style:graphic-properties fo:margin-left="0cm" fo:margin-right="0cm" fo:margin-top="0cm" fo:margin-bottom="0cm" style:vertical-pos="top" style:vertical-rel="paragraph" style:horizontal-pos="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paragraph" style:horizontal-pos="righ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Слика"/>
      </text:sequence-decls>
      <text:p text:style-name="P1"><draw:frame draw:style-name="fr1" draw:name="image1.png" text:anchor-type="paragraph" svg:width="2.401cm" svg:height="2.401cm" draw:z-index="0"><draw:image xlink:href="Pictures/10000001000000D3000000D3BEEA7A65.png" xlink:type="simple" xlink:show="embed" xlink:actuate="onLoad" draw:mime-type="image/png"/></draw:frame><draw:frame draw:style-name="fr2" draw:name="image2.png" text:anchor-type="paragraph" svg:width="2.327cm" svg:height="2.328cm" draw:z-index="1"><draw:image xlink:href="Pictures/10000001000000B0000000B03A3C75ED.png" xlink:type="simple" xlink:show="embed" xlink:actuate="onLoad" draw:mime-type="image/png"/></draw:frame><text:span text:style-name="normaltextrun"><text:span text:style-name="T1">УНИВЕРЗИТЕТ У НИШУ</text:span></text:span></text:p>
      <text:p text:style-name="P1"><text:span text:style-name="normaltextrun"><text:span text:style-name="T1">ЕЛЕКТРОНСКИ ФАКУЛТЕТ</text:span></text:span></text:p>
      <text:p text:style-name="P2"><text:span text:style-name="normaltextrun"><text:span text:style-name="T2"/></text:span></text:p>
      <text:p text:style-name="P2"><text:span text:style-name="normaltextrun"><text:span text:style-name="T2"/></text:span></text:p>
      <text:p text:style-name="P2"><text:span text:style-name="normaltextrun"><text:span text:style-name="T2"/></text:span></text:p>
      <text:p text:style-name="P2"><text:span text:style-name="normaltextrun"><text:span text:style-name="T2"/></text:span></text:p>
      <text:p text:style-name="P2"><text:span text:style-name="normaltextrun"><text:span text:style-name="T2"/></text:span></text:p>
      <text:p text:style-name="P2"><text:span text:style-name="normaltextrun"><text:span text:style-name="T2"/></text:span></text:p>
      <text:p text:style-name="P2"><text:span text:style-name="normaltextrun"><text:span text:style-name="T2"/></text:span></text:p>
      <text:p text:style-name="P2"><text:span text:style-name="normaltextrun"><text:span text:style-name="T2"/></text:span></text:p>
      <text:p text:style-name="P3"><text:span text:style-name="normaltextrun"><text:span text:style-name="T3">Поређење перформанси извршења упита између </text:span></text:span><text:span text:style-name="normaltextrun"><text:span text:style-name="T4">PostgreSQL </text:span></text:span><text:span text:style-name="normaltextrun"><text:span text:style-name="T3">и </text:span></text:span><text:span text:style-name="normaltextrun"><text:span text:style-name="T4">MySQL</text:span></text:span></text:p>
      <text:p text:style-name="P4"/>
      <text:p text:style-name="P5"/>
      <text:p text:style-name="P6"><text:span text:style-name="normaltextrun"><text:span text:style-name="T5">Семинарски рад</text:span></text:span><text:span text:style-name="eop"><text:span text:style-name="T6"> </text:span></text:span></text:p>
      <text:p text:style-name="P6"><text:span text:style-name="normaltextrun"><text:span text:style-name="T7">Студијиски програм: </text:span></text:span><text:span text:style-name="normaltextrun"><text:span text:style-name="T5">Рачунарство и информатика</text:span></text:span></text:p>
      <text:p text:style-name="P7"><text:span text:style-name="normaltextrun"><text:span text:style-name="T7">Модул: </text:span></text:span><text:span text:style-name="normaltextrun"><text:span text:style-name="T5">Софтверско инжењерство</text:span></text:span></text:p>
      <text:p text:style-name="P7"><text:span text:style-name="normaltextrun"><text:span text:style-name="T5">Предмет: </text:span></text:span><text:span text:style-name="eop"><text:span text:style-name="T8">Системи за управљање базама података</text:span></text:span></text:p>
      <text:p text:style-name="P8"><text:span text:style-name="eop"><text:span text:style-name="T6"/></text:span></text:p>
      <text:p text:style-name="P8"><text:span text:style-name="eop"><text:span text:style-name="T6"/></text:span></text:p>
      <text:p text:style-name="P8"><text:span text:style-name="eop"><text:span text:style-name="T6"/></text:span></text:p>
      <text:p text:style-name="P8"><text:span text:style-name="eop"><text:span text:style-name="T6"/></text:span></text:p>
      <text:p text:style-name="P8"><text:span text:style-name="eop"><text:span text:style-name="T6"/></text:span></text:p>
      <text:p text:style-name="P8"><text:span text:style-name="eop"><text:span text:style-name="T6"/></text:span></text:p>
      <text:p text:style-name="P8"><text:span text:style-name="eop"><text:span text:style-name="T6"/></text:span></text:p>
      <text:p text:style-name="P8"><text:span text:style-name="eop"><text:span text:style-name="T6"/></text:span></text:p>
      <text:p text:style-name="P8"><text:span text:style-name="eop"><text:span text:style-name="T6"/></text:span></text:p>
      <text:p text:style-name="P8"><text:span text:style-name="eop"><text:span text:style-name="T6"/></text:span></text:p>
      <text:p text:style-name="P8"><text:span text:style-name="eop"><text:span text:style-name="T6"/></text:span></text:p>
      <text:p text:style-name="P8"><text:span text:style-name="eop"><text:span text:style-name="T6"/></text:span></text:p>
      <text:p text:style-name="P9"/>
      <table:table table:name="Table1" table:style-name="Table1">
        <table:table-column table:style-name="Table1.A"/>
        <table:table-column table:style-name="Table1.B"/>
        <table:table-row table:style-name="Table1.1">
          <table:table-cell table:style-name="Table1.A1" office:value-type="string">
            <text:p text:style-name="P10">Студент:</text:p>
          </table:table-cell>
          <table:table-cell table:style-name="Table1.A1" office:value-type="string">
            <text:p text:style-name="P11">Ментор:</text:p>
          </table:table-cell>
        </table:table-row>
        <table:table-row table:style-name="Table1.1">
          <table:table-cell table:style-name="Table1.A1" office:value-type="string">
            <text:p text:style-name="P12">Алекса Јовановић <text:span text:style-name="T9">2090</text:span></text:p>
          </table:table-cell>
          <table:table-cell table:style-name="Table1.A1" office:value-type="string">
            <text:p text:style-name="P13"><text:span text:style-name="T10">проф. др</text:span> <text:span text:style-name="T10">Александар Станимировић</text:span></text:p>
          </table:table-cell>
        </table:table-row>
      </table:table>
      <text:p text:style-name="P5"/>
      <text:p text:style-name="P5"/>
      <text:p text:style-name="P14"/>
      <text:p text:style-name="P5"/>
      <text:p text:style-name="P15">Ниш, <text:span text:style-name="T10">мај</text:span> 202<text:span text:style-name="T9">6</text:span>. година</text:p>
      <text:p text:style-name="P16"><text:span text:style-name="T11">Универзитет у Нишу</text:span><text:span text:style-name="T12"> </text:span></text:p>
      <text:p text:style-name="P17">Електронски факултет</text:p>
      <text:p text:style-name="P18"/>
      <text:p text:style-name="P19"><text:span text:style-name="normaltextrun"><text:span text:style-name="T13">Поређење перформанси извршења упита између </text:span></text:span><text:span text:style-name="normaltextrun"><text:span text:style-name="T14">PostgreSQL </text:span></text:span><text:span text:style-name="normaltextrun"><text:span text:style-name="T13">и </text:span></text:span><text:span text:style-name="normaltextrun"><text:span text:style-name="T14">MySQL</text:span></text:span></text:p>
      <text:p text:style-name="P20"/>
      <text:p text:style-name="P21"><text:span text:style-name="eop"><text:span text:style-name="T15">Семинарски</text:span></text:span><text:span text:style-name="eop"><text:span text:style-name="T16"> рад</text:span></text:span><text:span text:style-name="eop"><text:span text:style-name="T6"> </text:span></text:span></text:p>
      <text:p text:style-name="P22"><text:span text:style-name="eop"><text:span text:style-name="T6"> </text:span></text:span></text:p>
      <text:p text:style-name="P21"><text:span text:style-name="normaltextrun"><text:span text:style-name="T7">Студијиски програм: Електротехника и рачунарство</text:span></text:span><text:span text:style-name="eop"><text:span text:style-name="T6"> </text:span></text:span></text:p>
      <text:p text:style-name="P23"><text:span text:style-name="normaltextrun"><text:span text:style-name="T7">Модул: Рачунарство и информатика</text:span></text:span></text:p>
      <text:p text:style-name="P24"><text:span text:style-name="normaltextrun"><text:span text:style-name="T17">Предмет: </text:span></text:span><text:span text:style-name="eop"><text:span text:style-name="T8">Системи за управљање базама података</text:span></text:span></text:p>
      <text:p text:style-name="P25"/>
      <text:p text:style-name="P21"><text:span text:style-name="normaltextrun"><text:span text:style-name="T7">Студент: Алекса Јовановић, бр. инд. </text:span></text:span><text:span text:style-name="normaltextrun"><text:span text:style-name="T17">2090</text:span></text:span><text:span text:style-name="eop"><text:span text:style-name="T6"> </text:span></text:span></text:p>
      <text:p text:style-name="P21"><text:span text:style-name="normaltextrun"><text:span text:style-name="T7">Ментор: </text:span></text:span><text:span text:style-name="normaltextrun"><text:span text:style-name="T8">проф. др</text:span></text:span><text:span text:style-name="normaltextrun"><text:span text:style-name="T7"> </text:span></text:span><text:span text:style-name="eop"><text:span text:style-name="T8">Александар Станимировић</text:span></text:span></text:p>
      <text:p text:style-name="Text_20_body"/>
      <text:p text:style-name="P26"><text:span text:style-name="normaltextrun"><text:span text:style-name="T18">Задатак</text:span></text:span><text:span text:style-name="normaltextrun"><text:span text:style-name="T19">: </text:span></text:span><text:span text:style-name="normaltextrun"><text:span text:style-name="T20">У</text:span></text:span><text:span text:style-name="normaltextrun"><text:span text:style-name="T21">поредити времена извршења упита између </text:span></text:span><text:span text:style-name="normaltextrun"><text:span text:style-name="T22">MySQL</text:span></text:span><text:span text:style-name="normaltextrun"><text:span text:style-name="T21"> и </text:span></text:span><text:span text:style-name="normaltextrun"><text:span text:style-name="T22">PostgreSQL</text:span></text:span><text:span text:style-name="normaltextrun"><text:span text:style-name="T21"> система за управљање базама података користећи команду </text:span></text:span><text:span text:style-name="normaltextrun"><text:span text:style-name="T22">EXPLAIN</text:span></text:span><text:span text:style-name="normaltextrun"><text:span text:style-name="T21"> и </text:span></text:span><text:span text:style-name="normaltextrun"><text:span text:style-name="T22">EXPLAIN ANALYZE</text:span></text:span><text:span text:style-name="normaltextrun"><text:span text:style-name="T19">.</text:span></text:span></text:p>
      <text:p text:style-name="P27"/>
      <text:p text:style-name="P27"/>
      <text:p text:style-name="P27"/>
      <text:p text:style-name="P27"/>
      <text:p text:style-name="P28"/>
      <text:p text:style-name="P29"/>
      <text:table-of-content text:style-name="Sect1" text:protected="true" text:name="Table of Contents1">
        <text:table-of-content-source text:outline-level="3" text:use-index-marks="false">
          <text:index-title-template text:style-name="Contents_20_Heading">САДРЖАЈ</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rotected="true">
            <text:p text:style-name="P30">САДРЖАЈ</text:p>
          </text:index-title>
          <text:p text:style-name="P31"><text:a xlink:type="simple" xlink:href="#__RefHeading___Toc12646_3546172039" office:name="Увод" text:style-name="Index_20_Link" text:visited-style-name="Index_20_Link">1 Увод<text:tab/>4</text:a></text:p>
          <text:p text:style-name="P31"><text:a xlink:type="simple" xlink:href="#__RefHeading___Toc17197_2913585186" office:name="PostgreSQL процесор упита" text:style-name="Index_20_Link" text:visited-style-name="Index_20_Link">2 PostgreSQL процесор упита<text:tab/>5</text:a></text:p>
          <text:p text:style-name="P32"><text:a xlink:type="simple" xlink:href="#__RefHeading___Toc802_4027400509" office:name="Пут упита укратко" text:style-name="Index_20_Link" text:visited-style-name="Index_20_Link">2.1 Пут упита укратко<text:tab/>5</text:a></text:p>
          <text:p text:style-name="P32"><text:a xlink:type="simple" xlink:href="#__RefHeading___Toc804_4027400509" office:name="Фаза парсирања" text:style-name="Index_20_Link" text:visited-style-name="Index_20_Link">2.2 Фаза парсирања<text:tab/>5</text:a></text:p>
          <text:p text:style-name="P32"><text:a xlink:type="simple" xlink:href="#__RefHeading___Toc804_4027400509%20Copy%201" office:name="Фаза трансформације" text:style-name="Index_20_Link" text:visited-style-name="Index_20_Link">2.3 Фаза трансформације<text:tab/>6</text:a></text:p>
          <text:p text:style-name="P32"><text:a xlink:type="simple" xlink:href="#__RefHeading___Toc806_4027400509" office:name="Планер/оптимизатор" text:style-name="Index_20_Link" text:visited-style-name="Index_20_Link">2.4 Планер/оптимизатор<text:tab/>6</text:a></text:p>
          <text:p text:style-name="P32"><text:a xlink:type="simple" xlink:href="#__RefHeading___Toc808_4027400509" office:name="Извршилац упита" text:style-name="Index_20_Link" text:visited-style-name="Index_20_Link">2.5 Извршилац упита<text:tab/>8</text:a></text:p>
          <text:p text:style-name="P31"><text:a xlink:type="simple" xlink:href="#__RefHeading___Toc17197_2913585186%20Copy%203" office:name="MySQL процесор упита" text:style-name="Index_20_Link" text:visited-style-name="Index_20_Link">3 MySQL процесор упита<text:tab/>10</text:a></text:p>
          <text:p text:style-name="P32"><text:a xlink:type="simple" xlink:href="#__RefHeading___Toc1968_4007534867" office:name="Парсер" text:style-name="Index_20_Link" text:visited-style-name="Index_20_Link">3.1 Парсер<text:tab/>10</text:a></text:p>
          <text:p text:style-name="P33"><text:a xlink:type="simple" xlink:href="#__RefHeading___Toc1970_4007534867" office:name="Лексички скенер" text:style-name="Index_20_Link" text:visited-style-name="Index_20_Link">3.1.1 Лексички скенер<text:tab/>10</text:a></text:p>
          <text:p text:style-name="P33"><text:a xlink:type="simple" xlink:href="#__RefHeading___Toc1972_4007534867" office:name="Модул граматичких правила" text:style-name="Index_20_Link" text:visited-style-name="Index_20_Link">3.1.2 Модул граматичких правила<text:tab/>11</text:a></text:p>
          <text:p text:style-name="P33"><text:a xlink:type="simple" xlink:href="#__RefHeading___Toc1974_4007534867" office:name="Стабло парсирања" text:style-name="Index_20_Link" text:visited-style-name="Index_20_Link">3.1.3 Стабло парсирања<text:tab/>11</text:a></text:p>
          <text:p text:style-name="P32"><text:a xlink:type="simple" xlink:href="#__RefHeading___Toc1976_4007534867" office:name="Оптимизатор" text:style-name="Index_20_Link" text:visited-style-name="Index_20_Link">3.2 Оптимизатор<text:tab/>11</text:a></text:p>
          <text:p text:style-name="P32"><text:a xlink:type="simple" xlink:href="#__RefHeading___Toc1978_4007534867" office:name="Извршилац" text:style-name="Index_20_Link" text:visited-style-name="Index_20_Link">3.3 Извршилац<text:tab/>12</text:a></text:p>
          <text:p text:style-name="P31"><text:a xlink:type="simple" xlink:href="#__RefHeading___Toc17197_2913585186%20Copy%202" office:name="EXPLAIN команда" text:style-name="Index_20_Link" text:visited-style-name="Index_20_Link">4 EXPLAIN команда<text:tab/>14</text:a></text:p>
          <text:p text:style-name="P32"><text:a xlink:type="simple" xlink:href="#__RefHeading___Toc810_4027400509%20Copy%201" office:name="EXPLAIN у PostgreSQL" text:style-name="Index_20_Link" text:visited-style-name="Index_20_Link">4.1 EXPLAIN у PostgreSQL<text:tab/>14</text:a></text:p>
          <text:p text:style-name="P33"><text:a xlink:type="simple" xlink:href="#__RefHeading___Toc810_4027400509" office:name="Параметри наредбе EXPLAIN у PostgreSQL" text:style-name="Index_20_Link" text:visited-style-name="Index_20_Link">4.1.1 Параметри наредбе EXPLAIN у PostgreSQL<text:tab/>15</text:a></text:p>
          <text:p text:style-name="P32"><text:a xlink:type="simple" xlink:href="#__RefHeading___Toc810_4027400509%20Copy%201%20Copy%201" office:name="EXPLAIN у MySQL" text:style-name="Index_20_Link" text:visited-style-name="Index_20_Link">4.2 EXPLAIN у MySQL<text:tab/>17</text:a></text:p>
          <text:p text:style-name="P31"><text:a xlink:type="simple" xlink:href="#__RefHeading___Toc17197_2913585186%20Copy%202%20Copy%201" office:name="Поређење MySQL i PostgreSQL" text:style-name="Index_20_Link" text:visited-style-name="Index_20_Link">5 Поређење MySQL i PostgreSQL<text:tab/>19</text:a></text:p>
          <text:p text:style-name="P31"><text:a xlink:type="simple" xlink:href="#__RefHeading___Toc8802_2913585186%20Copy%202" office:name="Закључак" text:style-name="Index_20_Link" text:visited-style-name="Index_20_Link">6 Закључак<text:tab/>24</text:a></text:p>
          <text:p text:style-name="P31"><text:a xlink:type="simple" xlink:href="#__RefHeading___Toc12644_3546172039" office:name="Литература" text:style-name="Index_20_Link" text:visited-style-name="Index_20_Link">7 Литература<text:tab/>25</text:a></text:p>
        </text:index-body>
      </text:table-of-content>
      <text:h text:style-name="P34" text:outline-level="1"><text:bookmark-start text:name="__RefHeading___Toc12646_3546172039"/>Увод<text:bookmark-end text:name="__RefHeading___Toc12646_3546172039"/></text:h>
      <text:p text:style-name="P35">Системи за управљање базама података (у даљем тексту ДБМС) су данас шриокоприхваћени алати за управљањем великом количином дељених података намењени како програмерима тако и крајњим корисницима. Корисници интерагују са системом слаљем захтева за прикупљање (<text:span text:style-name="T23">енг. </text:span><text:span text:style-name="T24">queries</text:span>) или измену података (<text:span text:style-name="T23">енг. </text:span><text:span text:style-name="T25">updates</text:span>). Оба типа ових операција много чешће захтевају приступ подацима на основу њихових својстава у односу на њихову локацију. Низ захтева за прикупљање или ажурирање података спојених у једну логичку целину за интеракцију <text:span text:style-name="T26">с</text:span>а базом података назива се трансакција.</text:p>
      <text:p text:style-name="P36">Како би задовољили све своје кориснике, ДБМС -ови морају ефикасно користити и људске и машинске ресурсе за процесуирање задатих им трансакцијама. <text:span text:style-name="T27">Цена људских ресурса у коришжењу ДБМС -ова је детерминисана у односу на остале факторе, моћи и лакоћом коришћења језика који је на располагању корисницима за интеракцију са њим, било да су то програмери или крајњи корисници, и временом одзива система. Циљеви моћи језика и времена одзива система су у супротности обзиром да је тешко направити лак и флексибилан језик који ће се ефикасно извршавати. Задатак инжењера базе података је да што више смањи овај јаз.</text:span></text:p>
      <text:p text:style-name="P37">Машинкси ресурси које користи ДБМС су простор на диску за приступ подацима, простор у главној меморији за бафере и време заузећа процесора и комуникационих канала за пребацивање података у/из секундарне меморије у главну. Компромис између ових фактора је условљен самом архитектуром ДБМС -а.</text:p>
      <text:p text:style-name="P37">Процесуирање упита је процес трансофрмације језика високог нивоа <text:span text:style-name="T28">(SQL)</text:span> у еквивалентни исправан и ефикасан план извршења упита на језику ниског нивоа.<text:span text:style-name="T29"> Обично се тај процес састоји из следећих подпроцеса:</text:span></text:p>
      <text:list text:style-name="L1">
        <text:list-item>
          <text:p text:style-name="P38">SQL <text:span text:style-name="T30">као улазни параметар</text:span></text:p>
        </text:list-item>
        <text:list-item>
          <text:p text:style-name="P39">Превођење које за резултат даје логички план извршења</text:p>
        </text:list-item>
        <text:list-item>
          <text:p text:style-name="P39">Оптимизовани план који за резултат даје оптимизовани логички план извршења</text:p>
        </text:list-item>
        <text:list-item>
          <text:p text:style-name="P39">Физички план извршења који ДБМС генерише консултујући своју статистику и метаподатке</text:p>
        </text:list-item>
        <text:list-item>
          <text:p text:style-name="P39">Физички план извршења прослеђује се компоненти за извршење која прибавља податке са физичког медијума и генерише крајњи резулта</text:p>
        </text:list-item>
      </text:list>
      <text:h text:style-name="P40" text:outline-level="1"><text:bookmark-start text:name="__RefHeading___Toc17197_2913585186"/>PostgreSQL <text:span text:style-name="T30">процесор упита</text:span><text:bookmark-end text:name="__RefHeading___Toc17197_2913585186"/></text:h>
      <text:p text:style-name="P41">У овом поглављу ћемо представити унутрашњу структуру <text:span text:style-name="T28">PostgreSQL</text:span> -а за процесуирање упита.</text:p>
      <text:h text:style-name="P42" text:outline-level="2"><text:bookmark-start text:name="__RefHeading___Toc802_4027400509"/>Пут упита укратко<text:bookmark-end text:name="__RefHeading___Toc802_4027400509"/></text:h>
      <text:p text:style-name="P43"><text:span text:style-name="T31">Мора се упоставити веза између апликативног програма и </text:span>PostgreSQL сервера. Апликациони програм шаље упит серверу и чека да добије резултате које сервер шаље назад.</text:p>
      <text:p text:style-name="P43">У фази парсирања проверава се синтакса упита и креира се стабло упита.</text:p>
      <text:p text:style-name="P43">Систем за трансофрмацију упита трансформише стабло упита примењујући правила из системског каталога. Једна од примена овог модула је и реализација погледа. Кад год се направи упит према погледу, односно виртуелној табели, систем за трансофрмацију упита трансофрмише кориснички упит у упит за приступ основим табелама датим у дефиницији погледа.</text:p>
      <text:p text:style-name="P43">Планер/оптимизатор узима трансофрмисано стабло упита и креира план упита који ће бити улаз у модул за извршење упита. То поситже тако шо креира све могуће путање које воде до истог резултата, затим процењује трошак извршења сваке путање и одабира најјефтинију путању који извршилац може да користи.</text:p>
      <text:p text:style-name="P43">Извршилац упита обилази стабло плана рекурзивно и преузима редове на начин представљен планом. Извршитељ користи систем за складиштење података приликом претраге релација, врши сортирање и спајање, процењује квалификације и на крају вреће изведене редове. </text:p>
      <text:h text:style-name="P44" text:outline-level="2"><text:bookmark-start text:name="__RefHeading___Toc804_4027400509"/>Фаза парсирања<text:bookmark-end text:name="__RefHeading___Toc804_4027400509"/></text:h>
      <text:p text:style-name="P45">Фаза парсирања се састоји из два дела: парсер дефинисан у <text:span text:style-name="T28">gram.y</text:span> и лексер дефинисан у<text:span text:style-name="T28"> scan.l</text:span> је изграђен коришћењем <text:span text:style-name="T28">Unix </text:span>алата <text:span text:style-name="T28">bison </text:span>и<text:span text:style-name="T28"> flex</text:span>; процес трансформације који врши модификације и допуњава структуре података које враћа парсер.</text:p>
      <text:p text:style-name="P45">Парсер прво мора да валидира синтаксу самог упита који стиже као обичан текст. Уколико синтакса није исправа мора да врати грешку, а уколико је исправна прелази на следећу фазу у којој креира стабло парсирања. Као што смо већ рекли, парсер и лексер су реализовани помоћу <text:s/><text:span text:style-name="T28">Unix </text:span>алата <text:span text:style-name="T28">bison </text:span>и<text:span text:style-name="T28"> flex</text:span>. </text:p>
      <text:p text:style-name="P45">Лексер је дефинисан у датотеци <text:span text:style-name="T28">scan.l</text:span> и служи за препознавање идентификатора, кључних речи <text:span text:style-name="T28">SQL</text:span> -а, ... За сваку пронађену реч генерише токен који предаје парсеру на даљу обраду.</text:p>
      <text:p text:style-name="P45"><text:soft-page-break/>Парсер је дефинисан у датотеци <text:span text:style-name="T28">gram.y</text:span> и састоји се од скупа граматичких правила и акција које се извршавају кад код се неко од правила активира. Код акција се користи за изградњу стабла парсирања.</text:p>
      <text:p text:style-name="P46"><text:span text:style-name="T32">Датотека scan.l се трансформише у C изворну датотеку scan.c помоћу програма flex, а gram.y се трансформише у gram.c помоћу bison. Након што се ове трансформације изврше, може се користити нормалан C компајлер за креирање парсера. </text:span><text:span text:style-name="T30">Поменуте трансформације и компилације се обично раде аутоматски користећи makefile</text:span><text:span text:style-name="T33"> </text:span><text:span text:style-name="T30">-ове који се испоручују са PostgreSQL дистрибуцијом изворног кода.</text:span> </text:p>
      <text:p text:style-name="P45">Парсер је креирао стабло парсирања користећи само фиксна правила о синтакси <text:span text:style-name="T28">SQL</text:span> -а. Не врши никакве претраге у системским каталозима, а самим тим нема ни могућност да разуме семантику задатих му операција. Због тога и постоји фаза трансофрмације која узима стабло које је генерисао парсер и врши над њим семантичку интерпретацију која је неопходна за разумевање на које тебеле, функције и операторе се односи упит. Резултат фазе трансформације је структура података коју називамо стабло упита.</text:p>
      <text:h text:style-name="P47" text:outline-level="2"><text:bookmark-start text:name="__RefHeading___Toc804_4027400509 Copy 1"/>Фаза<text:span text:style-name="T34"> трансформације</text:span><text:bookmark-end text:name="__RefHeading___Toc804_4027400509 Copy 1"/></text:h>
      <text:p text:style-name="P48">Главни разлог зашто се одвајање семантичког парсирања одваја од синтаксног парсирања је због услова да се претраге системског каталога могу вршити само унутар трансакције, а покретање трансакције по пријему упита би било драстично лоше са становишта перформанси конкурентности. Семантичком анализом можемо идентфиковати команде за контролу трансакција, а затим их и извршити без дубље анализе. А сада када знамо да радимо са правим упитом, оправдано је покретање трансакције, под условом да нисмо већ у трансакцији. Покретањем трансакције, покреће се и фаза трансформације. Стабло које је креирао парсер и које је креирала фаза трансофрмације имају исту структуру, али је разлика у детаљима. Нпр. у стаблу парсирања <text:span text:style-name="T35">FuncCall</text:span> представља синтаксу за позив функције која се може трансформисати у <text:span text:style-name="T35">FuncExpr</text:span> или <text:span text:style-name="T35">Aggref</text:span> у зависности од тога да ли се референцирано име односи на обичну или агрегатну функцију. Информације о стварним типовима података колона и резултата израза добијају се тек у стаблу упита.</text:p>
      <text:h text:style-name="P49" text:outline-level="2"><text:bookmark-start text:name="__RefHeading___Toc806_4027400509"/>Планер/оптимизатор<text:bookmark-end text:name="__RefHeading___Toc806_4027400509"/></text:h>
      <text:p text:style-name="P50">Задатак планера/оптимизатора је да креира оптималан план извршења упита. Задати <text:span text:style-name="T28">SQL </text:span>упит, а самим тим и стабло упита, се може извршити на велики број начина, а да се добије исти резултат на крају. Ако је могуће, оптимизатор упита ће испитати сваки од могућих планова извршења и одабрати најоптималнији план извршења.</text:p>
      <text:p text:style-name="P51"><text:span text:style-name="T36">У ситуацијама када имамо велики број спојева у упиту, испитивање сваког могућег начина на који се упит може извршити захтева огромну количину ресурса што </text:span><text:soft-page-break/><text:span text:style-name="T36">би убило поенту за самом оптимизацијом упита. Зато се овде бира разуман, не нужну најоптималнији, план извршења упита у разумном временском року. </text:span><text:span text:style-name="T30">PostgreSQL користи генетски оптимизатор упита када број спајања пређе праг (geqo_threshold).</text:span> </text:p>
      <text:p text:style-name="P52">Претраживање планера је у ствари рад са путањама које представљају поједностављено скраћење репрезентације планова које садрже само онолико информација колико је планеру потребно за доношење одлука. Након усвајања плана извршења упита, по том плану се креира комплетно стабло плана извршења упита које се прослеђује даље извршиоцу на извршење. Овај план извршења мора бити довољно детаљан како би га извршилац могао извршити.</text:p>
      <text:p text:style-name="P53">Сваки план извршења почиње генерисањем планова за скенирање сваке појединачне табеле која ће се користити у упиту. Могући планови су одређени индексима над сваком табелом, а увек је могуће и секвенцијално скенирање целе табеле што доноси још један потенцијални план извршења. Нека је дефинисан индекс над релацијом <text:span text:style-name="T28">R</text:span> и нека упит садржи константу ограничења <text:span text:style-name="T28">R.att OPR</text:span>. Ако се овај атрибут подудара са кључем индекса и <text:span text:style-name="T28">OPR </text:span>оператор се налази у класи оператора индекса, креира се други потенцијални план користећи задати индекс за скенирање реалције <text:span text:style-name="T37">R</text:span>. Ово се посматра за сваки индекс чији кључеви се подударају са оператором. <text:s/>Планови скенирања индекса се креирају и за индексе који имају редослед сортирања који може да се подудара са клаузулом <text:span text:style-name="T28">ORDER </text:span>BY упита, ако је задата у упиту, или ако је редослед сортирања користан за<text:span text:style-name="T28"> merge join</text:span>.</text:p>
      <text:p text:style-name="P53">Уколико упит садржи спајање две или више релација, планови за спајање релација се разматрају након проналаска планова за скенирање појединачних релација и то по принципу сваки са сваким. Стратегије доступне за спајање релација у <text:span text:style-name="T28">PostgreSQL</text:span> -у су:</text:p>
      <text:list text:style-name="L2">
        <text:list-item>
          <text:p text:style-name="P54"><text:span text:style-name="T38">nested join loop</text:span><text:span text:style-name="T30"> - десна релација се скенира по једном за сваки ред из леве релације. Једноставно за имплементацију, али веома неефикасно са становишта употребе ресурса. Уколико се десна релација може скенирати коришћењем индекса, ово може бити добра стратегија и то коришћењем вредности из тренутног реда леве релација за претрагу индекса десне релације. </text:span></text:p>
        </text:list-item>
        <text:list-item>
          <text:p text:style-name="P54"><text:span text:style-name="T38">merge join</text:span><text:span text:style-name="T30"> - свака релација се сортира по атрибутима спајања пре него што спајање почне, а затим се две релације претражују паралелно комбинујући подударне редове за добијање спојева. Ова стратегија је популарна, јер се свака релација скенира само једном. Сортирање се може постићи или експлицитним кораком сортирања или скенирањем релације у одговарајућем редоследу коришћењем индекса над кључем споја.</text:span></text:p>
        </text:list-item>
        <text:list-item>
          <text:p text:style-name="P54"><text:span text:style-name="T38">hash join</text:span><text:span text:style-name="T30"> - десна релација се смешта у хеш табелу, а за кључ у хеш табели се узима атрибут спајања. Након тога се скенира лева релација и одговарајуће вредности сваког пронађеног реда користе се као хеш кључеви за лоцирање спојева у релацији.</text:span></text:p>
        </text:list-item>
      </text:list>
      <text:p text:style-name="P53"><text:soft-page-break/>Када упит садржи више од две релације споја, коначни резултат мора бити изграђен помоћу стабла спајања и то сваки са 2 улаза. Планер ће испитати све могуће секвенце и одабрати најефикаснију секвенцу спајања свих релација.</text:p>
      <text:p text:style-name="P55">Када упит користи <text:s/>број релација мањи од задате границе, планер спрободи сваку могућу претрагу да би пронашао најбољу секвенцу спајања релација. Првенствено се разматрају спојеви између две релације који садрже <text:span text:style-name="T28">WHERE</text:span> клаузулу, а спојеви без ове клаузуле се разматрају само када нема других опција, односно када релација споја нема доступних <text:span text:style-name="T28">WHERE </text:span>клаузула ни са једном другом релацијом из споја. Сви могући планови се генеришу, а планер одабира онај који је проценио најефикаснијим. А када се прекорачи задата граница, секвенце спајања које долазе у обзир се одређују помоћу хеуристике.</text:p>
      <text:p text:style-name="P55">Коначно стабла плана извршења упита се састоји од секвенцијалног или индексног обиласка основних табела; чворова са спојевима, ако има потребе; помоћних корака, попут чворова за соритирање или израчунавање агрегатних функција. Већина ових типова чворова има додатну могућнос одабира селекције, попут одбацивања редова који не испуњавају задати Булов услов и пројекције, односно израчунавања изведеног скупа колона на основу датих вредности колона, тј. процена скаланих израза где има потрбе за тим. Још једна од одговорности планера је и додавање услова селекције из клаузулуе <text:span text:style-name="T28">WHERE</text:span> и израчунавање потребних израза за чворове стабла плана извршења упита.</text:p>
      <text:h text:style-name="P56" text:outline-level="2"><text:bookmark-start text:name="__RefHeading___Toc808_4027400509"/>Извршилац упита<text:bookmark-end text:name="__RefHeading___Toc808_4027400509"/></text:h>
      <text:p text:style-name="P57"><text:span text:style-name="T39">Извршилац упита узима план извршења упита који му је доставио планер и рекурзивно га обрађује како би на излазу испоручио тражене му редове</text:span>.<text:span text:style-name="T39"> </text:span><text:span text:style-name="T40">За сваки позив чвора стабла плана извршења упита, извршилац ће или испоручити још један ред или пријавити да је завршио са испоруком редова.</text:span></text:p>
      <text:p text:style-name="P58">Нека је корен стабла чвор типа <text:span text:style-name="T28">MergeJoin</text:span>. Пре било каквог споја, морају се преузети два реда, по један из сваког подстабла. Што значи да извршилац рекурзивно позива себе да би обрадио подстабла. Нека је корен левог подстабла чвор типа <text:span text:style-name="T28">Sort</text:span>, поново је потребна рекурзија за добијање улазног реда. Дете чвора <text:span text:style-name="T28">Sort </text:span>може бити нпр. чвор типа <text:span text:style-name="T28">SeqScan</text:span>, који је уједно и лист, јер представља стварно читање табеле. Извршавање овог чвора значи да извршитељ преузме ред из табеле и врати родитељу овог чвора. Родитељ, у нашем примеру чвор типа <text:span text:style-name="T28">Sort</text:span>, ће више пута обилазити своју децу како би прибавио све потребне му редове за сортирање. Када се дете чвор исцрпи, оно ће то сигнализирати враћањем вредности <text:span text:style-name="T28">NULL</text:span> уместо реда, код за сортирање се позива да изврши сортирање и враћа први ред свом родитељу. Преостали редови се чувају, како би могли бити испоручени у сортираном редоследу на захтев.</text:p>
      <text:p text:style-name="P58">Корен стабла, у нашем примеру чвор типа <text:span text:style-name="T28">MergeJoin</text:span>, слично захтева и ред из свог десног детета. Затим упоређује два добијена реда, и ако се могу спојити, враћа спојени ред свом родитељу. При следећем позиву, или одмах уколико се редове не могу <text:soft-page-break/>спојити, прелази се не ред леве или десне табеле у зависности резултата поређења и поново се проверава подударање. На крају, једно или друго подстабло је исцрпљено и корен стабла ће вратити <text:span text:style-name="T28">NULL</text:span> како би означио крај споја.</text:p>
      <text:p text:style-name="P58">Сложени упити захтевају и дубље стабло, али принцип је исти. Свако чвор израчунава и враћа свој следећи ред када се позове. Сваки чвор је такође одговоран за примену било којих израза са селекцију или пројекцију коју му је доделио планер.</text:p>
      <text:p text:style-name="P58">Механизам извршиоца се користи за процену свих 5 основних типова <text:span text:style-name="T28">SQL </text:span>упита: <text:span text:style-name="T28">INSERT, SELECT, UPDATE, DELETE</text:span> и<text:span text:style-name="T28"> MERGE</text:span>. За тип упита <text:span text:style-name="T28">SELECT</text:span>, код избршитеља корена стабла само прослеђује редове које му враћа подстабло клијенту.<text:span text:style-name="T41"> Остали подтипови су у суштини </text:span><text:span text:style-name="T42">SELECT</text:span><text:span text:style-name="T41"> у посебном чвору који се зове </text:span><text:span text:style-name="T42">ModifyTable</text:span><text:span text:style-name="T41">.</text:span></text:p>
      <text:p text:style-name="P58">INSERT ... SELECT<text:span text:style-name="T41"> доставља редове чвору </text:span><text:span text:style-name="T42">ModifyTable</text:span><text:span text:style-name="T41"> за уметање у табелу. За упит типа </text:span><text:span text:style-name="T42">UPDATE</text:span><text:span text:style-name="T41">, планер организује да сваки израчунати ред укључује све ажуриране вредности колоне и </text:span><text:span text:style-name="T42">TID</text:span><text:span text:style-name="T41"> (ИД торке или ИД реда) оригиналног циљног реда, а затим се ови подаци достављају кореном чвору </text:span><text:span text:style-name="T42">ModifyTable</text:span><text:span text:style-name="T41"> који користећи ове информације да креира нови ажурирани ред, а стари ред означава као обрисан. За упит типа</text:span><text:span text:style-name="T42"> DELETE,</text:span><text:span text:style-name="T41"> једина колона коју планер заправо враћа је</text:span><text:span text:style-name="T42"> TID</text:span><text:span text:style-name="T41">, а корени чвор</text:span><text:span text:style-name="T42"> ModifyTable</text:span><text:span text:style-name="T41">, једноставно користи</text:span><text:span text:style-name="T42"> TID</text:span><text:span text:style-name="T41"> да посети сваки циљани ред и означи га као обрисан. За тип упита</text:span><text:span text:style-name="T42"> MERGE</text:span><text:span text:style-name="T41">, планер спаја изворне и циљне релације и укључује све вредности колона које захтева било која од</text:span><text:span text:style-name="T42"> WHEN</text:span><text:span text:style-name="T41"> клаузула и</text:span><text:span text:style-name="T42"> TID</text:span><text:span text:style-name="T41"> циљног реда и ови подаци се достављају чвору</text:span><text:span text:style-name="T42"> ModifyTable </text:span><text:span text:style-name="T41">који користећи их утврђује коју </text:span><text:span text:style-name="T42">WHEN </text:span><text:span text:style-name="T41">клаузулу ће извршити, а затим додаје, ажурира или брише циљни ред, ако за то има потребе.</text:span></text:p>
      <text:p text:style-name="P58">INSERT ... VALUES <text:span text:style-name="T41">креира тривијално стабло плана које се састоји од једног чвора </text:span><text:span text:style-name="T42">Result</text:span><text:span text:style-name="T41">, који израчунава само један резултујући ред и доставља га чвору </text:span><text:span text:style-name="T42">ModifyTable</text:span><text:span text:style-name="T41"> да изврши додавање реда у табелу.</text:span></text:p>
      <text:h text:style-name="P59" text:outline-level="1"><text:bookmark-start text:name="__RefHeading___Toc17197_2913585186 Copy 3"/><text:span text:style-name="T43">MySQL</text:span> <text:span text:style-name="T30">процесор упита</text:span><text:bookmark-end text:name="__RefHeading___Toc17197_2913585186 Copy 3"/></text:h>
      <text:p text:style-name="P60">MySQL<text:span text:style-name="T30"> прима упите у </text:span>SQL<text:span text:style-name="T30"> формату, као и свака друга база података. По пријему упита, упит се парсира, односно преводи се обичан текст у комбинацију интерних бинарних структура којима оптимизатор може лако да манипулише. Овај посао обавља парсер који се састоји из два модула: лексичког скенера и модула граматичких правила. Лексички скенер разлаже упит на токене, док модул граматичких равила проналази комбинацију</text:span> SQL<text:span text:style-name="T30"> граматичких правила и извршава код поветан са тим правилима. Резултат рада парсера је стабло парсирања, које уједно и представља улаз оптимизатору.</text:span> <text:span text:style-name="T30">У контексту </text:span>MySQL<text:span text:style-name="T30"> -а, оптимизатор је серверски модул одговоран за преузимање записа које захтева упит. Оптимизатор бира редослед спајања табела, метод читања записа (секвенцијално или индексно скенирање табеле) као и које ће кључеве користити. Циљ оптимизатора је да испоручи тражени упит у најкраћем могућем року са минималним коришћењем ресурса.</text:span></text:p>
      <text:h text:style-name="P61" text:outline-level="2"><text:bookmark-start text:name="__RefHeading___Toc1968_4007534867"/>Парсер<text:bookmark-end text:name="__RefHeading___Toc1968_4007534867"/></text:h>
      <text:p text:style-name="P60"><text:span text:style-name="T30"><text:s/>Као што смо већ рекли у уводу овог поглавља,</text:span> MySQL<text:span text:style-name="T30"> парсер се састоји од два дела: лексичког скенера и модула граматичких правила. Лексички скенер разлаже упит на токене, док модул граматичких правила проналази комбинацију</text:span> SQL<text:span text:style-name="T30"> граматичких правила која производи овај низ и извршава код повезан са тим правилима. А реузултат рада парсера је стабло парсирања које ће користити оптимизатор. За разлику од неких парсера, који преводе обичан текст упита у бајт код,</text:span> MySQL<text:span text:style-name="T30"> парсер директно претвара упит у интерне</text:span> C/C++<text:span text:style-name="T30"> структуре у програмској меморији.</text:span></text:p>
      <text:p text:style-name="P62">Два главна циља парсера су брзина и квалитет информација. Многе инстанце базе морају подржавати оптерећење од неколико хиљада упита у секунди, а то не би било могуће чак и да само парсирање траје само једну милисекунду. Генерисано стабло информација мора садржати довољне и квалитетне информације како би омогућило оптимизатору ефикасан приступ тим подацима. Оптимизатору је потребан брз приступ различитим деловима <text:span text:style-name="T28">WHERE</text:span> клаузуле, табеле, атрибута, листе кључева, <text:span text:style-name="T28">ORDER BY</text:span> и <text:span text:style-name="T28">GROUP BY</text:span> израза, скруктури подупита као и осталим релевантним подацима. Колико год да је тешко постићи ова два циља, <text:span text:style-name="T28">MySQL</text:span> се поприлично добро држи са овим.</text:p>
      <text:h text:style-name="P63" text:outline-level="3"><text:bookmark-start text:name="__RefHeading___Toc1970_4007534867"/>Лексички скенер<text:bookmark-end text:name="__RefHeading___Toc1970_4007534867"/></text:h>
      <text:p text:style-name="P62">Многи пројекти отвореног кода, а и <text:span text:style-name="T28">PostgreSQL</text:span> користе <text:span text:style-name="T28">Unix Flex</text:span> програм за генерисање лексичких скенера. Програмер пружа само смернице за класификацију знакова, а сам програм генерише <text:span text:style-name="T28">C</text:span> код за скенирање које се може интегрисати са остатком кода. Док је код <text:span text:style-name="T44">MySQL</text:span> -а другачије, има свој лексички скенер који побољшава перформансе и флексибилност. Ручно писани идентификатор токена јесте да захтева више времена за израду, али се може поприлично фино тјуновати за идентификацију токена, што свакако није случај са генерисаним кодом. Такође, пружа и могућност за иденитфикацију токена у датом контексту. </text:p>
      <text:p text:style-name="P62"><text:soft-page-break/>Хеш табела за претрагу кључних речи је веома ефикасна, а генерисана је помоћу посебнох програма који се зове <text:span text:style-name="T28">gen_lex_hash</text:span>, пре компајлирања сервера, а компајлира се заједно са сервером. Овако генерисани хеш нема колизија. Скенер означава сваки токен као кључну реч, име функције, број одређеног типа или неки други посебан симбол који има значење у граматичким правилима.</text:p>
      <text:p text:style-name="P64">Улазна у лексички скенер је <text:span text:style-name="T28">yylex()</text:span> у <text:span text:style-name="T28">sql/sql_lex.cc</text:span>. Име функције има посебно значење, мора бити компатибилна са <text:span text:style-name="T28">Unix</text:span><text:span text:style-name="T37"> Bison</text:span> алатом који служи за генерисање граматичких правила, а који очекује да преузме токене позивањем функције са овим именом.</text:p>
      <text:h text:style-name="P65" text:outline-level="3"><text:bookmark-start text:name="__RefHeading___Toc1972_4007534867"/>Модул граматичких правила<text:bookmark-end text:name="__RefHeading___Toc1972_4007534867"/></text:h>
      <text:p text:style-name="P64">Често се овај модул назива и парсер, али га треба разликовати од дела сервера који се бави лексичком анализом, а чији смо детаљни опис дали у потпоглављу изнад. Многи пројекти отвореног кода, а и <text:span text:style-name="T28">PostgreSQL</text:span> користе <text:span text:style-name="T28">Unix Bison</text:span> за генерисање парсера. <text:span text:style-name="T28">MySQL </text:span>овде не одуступа, за разлику од лексичког анализатора. Граматичка правила су дефинисана у <text:span text:style-name="T28">sql/sql_yacc.yy</text:span>. <text:span text:style-name="T28">Bison </text:span>од ове датотеке генерише <text:span text:style-name="T28">sql/sql_yacc.cc</text:span>. Улазна тачка модула граматичких првила је <text:span text:style-name="T28">yyparse().</text:span></text:p>
      <text:h text:style-name="P65" text:outline-level="3"><text:bookmark-start text:name="__RefHeading___Toc1974_4007534867"/>Стабло парсирања<text:bookmark-end text:name="__RefHeading___Toc1974_4007534867"/></text:h>
      <text:p text:style-name="P64">Као што смо и рекли у уводу овог поглавља, резултат рада парсера је стабло парсирања. Централна структура овог стабла представља објекат типа <text:span text:style-name="T28">LEX</text:span>. Унутар ове структуре, <text:span text:style-name="T28">sql_command</text:span> идентификује тип упита(<text:span text:style-name="T28">SELECT, INSERT, UPDATE, DELETE </text:span>или <text:span text:style-name="T28">MERGE</text:span>), што даље одређује главни смер извршавања код. Најважнији део за саму обраду података је <text:span text:style-name="T28">select_lex</text:span> који садржи детаљне информације о свим деловима упита, укљчујући листу табела, поља и клаузула попут<text:span text:style-name="T28"> WHERE</text:span> и<text:span text:style-name="T28"> GROUP BY.</text:span></text:p>
      <text:p text:style-name="P64">Посебан значај овде има члан <text:span text:style-name="T28">where</text:span> који представља корен подстабла за обраду <text:s/><text:span text:style-name="T28">WHERE</text:span> клаузуле. Чворови овог стабла су објекти класе <text:span text:style-name="T37">Item</text:span>, која покрива све елементе <text:span text:style-name="T28">SQL</text:span> израза, од аритметичких операција и логичких оператора до референци на поља у релацијама.</text:p>
      <text:h text:style-name="P66" text:outline-level="2"><text:bookmark-start text:name="__RefHeading___Toc1976_4007534867"/>Оптимизатор<text:bookmark-end text:name="__RefHeading___Toc1976_4007534867"/></text:h>
      <text:p text:style-name="P67">Главни задатак оптимизатора није само да испоручи тражене податке, већ да то учини на најефикаснији могући начин. Наивни приступ, који би проверавао сваку могућу комбинацију редова (тзв. Декартов производ), морао би да испита билион комбинација, што би на просечном процесору трајало више од 11 дана. Насупрот томе, коришћењем кључева (индекса) и паметним редоследом приступа, број комбинација се може смањити на 10.000, чиме се време извршавања своди на свега <text:span text:style-name="T45">30 милисекунди</text:span>. Иако коришћење индекса носи одређени „overhead“ (приступ преко кључа је око три пута скупљи од обичног скенирања), уштеда у броју операција је толика да оправдава сваку инвестицију у ресурсе оптимизатора.</text:p>
      <text:p text:style-name="P68"><text:soft-page-break/>Оптимизатор обавља низ комплексних операција пре самог извршења упита:</text:p>
      <text:list text:style-name="L3">
        <text:list-item>
          <text:p text:style-name="P69"><text:span text:style-name="T46">Избор индекса:</text:span> Одређује који су кључеви доступни и бира онај најефикаснији за сваку табелу.</text:p>
        </text:list-item>
        <text:list-item>
          <text:p text:style-name="P69"><text:span text:style-name="T46">Скенирање наспрам индекса:</text:span> Процењује да ли је брже прочитати целу табелу (table scan) или користити индекс (ако индекс враћа превелики проценат редова, скенирање је често брже).</text:p>
        </text:list-item>
        <text:list-item>
          <text:p text:style-name="P69"><text:span text:style-name="T46">Редослед спајања (Join Order):</text:span> Одлучује којим редоследом ће табеле бити процесуиране како би се што раније елиминисао што већи број редова.</text:p>
        </text:list-item>
        <text:list-item>
          <text:p text:style-name="P70"><text:span text:style-name="T47">Преуређивање WHERE клаузуле:</text:span><text:span text:style-name="T48"> Елиминише „мртав код“, упрошћава математичке операције (нпр. претвара </text:span><text:span text:style-name="Source_20_Text"><text:span text:style-name="T48">age=31+1</text:span></text:span><text:span text:style-name="T48"> у </text:span><text:span text:style-name="Source_20_Text"><text:span text:style-name="T48">age=32</text:span></text:span><text:span text:style-name="T48">) и прилагођава услове како би се омогућило коришћење кључева.</text:span></text:p>
        </text:list-item>
        <text:list-item>
          <text:p text:style-name="P69"><text:span text:style-name="T46">Упрошћавање структуре:</text:span> Елиминише непотребне табеле из спајања, покушава да замени <text:span text:style-name="T49">outer join</text:span> са <text:span text:style-name="T49">inner join</text:span>-ом и поједностављује подупите.</text:p>
        </text:list-item>
      </text:list>
      <text:p text:style-name="P68"><text:span text:style-name="T45">Код</text:span> MySQL<text:span text:style-name="T45"> </text:span>-а, сваки упит се посматра као скуп спајања (join). Проналажење најбољег редоследа спајања је кључни изазов, а MySQL користи два приступа:</text:p>
      <text:list text:style-name="L4">
        <text:list-item>
          <text:p text:style-name="P71"><text:span text:style-name="T46">Exhaustive Search (Исцрпна претрага):</text:span> Испитује апсолутно све могуће комбинације табела. Иако гарантује најбољи план, код упита са много табела овај процес може трајати предуго.</text:p>
        </text:list-item>
        <text:list-item>
          <text:p text:style-name="P72"><text:span text:style-name="T47">Greedy Search (Похлепна претрага):</text:span><text:span text:style-name="T48"> ова метода претражује само одређену „дубину“ комбинација (контролисану варијаблом </text:span><text:span text:style-name="Source_20_Text"><text:span text:style-name="T48">optimizer_search_depth</text:span></text:span><text:span text:style-name="T48">). Она бира тренутно најбољу табелу и наставља даље, жртвујући апсолутну оптималност зарад брзине самог процеса оптимизације.</text:span></text:p>
        </text:list-item>
      </text:list>
      <text:p text:style-name="P68">Након што оптимизатор одреди план, база прелази на извршење путем угњеждених петљи (nested loops). Процес креће од прве табеле у плану, а за сваки њен ред претражује се следећа табела, и тако редом. Услови из WHERE клаузуле се проверавају што је раније могуће (чим су доступна поља потребна за евалуацију) како би се спречило непотребно угњежђивање.</text:p>
      <text:p text:style-name="P73"><text:span text:style-name="T48">На крају, редови који прођу све филтере прослеђују се објекту за обраду резултата (</text:span><text:span text:style-name="Source_20_Text"><text:span text:style-name="T48">select_result</text:span></text:span><text:span text:style-name="T48">), који их шаље клијенту, уписује у привремену табелу или шаље на даљу обраду. Успех оптимизатора се мери тиме колико је успешно трансформисао „тежак“ кориснички упит у низ брзих, индексираних операција.</text:span></text:p>
      <text:h text:style-name="P74" text:outline-level="2"><text:bookmark-start text:name="__RefHeading___Toc1978_4007534867"/>Извршилац<text:bookmark-end text:name="__RefHeading___Toc1978_4007534867"/></text:h>
      <text:p text:style-name="P75"><text:soft-page-break/><text:span text:style-name="T48">Парсер говори шта да се уради, оптимизатор говори како то да се уради, а извршилац извршава како му оптимизатор каже. Први корак приликом покретања извршавања упита је провера дозвола над табелом која се користи у упиту. Ако нема дозволе, враћа се грешка </text:span><text:span text:style-name="T50">no permission</text:span><text:span text:style-name="T48">. Затим ће се проверити кеш упита, и ако упит постоји у кешу, вратиће се кеширано. Након отварања табеле, извршилац ће контактирати преко Handler АПИ -ја за прибављање података од модула задуженог за чување података. Најчешће коришћени модул за то је </text:span><text:span text:style-name="T50">InnoDB</text:span><text:span text:style-name="T48">.</text:span></text:p>
      <text:p text:style-name="P76">Уколико немамо примарни кључ над табелом, поступак је следећи: контактира се <text:span text:style-name="T28">InnoDB</text:span> преко <text:span text:style-name="T28">Handler </text:span>АПИ -ја, који враћа први ред табеле, проверава се да ли тај ред испуњава задате услове, ако испуњава чува се у скупу резултата, прелази се на следећи ред рекурзивно док се не преузму сви тражени редови.<text:span text:style-name="T51"> </text:span>Уколико имамо примарни кључ над табелом, поступак је сличан. <text:span text:style-name="T51">Први позив је преузми ред који испуњава задати услов, а затим кроз петљу се преузимају сви остали тражени редови.</text:span></text:p>
      <text:h text:style-name="P77" text:outline-level="1"/>
      <text:h text:style-name="P78" text:outline-level="1"><text:bookmark-start text:name="__RefHeading___Toc17197_2913585186 Copy 2"/>EXPLAIN <text:span text:style-name="T30">команда</text:span><text:bookmark-end text:name="__RefHeading___Toc17197_2913585186 Copy 2"/></text:h>
      <text:p text:style-name="P79">У претходн<text:span text:style-name="T51">им</text:span> поглављ<text:span text:style-name="T51">има</text:span> смо објасни како <text:span text:style-name="T28">PostgreSQL</text:span><text:span text:style-name="T51"> и</text:span><text:span text:style-name="T52"> MySQL</text:span><text:span text:style-name="T28"> </text:span>ДБМС<text:span text:style-name="T51"> -ови</text:span> обрађуј<text:span text:style-name="T51">у</text:span> упит<text:span text:style-name="T51">е</text:span> и са којим проблемима се сусрећ<text:span text:style-name="T51">у</text:span> приликом тог процеса. Један од највећих проблема <text:span text:style-name="T51">им</text:span> је одређивање најефикаснијег плана извршења упита. Неко ко пише <text:span text:style-name="T51">упит </text:span>може утицати на ту одлуку и зато му ДБМС омогућава да види план извршења упита који је <text:span text:style-name="T51">ДБМС</text:span> одабрао<text:span text:style-name="T53"> и по потреби модификује упит или конфигурацију самог ДБМС -а</text:span>, а све у циљу побољшања перформанси извршења упита. За ову потребу, ДБМС -ови обезбеђују команду <text:span text:style-name="T28">EXPLAIN</text:span>, која приказује план извршења упита.</text:p>
      <text:h text:style-name="P80" text:outline-level="2"><text:bookmark-start text:name="__RefHeading___Toc810_4027400509 Copy 1"/><text:span text:style-name="T28">EXPLAIN</text:span><text:span text:style-name="T51"> у </text:span><text:span text:style-name="T52">PostgreSQL</text:span><text:bookmark-end text:name="__RefHeading___Toc810_4027400509 Copy 1"/></text:h>
      <text:p text:style-name="P79">Синтакса команде<text:span text:style-name="T51"> у</text:span><text:span text:style-name="T52"> PostgreSQL</text:span><text:span text:style-name="T28"> </text:span>је: <text:span text:style-name="T28">EXPLAIN [ ( </text:span><text:span text:style-name="T24">option</text:span><text:span text:style-name="T28"> [, ...] ) ] </text:span><text:span text:style-name="T24">statement</text:span><text:span text:style-name="T54"> где </text:span><text:span text:style-name="T55">option</text:span><text:span text:style-name="T56"> </text:span><text:span text:style-name="T54">може бити једна или више од следећих команди:</text:span></text:p>
      <text:p text:style-name="P81">ANALYZE [ <text:span text:style-name="T23">boolean</text:span> ]</text:p>
      <text:p text:style-name="P81">VERBOSE [ <text:span text:style-name="T23">boolean</text:span> ]</text:p>
      <text:p text:style-name="P81">COSTS [ <text:span text:style-name="T23">boolean</text:span> ]</text:p>
      <text:p text:style-name="P81">SETTINGS [ <text:span text:style-name="T23">boolean</text:span> ]</text:p>
      <text:p text:style-name="P81">GENERIC_PLAN [ <text:span text:style-name="T23">boolean</text:span> ]</text:p>
      <text:p text:style-name="P81">BUFFERS [ <text:span text:style-name="T23">boolean</text:span> ]</text:p>
      <text:p text:style-name="P81">SERIALIZE [ { NONE | TEXT | BINARY } ]</text:p>
      <text:p text:style-name="P81">WAL [ <text:span text:style-name="T23">boolean</text:span> ]</text:p>
      <text:p text:style-name="P81">TIMING [ <text:span text:style-name="T23">boolean</text:span> ]</text:p>
      <text:p text:style-name="P81">SUMMARY [ <text:span text:style-name="T23">boolean</text:span> ]</text:p>
      <text:p text:style-name="P81">MEMORY [ <text:span text:style-name="T23">boolean</text:span> ]</text:p>
      <text:p text:style-name="P81">FORMAT { TEXT | XML | JSON | YAML }</text:p>
      <text:p text:style-name="P82">Ова команда приказује план извршења који <text:span text:style-name="T28">PostgreSQL </text:span>планер генерише за наведени упит. План извршења приказује како ће се скенирати табела(е) над којима се упит позива, секвенцијалним скенирањем или скенирањем индекса, и ако се упит <text:soft-page-break/>позива над више табела, који ће се алгоритми користити за спајање потребних редова из сваке улазне табеле.</text:p>
      <text:p text:style-name="P83">Најзахтевнији део у приказује је процењени трошак извршења наредбе, јер је и најпотребнији део, али и најтежи за израчунати, јер зависи од много фактора, а представља предпоставку планера колико ће извршиоцу бити потребно за покретање наредбе. Мери се у јединицама трошкова које су прозивољне, али најчешће конвенционално означавају преузимање странице диска. Приказују се два броја, почетни трошак пре него што се први ред може вратити клијенту и укупни трошак за вражање свих редова. За већину упита је битан укупни трошак, али постоје ситуација када је битан и почетни трошак, попут подупита у оквиру <text:span text:style-name="T28">EXISTS</text:span> наредбе, где планер одабира најмањи почетни трошак, уместо најмањег укупног трошка, јер ће извршилац вратити само један ред. Или уколико се враћа ограничен број редова помоћу клаузуле <text:span text:style-name="T28">LIMIT</text:span>, планер ће направити одговарајући однос између трошкова крајње тачке како би проценио прави најефикаснији план.</text:p>
      <text:p text:style-name="P83">Опција <text:span text:style-name="T28">ANALYZE</text:span> говори ДБМС -у да заиста изврши упит и поред процењеног времена извршења врати и реално време извршења за сваки чвор у плану извршења изражено у милисекундама и укупан број редова које је заправо вратио. Ово се користи за оцену планерове процене извршења упита.</text:p>
      <text:p text:style-name="P84"><text:span text:style-name="T57">Када се користи опција </text:span><text:span text:style-name="T58">ANALYZE</text:span><text:span text:style-name="T57">, наредба ће се и заиста извршити, као што смо већ рекли. </text:span><text:span text:style-name="T58">EXPLAIN</text:span><text:span text:style-name="T57"> ће одбацити сваки излаз који је </text:span><text:span text:style-name="T58">SELECT </text:span><text:span text:style-name="T57">наредба вратила, али други споредни ефекти наредбе ће се десити као и обично. За коришћење </text:span><text:span text:style-name="T58">EXPLAIN ANALYZE</text:span><text:span text:style-name="T57"> наредбе код упита типа </text:span><text:span text:style-name="T30">INSERT, UPDATE, DELETE, MERGE, CREATE TABLE AS или EXECUTE</text:span> <text:span text:style-name="T59">без утицаја на податке у бази, користи се следећи приступ:</text:span></text:p>
      <text:p text:style-name="P85">BEGIN;<text:line-break/>EXPLAIN ANALYZE ...;<text:line-break/>ROLLBACK;</text:p>
      <text:h text:style-name="P86" text:outline-level="3"><text:bookmark-start text:name="__RefHeading___Toc810_4027400509"/>Параметри наредбе <text:span text:style-name="T28">EXPLAIN</text:span><text:span text:style-name="T51"> у </text:span><text:span text:style-name="T52">PostgreSQL</text:span><text:bookmark-end text:name="__RefHeading___Toc810_4027400509"/></text:h>
      <text:list text:style-name="L5">
        <text:list-item>
          <text:p text:style-name="P87"><text:span text:style-name="T38">ANALYZE</text:span> - <text:span text:style-name="T60">извршава команду и приказује стварно време извршења и осталу статистику.</text:span></text:p>
        </text:list-item>
        <text:list-item>
          <text:p text:style-name="P87"><text:span text:style-name="T38">VERBOSE</text:span> - <text:span text:style-name="T60">приказује додатне информације у вези са планом извршења. Конкретно, укључује листу излазних колона за сваки чвор у стаблу плана, називе табела и функција за квалификацију шеме, увек ће приказати променљиве са својим алијасима табела и увек исписује име сваког тригера за који се приказује статистика. Индетификатор упита ће такође бити приказан, ако је израчунат.</text:span></text:p>
        </text:list-item>
        <text:list-item>
          <text:p text:style-name="P87"><text:soft-page-break/><text:span text:style-name="T38">COSTS</text:span> - <text:span text:style-name="T60">укључује информације у процењеним трошковима покретања и укупним трошковима сваког чвора плана, као и процењен број редова и процењену ширину сваког реда.</text:span></text:p>
        </text:list-item>
        <text:list-item>
          <text:p text:style-name="P87"><text:span text:style-name="T38">SETTINGS</text:span> - <text:span text:style-name="T60">укључује информације о параметрима конфигурације. Конкретно, укључиће опције које утичу на планирање упита са вредношћу која се разликује од подразумеване вредности.</text:span></text:p>
        </text:list-item>
        <text:list-item>
          <text:p text:style-name="P87"><text:span text:style-name="T38">GENERIC_PLAN</text:span> - <text:span text:style-name="T60">дозвољава да наредба садржи резервисане параметре попут $1 и генерише генерички план који не зависи од вредности тих параметара.</text:span></text:p>
        </text:list-item>
        <text:list-item>
          <text:p text:style-name="P87"><text:span text:style-name="T38">BUFFERS</text:span> - <text:span text:style-name="T60">укључује информације о коришћењу бафера. Конкретно, укључиће број дељених блокова који су погођени, прочитани, означени као "прљави" и уписани, број блокова који су причитани и уписани и време проведено за читање и писање блокова датотека података, локалних блокова и привремених блокова датотека, ако је омогућено </text:span><text:span text:style-name="T61">track_io_timing</text:span><text:span text:style-name="T60">. Погодак значи да је читање избегнуто, јер је блок већ пронађен у кешу када је био потребан. Дељени блокови </text:span><text:span text:style-name="T62">садрже податке из регуларних табела и индекса, локални блокови садрже податке из привремених табела и индекса, док привремени блокови садрже краткорочне радне податке који се користе у сортирању, еширању, чворовима плана </text:span><text:span text:style-name="T63">Materialize</text:span><text:span text:style-name="T62"> и сличним ситуацијама. Број блокова означених као "пљави" означава број претходно неизмењених блокова које је овај упит изменио, док број записаних блокова озналава број претходно означених "прљавих" блокова које је овај упит избацио из кеша током обраде упита. Број блокова приказаних за чвор вишег нивоа укључује оне које користе сви његови подређени чворови. У текстуалном формату, исписују се само вредности које нису 0.</text:span></text:p>
        </text:list-item>
        <text:list-item>
          <text:p text:style-name="P87"><text:span text:style-name="T38">SERIALIZE</text:span> - <text:span text:style-name="T62">у</text:span>кључ<text:span text:style-name="T62">ује</text:span> информације о трошковима серијализације излазних података упита, односно конвертовања у текстуални или бинарни формат за слање клијенту. Ово може бити значајан део времена потребног за редовно извршавање упита, ако су излазне функције типа података скупе или ако се TOAST вредности морају преузети из ванредне меморије. Ако је наведено SERIALIZE TEXT или SERIALIZE BINARY, извршавају се одговарајуће конверзије и мери се време проведено у томе. Ако је такође наведена опција BUFFERS, онда се рачунају и сви приступи баферу укључени у конверзије. Међутим, ни у ком случају EXPLAIN неће заправо послати резултујуће податке клијенту; стога се трошкови мрежног преноса не могу истражити на овај начин. Серијализација може бити омогућена само када је такође омогућена опција ANALYZE.</text:p>
        </text:list-item>
        <text:list-item>
          <text:p text:style-name="P87"><text:span text:style-name="T38">WAL</text:span> - <text:span text:style-name="T62">укључује информације о генерисању </text:span><text:span text:style-name="T63">WAL</text:span><text:span text:style-name="T62"> записа. Конкретно, укључиће број записа, број слика целе странице, количину генерисаног </text:span><text:span text:style-name="T63">WAL -a</text:span><text:span text:style-name="T62"> у бајтовима и број пута када су се </text:span><text:span text:style-name="T63">WAL</text:span><text:span text:style-name="T62"> бефери напунили. Такође, у текстуалном </text:span><text:soft-page-break/><text:span text:style-name="T62">формату, штампају се само вредности које нису 0. Може се користити само уз </text:span><text:span text:style-name="T63">ANALYZE.</text:span></text:p>
        </text:list-item>
        <text:list-item>
          <text:p text:style-name="P88"><text:span text:style-name="T64">TIMING</text:span><text:span text:style-name="T65"> - </text:span><text:span text:style-name="T66">укључиће стварно време покретања и време проведено у сваком чвору у излазу. </text:span><text:span text:style-name="T30">Оптерећење поновљеног читања системског сата може значајно успорити упит на неким системима, па може бити корисно поставити овај параметар на FALSE када је потребан само стварни број редова, а не тачно време. Време извршавања целе наредбе се увек мери, чак и када је време на нивоу чвора искључено помоћу ове опције. Овај параметар се може користити само када је омогућена и опција </text:span><text:span text:style-name="T67">ANALYZE</text:span><text:span text:style-name="T30">.</text:span> </text:p>
        </text:list-item>
        <text:list-item>
          <text:p text:style-name="P89"><text:span text:style-name="T64">SUMMARY</text:span><text:span text:style-name="T65"> - </text:span><text:span text:style-name="T67">у</text:span><text:span text:style-name="T66">кључује</text:span><text:span text:style-name="T30"> резимиране информације (нпр. информације о укупном времену) након плана упита. Време планирања у EXPLAIN EXECUTE укључује време потребно за преузимање плана из кеша и време потребно за поновно планирање, ако је потребно</text:span><text:span text:style-name="T62">.</text:span></text:p>
        </text:list-item>
        <text:list-item>
          <text:p text:style-name="P89"><text:span text:style-name="T64">MEMORY</text:span><text:span text:style-name="T65"> - </text:span><text:span text:style-name="T68">у</text:span><text:span text:style-name="T30">кључ</text:span><text:span text:style-name="T69">ује</text:span><text:span text:style-name="T30"> информације о потрошњи меморије у фази планирања упита. Конкретно, укључи</text:span><text:span text:style-name="T69">ће</text:span><text:span text:style-name="T30"> тачну количину меморије коју користе структуре планера у меморији, као и укупну меморију узимајући у обзир оптерећење алокације.</text:span> </text:p>
        </text:list-item>
        <text:list-item>
          <text:p text:style-name="P89"><text:span text:style-name="T64">FORMAT</text:span><text:span text:style-name="T65"> -</text:span><text:span text:style-name="T70"> </text:span><text:span text:style-name="T71">дефинише</text:span><text:span text:style-name="T30"> излазни формат, који може бити TEXT, XML, JSON или YAML.</text:span> </text:p>
        </text:list-item>
        <text:list-item>
          <text:p text:style-name="P87"><text:span text:style-name="T23">boolean</text:span> - <text:span text:style-name="T69">одређује да ли ће задата опција бити укључена или искључена.</text:span></text:p>
        </text:list-item>
        <text:list-item>
          <text:p text:style-name="P89"><text:span text:style-name="T72">statement</text:span><text:span text:style-name="T65"> - </text:span><text:span text:style-name="T71">било који </text:span><text:span text:style-name="T68">SQL</text:span><text:span text:style-name="T71"> израз типа </text:span><text:span text:style-name="T30">SELECT, INSERT, UPDATE, DELETE, MERGE, VALUES, EXECUTE, DECLARE, CREATE TABLE AS или CREATE MATERIALIZED VIEW AS</text:span><text:span text:style-name="T69">.</text:span></text:p>
        </text:list-item>
      </text:list>
      <text:h text:style-name="P80" text:outline-level="2"><text:bookmark-start text:name="__RefHeading___Toc810_4027400509 Copy 1 Copy 1"/><text:span text:style-name="T28">EXPLAIN</text:span><text:span text:style-name="T51"> у </text:span><text:span text:style-name="T52">MySQL</text:span><text:bookmark-end text:name="__RefHeading___Toc810_4027400509 Copy 1 Copy 1"/></text:h>
      <text:p text:style-name="P90"><text:span text:style-name="T51">У </text:span><text:span text:style-name="T52">MySQL</text:span><text:span text:style-name="T51"> -у су наредбе</text:span><text:span text:style-name="T52"> DESCRIBE</text:span><text:span text:style-name="T51"> и</text:span><text:span text:style-name="T52"> EXPLAIN</text:span><text:span text:style-name="T51"> синоними. Мада у пракси се</text:span><text:span text:style-name="T52"> DESCRIBE</text:span><text:span text:style-name="T51"> чешће користи за добијање информација о структури табеле, док се</text:span><text:span text:style-name="T52"> EXPLAIN</text:span><text:span text:style-name="T51"> користи за добијање плана извршења упита, односно објашњења како би</text:span><text:span text:style-name="T52"> MySQL</text:span><text:span text:style-name="T51"> извршио упит.</text:span><text:span text:style-name="T52"> </text:span>Синтакса команде<text:span text:style-name="T51"> у</text:span><text:span text:style-name="T52"> MySQL</text:span><text:span text:style-name="T28"> </text:span>је: </text:p>
      <text:p text:style-name="P91">{EXPLAIN | DESCRIBE | DESC}<text:span text:style-name="T52"> </text:span>tbl_name [col_name | wild]</text:p>
      <text:p text:style-name="P91">{EXPLAIN | DESCRIBE | DESC}<text:span text:style-name="T52"> </text:span>[explain_type] [INTO variable]<text:span text:style-name="T52"> </text:span>{[schema_spec] explainable_stmt | FOR CONNECTION connection_id}</text:p>
      <text:p text:style-name="P91">{EXPLAIN | DESCRIBE | DESC} ANALYZE [FORMAT = TREE] [schema_spec] select_statement</text:p>
      <text:p text:style-name="P91"><text:soft-page-break/>{EXPLAIN | DESCRIBE | DESC} ANALYZE FORMAT = JSON INTO variable [schema_spec] select_statement</text:p>
      <text:p text:style-name="P91">explain_type: { FORMAT = format_name<text:span text:style-name="T52"> </text:span>}</text:p>
      <text:p text:style-name="P91">format_name: { TRADITIONAL | JSON | TREE<text:span text:style-name="T52"> </text:span>}</text:p>
      <text:p text:style-name="P91">explainable_stmt: { SELECT statement | TABLE statement | DELETE statement<text:span text:style-name="T52"> </text:span>| INSERT statement | REPLACE statement | UPDATE statement<text:span text:style-name="T52"> </text:span>}</text:p>
      <text:p text:style-name="P91"><text:span text:style-name="T28">schema_spec:</text:span><text:span text:style-name="T52"> </text:span><text:span text:style-name="T28">FOR</text:span> {SCHEMA | DATABASE} schema_name</text:p>
      <text:h text:style-name="P92" text:outline-level="1"/>
      <text:h text:style-name="P93" text:outline-level="1"><text:bookmark-start text:name="__RefHeading___Toc17197_2913585186 Copy 2 Copy 1"/>Поређење <text:span text:style-name="T28">MySQL i PostgreSQL</text:span><text:bookmark-end text:name="__RefHeading___Toc17197_2913585186 Copy 2 Copy 1"/></text:h>
      <text:p text:style-name="P94"><text:span text:style-name="T73">За потребе овог семинарског рада, покренута је по једна инстаца </text:span><text:span text:style-name="T74">MySQL (9.6.0)</text:span><text:span text:style-name="T73"> и </text:span><text:span text:style-name="T74">PostgreSQL (18.3)</text:span><text:span text:style-name="T73"> базе података у </text:span><text:span text:style-name="T74">Docker</text:span><text:span text:style-name="T73"> контејнерима. Шема над којом ће бити вршено поређење дајемо у наставку:</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5">Табела</text:p>
          </table:table-cell>
          <table:table-cell table:style-name="Table2.A1" office:value-type="string">
            <text:p text:style-name="P95">Колона</text:p>
          </table:table-cell>
          <table:table-cell table:style-name="Table2.A1" office:value-type="string">
            <text:p text:style-name="P96">MySQL</text:p>
          </table:table-cell>
          <table:table-cell table:style-name="Table2.D1" office:value-type="string">
            <text:p text:style-name="P96">PostgreSQL</text:p>
          </table:table-cell>
        </table:table-row>
        <table:table-row>
          <table:table-cell table:style-name="Table2.A2" table:number-rows-spanned="3" office:value-type="string">
            <text:p text:style-name="P97">user</text:p>
          </table:table-cell>
          <table:table-cell table:style-name="Table2.B2" office:value-type="string">
            <text:p text:style-name="P98">id</text:p>
          </table:table-cell>
          <table:table-cell table:style-name="Table2.C2" office:value-type="string">
            <text:p text:style-name="P99">INT AUTO_INCREMENT PRIMARY KEY</text:p>
          </table:table-cell>
          <table:table-cell table:style-name="Table2.D2" office:value-type="string">
            <text:p text:style-name="P99">SERIAL PRIMARY KEY</text:p>
          </table:table-cell>
        </table:table-row>
        <table:table-row>
          <table:covered-table-cell table:style-name="Table2.A3"/>
          <table:table-cell table:style-name="Table2.B2" office:value-type="string">
            <text:p text:style-name="P98">username</text:p>
          </table:table-cell>
          <table:table-cell table:style-name="Table2.C2" office:value-type="string">
            <text:p text:style-name="P99">VARCHAR(50) NOT NULL</text:p>
          </table:table-cell>
          <table:table-cell table:style-name="Table2.D3" office:value-type="string">
            <text:p text:style-name="P99">VARCHAR(50) NOT NULL</text:p>
          </table:table-cell>
        </table:table-row>
        <table:table-row>
          <table:covered-table-cell table:style-name="Table2.A3"/>
          <table:table-cell table:style-name="Table2.B2" office:value-type="string">
            <text:p text:style-name="P98">perferences</text:p>
          </table:table-cell>
          <table:table-cell table:style-name="Table2.C2" office:value-type="string">
            <text:p text:style-name="P99">JSON</text:p>
          </table:table-cell>
          <table:table-cell table:style-name="Table2.D4" office:value-type="string">
            <text:p text:style-name="P99">JSONB</text:p>
          </table:table-cell>
        </table:table-row>
        <table:table-row>
          <table:table-cell table:style-name="Table2.A2" table:number-rows-spanned="5" office:value-type="string">
            <text:p text:style-name="P97">transactions</text:p>
          </table:table-cell>
          <table:table-cell table:style-name="Table2.B2" office:value-type="string">
            <text:p text:style-name="P98">id</text:p>
          </table:table-cell>
          <table:table-cell table:style-name="Table2.C2" office:value-type="string">
            <text:p text:style-name="P99">INT AUTO_INCREMENT PRIMARY KEY</text:p>
          </table:table-cell>
          <table:table-cell table:style-name="Table2.D5" office:value-type="string">
            <text:p text:style-name="P99">PRIMARY KEY </text:p>
          </table:table-cell>
        </table:table-row>
        <table:table-row>
          <table:covered-table-cell table:style-name="Table2.A6"/>
          <table:table-cell table:style-name="Table2.B2" office:value-type="string">
            <text:p text:style-name="P98">user_id</text:p>
          </table:table-cell>
          <table:table-cell table:style-name="Table2.C2" office:value-type="string">
            <text:p text:style-name="P99">INT</text:p>
          </table:table-cell>
          <table:table-cell table:style-name="Table2.D6" office:value-type="string">
            <text:p text:style-name="P99">INTEGER REFERENCES users(id)</text:p>
          </table:table-cell>
        </table:table-row>
        <table:table-row>
          <table:covered-table-cell table:style-name="Table2.A6"/>
          <table:table-cell table:style-name="Table2.B2" office:value-type="string">
            <text:p text:style-name="P98">amount</text:p>
          </table:table-cell>
          <table:table-cell table:style-name="Table2.C2" office:value-type="string">
            <text:p text:style-name="P99">DECIMAL(15, 2) NOT NULL</text:p>
          </table:table-cell>
          <table:table-cell table:style-name="Table2.D7" office:value-type="string">
            <text:p text:style-name="P99">DECIMAL(15, 2) NOT NULL</text:p>
          </table:table-cell>
        </table:table-row>
        <table:table-row>
          <table:covered-table-cell table:style-name="Table2.A6"/>
          <table:table-cell table:style-name="Table2.B2" office:value-type="string">
            <text:p text:style-name="P98">status</text:p>
          </table:table-cell>
          <table:table-cell table:style-name="Table2.C2" office:value-type="string">
            <text:p text:style-name="P99">ENUM('pending', 'completed', 'failed') NOT NULL</text:p>
          </table:table-cell>
          <table:table-cell table:style-name="Table2.D8" office:value-type="string">
            <text:p text:style-name="P99">VARCHAR(20) CHECK (status IN ('pending', 'completed', 'failed'))</text:p>
          </table:table-cell>
        </table:table-row>
        <table:table-row>
          <table:covered-table-cell table:style-name="Table2.A6"/>
          <table:table-cell table:style-name="Table2.B2" office:value-type="string">
            <text:p text:style-name="P98">created_at</text:p>
          </table:table-cell>
          <table:table-cell table:style-name="Table2.C2" office:value-type="string">
            <text:p text:style-name="P99">TIMESTAMP DEFAULT CURRENT_TIMESTAMP</text:p>
          </table:table-cell>
          <table:table-cell table:style-name="Table2.D9" office:value-type="string">
            <text:p text:style-name="P99">TIMESTAMP DEFAULT CURRENT_TIMESTAMP</text:p>
          </table:table-cell>
        </table:table-row>
        <table:table-row>
          <table:table-cell table:style-name="Table2.A2" table:number-rows-spanned="5" office:value-type="string">
            <text:p text:style-name="P97">activity_logs</text:p>
          </table:table-cell>
          <table:table-cell table:style-name="Table2.B2" office:value-type="string">
            <text:p text:style-name="P98">id</text:p>
          </table:table-cell>
          <table:table-cell table:style-name="Table2.C2" office:value-type="string">
            <text:p text:style-name="P99">INT AUTO_INCREMENT PRIMARY KEY</text:p>
          </table:table-cell>
          <table:table-cell table:style-name="Table2.D10" office:value-type="string">
            <text:p text:style-name="P99">SERIAL PRIMARY KEY</text:p>
          </table:table-cell>
        </table:table-row>
        <table:table-row>
          <table:covered-table-cell table:style-name="Table2.A11"/>
          <table:table-cell table:style-name="Table2.B2" office:value-type="string">
            <text:p text:style-name="P98">user_id</text:p>
          </table:table-cell>
          <table:table-cell table:style-name="Table2.C2" office:value-type="string">
            <text:p text:style-name="P99">INT </text:p>
          </table:table-cell>
          <table:table-cell table:style-name="Table2.D11" office:value-type="string">
            <text:p text:style-name="P99">INTEGER</text:p>
          </table:table-cell>
        </table:table-row>
        <table:table-row>
          <table:covered-table-cell table:style-name="Table2.A11"/>
          <table:table-cell table:style-name="Table2.B2" office:value-type="string">
            <text:p text:style-name="P98">action_type</text:p>
          </table:table-cell>
          <table:table-cell table:style-name="Table2.C2" office:value-type="string">
            <text:p text:style-name="P99">VARCHAR(100<text:span text:style-name="T73">)</text:span></text:p>
          </table:table-cell>
          <table:table-cell table:style-name="Table2.D12" office:value-type="string">
            <text:p text:style-name="P99">VARCHAR(100)</text:p>
          </table:table-cell>
        </table:table-row>
        <table:table-row>
          <table:covered-table-cell table:style-name="Table2.A11"/>
          <table:table-cell table:style-name="Table2.B2" office:value-type="string">
            <text:p text:style-name="P98">metadata</text:p>
          </table:table-cell>
          <table:table-cell table:style-name="Table2.C2" office:value-type="string">
            <text:p text:style-name="P99">TEXT</text:p>
          </table:table-cell>
          <table:table-cell table:style-name="Table2.D13" office:value-type="string">
            <text:p text:style-name="P99">TEXT</text:p>
          </table:table-cell>
        </table:table-row>
        <table:table-row>
          <table:covered-table-cell table:style-name="Table2.A14"/>
          <table:table-cell table:style-name="Table2.B14" office:value-type="string">
            <text:p text:style-name="P98">occured_at</text:p>
          </table:table-cell>
          <table:table-cell table:style-name="Table2.C14" office:value-type="string">
            <text:p text:style-name="P99">TIMESTAMP DEFAULT CURRENT_TIMESTAMP</text:p>
          </table:table-cell>
          <table:table-cell table:style-name="Table2.D14" office:value-type="string">
            <text:p text:style-name="P99">TIMESTAMP DEFAULT CURRENT_TIMESTAMP</text:p>
          </table:table-cell>
        </table:table-row>
      </table:table>
      <text:list text:style-name="L6">
        <text:list-header>
          <text:p text:style-name="P100">Генерисано је случајним одабиром по <text:span text:style-name="T75">5</text:span>.000 редова у табели<text:span text:style-name="T28"> users</text:span>, <text:span text:style-name="T75">0-10 </text:span>по <text:span text:style-name="T75">реду у табели </text:span><text:span text:style-name="T28">users</text:span> редова у табели<text:span text:style-name="T28"> transactions</text:span> и по<text:span text:style-name="T75"> 0-10</text:span> редова у табели<text:span text:style-name="T28"> activity_logs </text:span>за сваки ред у табели u<text:span text:style-name="T28">sers.</text:span></text:p>
        </text:list-header>
      </text:list>
      <text:p text:style-name="P101">У наставку дајемо примере команди са резултатима који враћају <text:span text:style-name="T28">MySQL </text:span>и <text:span text:style-name="T28">PostgreSQL.</text:span></text:p>
      <text:list xml:id="list265792099" text:style-name="L7">
        <text:list-item>
          <text:p text:style-name="P102">Пример резултата команде EXPLAIN, за упит SELECT * FROM users:</text:p>
          <text:list>
            <text:list-item>
              <text:p text:style-name="P103"><text:soft-page-break/>MySQL - Table scan on users <text:s/>(cost=499 rows=4915), <text:span text:style-name="T30">где </text:span>cost<text:span text:style-name="T30"> представља интерну цену пита и зависи од односа </text:span>I/O<text:span text:style-name="T30"> наспрам </text:span>CPU.</text:p>
            </text:list-item>
            <text:list-item>
              <text:p text:style-name="P103">PostgreSQL - Seq Scan on users <text:s/>(cost=0.00..109.00 rows=5000 width=62), <text:span text:style-name="T30">где је 0.00 почетна цена започињања извршавања упита, а </text:span><text:span text:style-name="T76">109.</text:span><text:span text:style-name="T30">00 цена укупног извршавања упита.</text:span></text:p>
            </text:list-item>
          </text:list>
        </text:list-item>
        <text:list-item>
          <text:p text:style-name="P104">Пример резултата команде EXPLAIN ANALYZE, за упит SELECT * FROM users:</text:p>
          <text:list>
            <text:list-item>
              <text:p text:style-name="P105">MySQL - (actual time=0.037..5.03 rows=5000 loops=1)<text:span text:style-name="T77">, након првог покретања упита. (actual time=0.0303..5.53 rows=5000 loops=1), након трећег покретања упита.</text:span></text:p>
            </text:list-item>
            <text:list-item>
              <text:p text:style-name="P106"><text:span text:style-name="T78">PostgreSQL - (actual time=0.028..0.938 rows=5000.00 loops=1)</text:span><text:span text:style-name="T79">, након првог покретања упита</text:span><text:span text:style-name="T80">, </text:span><text:span text:style-name="T81">а </text:span><text:span text:style-name="T78">PostgreSQL</text:span><text:span text:style-name="T81"> пружа и информације о баферима(</text:span><text:span text:style-name="T80">shared hit = 59</text:span><text:span text:style-name="T81">), времену потребном за планирање</text:span><text:span text:style-name="T80">(0.055ms)</text:span><text:span text:style-name="T81"> и времену потребном за извршење(</text:span><text:span text:style-name="T80">1.184 ms</text:span><text:span text:style-name="T81">)</text:span><text:span text:style-name="T79">. (actual time=0.011..0.304 rows=5000.00 loops=1), након трећег покретања упита</text:span><text:span text:style-name="T80">, shared hit = 59, </text:span><text:span text:style-name="T81">време за планирање 0.041</text:span><text:span text:style-name="T82">ms</text:span><text:span text:style-name="T81">, време извршења 0.465</text:span><text:span text:style-name="T82">ms</text:span><text:span text:style-name="T79">.</text:span></text:p>
            </text:list-item>
          </text:list>
        </text:list-item>
        <text:list-item>
          <text:p text:style-name="P107">SELECT * FROM users WHERE id &gt; 0</text:p>
          <text:list>
            <text:list-item>
              <text:p text:style-name="P105">MySQL - <text:span text:style-name="T77">-&gt; Filter: (users.id &gt; 0) <text:s/>(cost=492 rows=2457) (actual time=0.0919..3.57 rows=5000 loops=1)<text:line-break/> <text:s text:c="3"/>-&gt; Index range scan on users using PRIMARY over (0 &lt; id) <text:s/>(cost=492 rows=2457) (actual time=0.0722..3.08 rows=5000 loops=1)</text:span></text:p>
            </text:list-item>
            <text:list-item>
              <text:p text:style-name="P108">PostgreSQL - Seq Scan on users <text:s/>(cost=0.00..121.50 rows=5000 width=62) (actual time=0.930..1.744 rows=5000.00 loops=1)</text:p>
            </text:list-item>
          </text:list>
        </text:list-item>
        <text:list-item>
          <text:p text:style-name="P108">SELECT * FROM users WHERE preferences-&gt;"$.theme" = "dark"</text:p>
          <text:list>
            <text:list-item>
              <text:p text:style-name="P109">MySQL - -&gt; Filter: (json_extract(users.preferences,'$.theme') = 'dark') <text:s/>(cost=499 rows=4915) (actual time=4.44..8.69 rows=2546 loops=1)<text:line-break/> <text:s text:c="3"/>-&gt; Table scan on users <text:s/>(cost=499 rows=4915) (actual time=0.0296..2.84 rows=5000 loops=1)</text:p>
            </text:list-item>
            <text:list-item>
              <text:p text:style-name="P109">PostgreSQL - Bitmap Heap Scan on users <text:s/>(cost=26.28..117.10 rows=2546 width=62) (actual time=1.045..1.721 rows=2546.00 loops=1)<text:span text:style-name="T30">, а претходно смо креирали инвертовани индекс командом CREATE INDEX idx_gin_prefs ON users USING GIN (preferences);</text:span></text:p>
            </text:list-item>
          </text:list>
        </text:list-item>
        <text:list-item>
          <text:p text:style-name="P109"><text:soft-page-break/>SELECT u.username, SUM(t.amount) as total_spent FROM users u JOIN transactions t ON u.id = t.user_id WHERE u.preferences-&gt;"$.theme" = 'dark' AND t.status = 'completed' GROUP BY u.username ORDER BY total_spent DESC LIMIT 10</text:p>
          <text:list>
            <text:list-item>
              <text:p text:style-name="P109">MySQL - -&gt; Limit: 10 row(s) <text:s/>(actual time=55.3..55.3 rows=10 loops=1)<text:line-break/> <text:s text:c="3"/>-&gt; Sort: total_spent DESC, limit input to 10 row(s) per chunk <text:s/>(actual time=55.3..55.3 rows=10 loops=1)<text:line-break/> <text:s text:c="7"/>-&gt; Table scan on &lt;temporary&gt; <text:s/>(actual time=53.9..54.1 rows=1921 loops=1)<text:line-break/> <text:s text:c="11"/>-&gt; Aggregate using temporary table <text:s/>(actual time=53.9..53.9 rows=1921 loops=1)<text:line-break/> <text:s text:c="15"/>-&gt; Nested loop inner join <text:s/>(cost=5379 rows=8237) (actual time=1.99..27.6 rows=4377 loops=1)<text:line-break/> <text:s text:c="19"/>-&gt; Filter: ((t.`status` = 'completed') and (t.user_id is not null)) <text:s/>(cost=2495 rows=8237) (actual time=1.92..16.6 rows=8398 loops=1)<text:line-break/> <text:s text:c="23"/>-&gt; Table scan on t <text:s/>(cost=2495 rows=24712) (actual time=1.91..13.2 rows=25247 loops=1)<text:line-break/> <text:s text:c="19"/>-&gt; Filter: (json_extract(u.preferences,'$.theme') = 'dark') <text:s/>(cost=0.25 rows=1) (actual time=0.00116..0.0012 rows=0.521 loops=8398)<text:line-break/> <text:s text:c="23"/>-&gt; Single-row index lookup on u using PRIMARY (id = t.user_id) <text:s/>(cost=0.25 rows=1) (actual time=752e-6..774e-6 rows=1 loops=8398)</text:p>
            </text:list-item>
            <text:list-item>
              <text:p text:style-name="P109">PostgreSQL - -&gt; Limit <text:s/>(cost=669.27..669.29 rows=10 width=47) (actual time=34.718..34.743 rows=10.00 loops=1) <text:s text:c="2"/><text:line-break/><text:tab/>-&gt; <text:s/>Sort <text:s/>(cost=669.27..669.33 rows=25 width=47) (actual time=34.716..34.739 rows=10.00 loops=1)<text:line-break/><text:tab/><text:tab/>-&gt; <text:s/>GroupAggregate <text:s/>(cost=668.10..668.73 rows=25 width=47) (actual time=30.819..32.465 rows=1921.00 loops=1)<text:line-break/><text:tab/><text:tab/><text:tab/>-&gt; <text:s/>Sort <text:s/>(cost=668.10..668.20 rows=42 width=21) (actual time=30.678..30.942 rows=4377.00 loops=1)<text:line-break/><text:tab/><text:tab/><text:tab/><text:tab/>-&gt; <text:s/>Hash Join <text:s/>(cost=134.31..666.97 rows=42 width=21) (actual time=11.147..21.178 rows=4377.00 loops=1)<text:line-break/><text:tab/><text:tab/><text:tab/><text:tab/><text:tab/>-&gt; <text:s/>Seq Scan on transactions t <text:s/>(cost=0.00..510.59 rows=8398 width=10) (actual time=0.062..8.780 rows=8398.00 loops=1)<text:line-break/><text:tab/><text:tab/><text:tab/><text:tab/><text:tab/><text:tab/>-&gt; <text:s/>Hash <text:s/>(cost=134.00..134.00 rows=25 width=19) (actual time=10.040..10.041 rows=2546.00 loops=1)<text:line-break/><text:tab/><text:tab/><text:tab/><text:tab/><text:tab/><text:tab/><text:tab/>-&gt; <text:s/>Seq Scan on users u <text:s/>(cost=0.00..134.00 rows=25 width=19) (actual time=0.795..1.837 rows=2546.00 loops=1)</text:p>
            </text:list-item>
          </text:list>
        </text:list-item>
      </text:list>
      <text:list text:style-name="L8">
        <text:list-item>
          <text:list>
            <text:list-item>
              <text:p text:style-name="P110">У овом примеру видимо главну разлику између <text:span text:style-name="T28">MySQL </text:span>и <text:span text:style-name="T28">PostgreSQL -a</text:span>, односно разлику између Hash Join и<text:span text:style-name="T28"> Nested Loop</text:span>. <text:span text:style-name="T28">MySQL</text:span> је користио <text:span text:style-name="T28">Nested Loop</text:span> и приступао чак 8,398 пута табели <text:span text:style-name="T28">users</text:span>, док је <text:span text:style-name="T28">PostgreSQL</text:span> користио <text:s/>Hash Join, прошао једном кроз табелу <text:span text:style-name="T28">users</text:span>, направио хеш мапу и онда једном прошао кроз табелу <text:span text:style-name="T28">transactions</text:span>. <text:span text:style-name="T28">MySQL</text:span> -у је требало 42.4 <text:span text:style-name="T28">ms</text:span>, док је <text:s/><text:span text:style-name="T28">PostgreSQL -</text:span>у требало 34.74 <text:span text:style-name="T28">ms</text:span> што је уштеда од 18%.</text:p>
            </text:list-item>
          </text:list>
        </text:list-item>
      </text:list>
      <text:list text:continue-list="list265792099" text:style-name="L7">
        <text:list-item>
          <text:p text:style-name="P111"><text:soft-page-break/>SELECT u.username, SUM(t.amount) as total_spent<text:line-break/>FROM users u JOIN transactions t ON u.id = t.user_id WHERE u.preferences-&gt;"$.theme" = 'dark' AND t.status = 'completed' GROUP BY u.username</text:p>
          <text:list>
            <text:list-item>
              <text:p text:style-name="P112">MySQL - (actual time=31.9..32.1 rows=1921 loops=1)</text:p>
            </text:list-item>
            <text:list-item>
              <text:p text:style-name="P112">PostgreSQL - (actual time=15.065..20.087 rows=1921.00 loops=1)</text:p>
            </text:list-item>
            <text:list-item>
              <text:p text:style-name="P111">У овом примеру смо укинули сортирање и лимитирање броја редова и можемо видети још већу предност <text:span text:style-name="T28">PostgreSQL </text:span>-а над <text:span text:style-name="T28">MySQL</text:span> -ом.</text:p>
            </text:list-item>
          </text:list>
        </text:list-item>
        <text:list-item>
          <text:p text:style-name="P111">SELECT username FROM users WHERE id IN (SELECT user_id <text:span text:style-name="T28">FROM</text:span><text:span text:style-name="T83"> </text:span><text:span text:style-name="T28">transactions</text:span> WHERE amount &gt; 100 AND EXTRACT(DAY FROM (NOW() -<text:span text:style-name="T83"> </text:span>created_at)) &lt;= 7)</text:p>
          <text:list>
            <text:list-item>
              <text:p text:style-name="P113">MySQL - Nested loop inner join <text:s/>(cost=4.05e+6 rows=40.5e+6) (actual time=22.6..27.7 rows=3283 loops=1)</text:p>
            </text:list-item>
            <text:list-item>
              <text:p text:style-name="P113">PostgreSQL - Hash Right Semi Join <text:s/>(cost=171.50..1102.93 rows=4558 width=15) (actual time=2.593..15.817 rows=3452.00 loops=1)</text:p>
            </text:list-item>
          </text:list>
        </text:list-item>
        <text:list-item>
          <text:p text:style-name="P113">SELECT u.username, t.amount, t.created_at<text:span text:style-name="T84"> </text:span>FROM transactions t<text:span text:style-name="T84"> </text:span>JOIN users u ON<text:span text:style-name="T84"> </text:span>t.user_id = u.id<text:span text:style-name="T84"> </text:span>WHERE t.id = 4500</text:p>
          <text:list>
            <text:list-item>
              <text:p text:style-name="P114">MySQL - Rows fetched before execution <text:s/>(cost=0..0 rows=1) (actual time=200e-6..300e-6 rows=1 loops=1)</text:p>
            </text:list-item>
            <text:list-item>
              <text:p text:style-name="P114">PostgreSQL - -&gt; Nested Loop <text:s/>(cost=0.57..16.61 rows=1 width=29) (actual time=0.009..0.010 rows=0.00 loops=1)<text:line-break/><text:tab/>-&gt; <text:s/>Index Scan using transactions_pkey on transactions t <text:s/>(cost=0.29..8.30 rows=1 width=18) (actual time=0.008..0.009 rows=0.00 loops=1)<text:line-break/><text:tab/><text:tab/>-&gt; <text:s/>Index Scan using users_pkey on users u <text:s/>(cost=0.28..8.30 rows=1 width=19) (never executed)</text:p>
            </text:list-item>
            <text:list-item>
              <text:p text:style-name="P115">У овом примеру симулирамо упит који подсећа на упит преко <text:span text:style-name="T28">REST</text:span> АПИ -ја. Овде видимо главну предност <text:span text:style-name="T28">MySQL -</text:span>а над <text:span text:style-name="T28">PostgreSQL</text:span> -ом. <text:span text:style-name="T28">MySQL</text:span> податке физички организује у структуру Б+ стабла примарног кључа, што елиминише потребу за додатним читањем са диска које је неопходно код <text:s/><text:span text:style-name="T28">PostgreSQL</text:span> -а.</text:p>
            </text:list-item>
          </text:list>
        </text:list-item>
        <text:list-item>
          <text:p text:style-name="P115">SELECT user_id FROM transactions;</text:p>
          <text:list>
            <text:list-item>
              <text:p text:style-name="P116">MySQL - Covering index scan on transactions using fk_user <text:s/>(cost=2495 rows=24712) (actual time=0.301..5.56 rows=25247 loops=1)</text:p>
            </text:list-item>
            <text:list-item>
              <text:p text:style-name="P116"><text:soft-page-break/>PostgreSQL - Seq Scan on transactions <text:s/>(cost=0.00..447.47 rows=25247 width=4) (actual time=0.014..2.673 rows=25247.00 loops=1)</text:p>
            </text:list-item>
            <text:list-item>
              <text:p text:style-name="P117">У овом примеру прибављамо само вредности колоне која је индексирана. И овде видимо да је <text:span text:style-name="T28">PostgreSQL</text:span> бољи, јер <text:span text:style-name="T28">MySQL </text:span>све податке везује за примарни кључ и мора приступати преко њега, док <text:span text:style-name="T28">PostgreSQL</text:span> има свој индекси фајл кога само прочита.</text:p>
            </text:list-item>
          </text:list>
        </text:list-item>
        <text:list-item>
          <text:p text:style-name="P117">DELETE FROM activity_logs WHERE id % 5 != 0<text:span text:style-name="T85">; SELECT COUNT(*) FROM activity_logs;</text:span></text:p>
          <text:list>
            <text:list-item>
              <text:p text:style-name="P116">MySQL<text:span text:style-name="T86">: </text:span><text:span text:style-name="T87">процењени трошак пре извршења команде: </text:span><text:span text:style-name="T86">5489</text:span><text:span text:style-name="T87">, процењени трошак након извршења команде:</text:span><text:span text:style-name="T86"> 1113</text:span><text:span text:style-name="T87">.</text:span></text:p>
            </text:list-item>
            <text:list-item>
              <text:p text:style-name="P116">PostgreSQL - <text:span text:style-name="T30">погодака у баферу пре извршења команде: </text:span>2311<text:span text:style-name="T30">, погодака у баферу након извршења команде: 2311, погодака у баферу након покретања процеса</text:span> VACUUM<text:span text:style-name="T30">:</text:span> 44<text:span text:style-name="T30">.</text:span></text:p>
            </text:list-item>
            <text:list-item>
              <text:p text:style-name="P118">Овде не видимо директну предност ни једног ДБМС -а, јер све зависи шта нам треба. <text:span text:style-name="T28">PostgreSQL</text:span> изврши брисање доста брже, јер само означи редове као обрисане, а када се покрене процес <text:span text:style-name="T28">VACUUM</text:span> тек онда заиста обрише и реорганизује преостале редове, док их <text:span text:style-name="T28">MySQL</text:span> заиста брише и реорганизује преостале редове. У ситуацијама када нам после великог брисања треба брзо читање, <text:span text:style-name="T28">MySQL</text:span> је бољи, док је <text:span text:style-name="T28">PostgreSQL </text:span>бољи, ако нам не треба одмах читање, јер ће он покретање <text:span text:style-name="T28">VACUUM</text:span> процеса одложити када се смањи оптерећење над базом.</text:p>
            </text:list-item>
          </text:list>
        </text:list-item>
      </text:list>
      <text:h text:style-name="P119" text:outline-level="1"><text:bookmark-start text:name="__RefHeading___Toc8802_2913585186 Copy 2"/>Закључак<text:bookmark-end text:name="__RefHeading___Toc8802_2913585186 Copy 2"/></text:h>
      <text:p text:style-name="P120"><text:span text:style-name="T88">Циљ овог рада је упоредити перформансе два директна конкурента на тржишту система за управљање релационим базама података коришћењем команде </text:span><text:span text:style-name="T89">EXPLAIN ANALYZE</text:span><text:span text:style-name="T88">. </text:span>У овом раду смо у првом поглављу <text:span text:style-name="T90">дефинисали шта су ДБМС -ови, упити и трансакције, а затим смо објаснили разлику између људских и машинских ресурса које користе ДБМС -ови и како морају да балансирају између њих, а на крају смо и дали дефиницију процесуирања упита и редослед корака код обраде упита. У следећем поглављу смо представили по потпоглављима кораке и детљано их објаснили, а и самим тим делове, од којих се састоји процесор упита у </text:span><text:span text:style-name="T91">PostgreSQL</text:span><text:span text:style-name="T90"> -у. Наредно поглавље се бави истом тематиком, али на конкретном примеру </text:span><text:span text:style-name="T91">MySQL</text:span><text:span text:style-name="T90"> -а. Четврто поглавље обрађује детаљно синтаксу команде </text:span><text:span text:style-name="T91">EXPLAIN</text:span><text:span text:style-name="T90"> и у </text:span><text:span text:style-name="T91">PostgreSQL</text:span><text:span text:style-name="T90"> -у и у </text:span><text:span text:style-name="T91">MySQL</text:span><text:span text:style-name="T90"> -у. А последње поглавље је срж овог рада и бави се директним поређењем перформанси и начина извршења упита у ова два ДБМС -а.</text:span></text:p>
      <text:p text:style-name="P121">Као што смо и продискутовали у петом поглављу, <text:span text:style-name="T28">MySQL</text:span> показује изузетне перформансе <text:span text:style-name="T92">када се слоговима приступа директно преко примарног кључа, што је кључно у применама код </text:span><text:span text:style-name="T93">REST API</text:span><text:span text:style-name="T92"> -ја. Док са друге стране, </text:span><text:span text:style-name="T28">PostgreSQL</text:span> <text:span text:style-name="T92">показује боље перформансе код филтрирања и филтрирања по </text:span><text:span text:style-name="T93">JSON</text:span><text:span text:style-name="T92"> атрибутима у дубину. Операција споја, где на конкретном примеру видимо дуел </text:span><text:span text:style-name="T94">између Hash Join и</text:span><text:span text:style-name="T95"> Nested Loop</text:span><text:span text:style-name="T92">, а са искључивањем сортирања и лимитирања броја редова показује праву надмоћ </text:span><text:span text:style-name="T28">PostgreSQL</text:span><text:span text:style-name="T92"> -а над </text:span><text:span text:style-name="T28">MySQL</text:span><text:span text:style-name="T92"> -ом. Прибављање само страних кључева, односно индексиране колоне је знатно брже у <text:s/></text:span><text:span text:style-name="T28">PostgreSQL</text:span><text:span text:style-name="T92"> -у, обзиром да он има <text:s/></text:span><text:span text:style-name="T96">свој индекси фајл кога само прочита</text:span><text:span text:style-name="T92">. Код брисања редова, резултати су поприлично изједначени, односно сваки ДБМС од ових показује боље перформансе у зависности од случаја коришћења.</text:span><text:span text:style-name="T88"> Још један јакон битан факотор у овој борби, а који се не види тако очигледно, је и квалитет саме документације. По мом личном мишљењу, </text:span><text:span text:style-name="T89">PostgreSQL</text:span><text:span text:style-name="T88"> има знатно бољу документацију у којој је много лакше снаћи се, а и објективно гледано, команда </text:span><text:span text:style-name="T89">EXPLAIN</text:span><text:span text:style-name="T88"> даје више детаља.</text:span></text:p>
      <text:p text:style-name="P122">Предлози за унапређење овог рада су континуирано праћење нових верзија ових ДБМС -ова и поређење перформанси, додавање нових ДБМС -ова у поређење, проширивање упита над којима се обавља поређење, промена конфигурационих параметара за максимално извлачење перформанси са конкретне случајеве коришћења, промена оперативних система, њихових параметара и хардвера над којим ће се извршавати поређење. Крајњи закључак ко је победник у овој борби се не може донети уопштено, већ зависи од конкретног случаја коришћења, типа и количине података и стања у коме се тренутно налази ДБМС.</text:p>
      <text:p text:style-name="P121"/>
      <text:h text:style-name="P123" text:outline-level="1"><text:bookmark-start text:name="__RefHeading___Toc12644_3546172039"/>Литература<text:bookmark-end text:name="__RefHeading___Toc12644_3546172039"/></text:h>
      <text:list text:style-name="WWNum2">
        <text:list-item>
          <text:p text:style-name="P124">Sasha Pachev, "Understanding MySQL Internals", <text:span text:style-name="T30">1. издање, </text:span>O'Reilly Media,<text:span text:style-name="T30"> 2007.</text:span></text:p>
        </text:list-item>
        <text:list-item>
          <text:p text:style-name="P125">https://dev.mysql.com</text:p>
        </text:list-item>
        <text:list-item>
          <text:p text:style-name="P125">https://www.postgresql.org/docs/<text:span text:style-name="T97">18</text:span></text:p>
        </text:list-item>
        <text:list-item>
          <text:p text:style-name="P126">https://blog.devops.dev/mysql-basic-architecture-how-is-a-sql-query-executed-0fc42203e97f</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134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fo:hyphenation-keep="auto" loext:hyphenation-keep-type="column" loext:hyphenation-keep-line="false"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Standard" style:default-outline-level="1" style:class="chapter">
      <style:paragraph-properties fo:margin-left="1.302cm" fo:margin-right="0cm" fo:margin-top="0.15cm" fo:margin-bottom="0cm" style:contextual-spacing="false" fo:text-indent="-0.954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chapter">
      <style:paragraph-properties fo:margin-left="1.111cm" fo:margin-right="0cm" fo:text-indent="-0.764cm" style:auto-text-indent="false"/>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class="chapter">
      <style:paragraph-properties fo:margin-top="0.125cm" fo:margin-bottom="0cm" style:contextual-spacing="false"/>
      <style:text-properties fo:font-size="14pt" style:font-size-asian="14pt" style:font-size-complex="14pt"/>
    </style:style>
    <style:style style:name="Heading_20_4" style:display-name="Heading 4" style:family="paragraph" style:parent-style-name="Standard" style:default-outline-level="4" style:list-style-name="" style:class="chapter">
      <style:paragraph-properties fo:margin-left="0.349cm" fo:margin-right="0cm" fo:text-indent="0cm" style:auto-text-indent="false"/>
      <style:text-properties fo:font-size="12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1" style:display-name="Contents 1" style:family="paragraph" style:parent-style-name="Standard" style:default-outline-level="" style:class="index">
      <style:paragraph-properties fo:margin-left="0cm" fo:margin-right="0.335cm" fo:margin-top="0.496cm" fo:margin-bottom="0cm" style: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Contents_20_2" style:display-name="Contents 2" style:family="paragraph" style:parent-style-name="Standard" style:default-outline-level="" style:class="index">
      <style:paragraph-properties fo:margin-left="1.205cm" fo:margin-right="0cm" fo:margin-top="0.222cm" fo:margin-bottom="0cm" style:contextual-spacing="false" fo:text-indent="-0.848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Standard" style:default-outline-level="" style:class="index">
      <style:paragraph-properties fo:margin-left="1.903cm" fo:margin-right="0cm" fo:text-indent="-1.132cm" style:auto-text-indent="false"/>
      <style:text-properties fo:font-size="12pt" style:font-size-asian="12pt" style:font-size-complex="12pt"/>
    </style:style>
    <style:style style:name="List_20_Paragraph" style:display-name="List Paragraph" style:family="paragraph" style:parent-style-name="Standard" style:default-outline-level="">
      <style:paragraph-properties fo:margin-left="0.984cm" fo:margin-right="0cm" fo:text-indent="-0.635cm" style:auto-text-indent="false"/>
    </style:style>
    <style:style style:name="Table_20_Paragraph" style:display-name="Table Paragraph" style:family="paragraph" style:parent-style-name="Standard" style:default-outline-level="">
      <style:paragraph-properties fo:margin-left="0.189cm" fo:margin-right="0cm" fo:line-height="0.452cm"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 style:family="paragraph" style:parent-style-name="Standard" style:default-outline-level="">
      <style:paragraph-properties fo:margin-left="0cm" fo:margin-right="0cm" fo:margin-top="0.494cm" fo:margin-bottom="0.494cm" style:contextual-spacing="false" fo:text-align="justify" style:justify-single-word="false" fo:orphans="2" fo:widows="2" fo:text-indent="1.27cm" style:auto-text-indent="false"/>
      <style:text-properties fo:font-size="12pt" style:font-size-asian="12pt" style:font-size-complex="12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fo:orphans="2" fo:widows="2"/>
      <style:text-properties fo:font-size="12pt" style:font-size-asian="12pt" style:font-size-complex="12pt"/>
    </style:style>
    <style:style style:name="TOC_20_Heading" style:display-name="TOC Heading" style:family="paragraph" style:parent-style-name="Index_20_Heading" style:next-style-name="Standard" style:default-outline-level="" style:list-style-name="">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4f81bd" loext:opacity="100%" fo:font-size="9pt" fo:font-weight="bold" style:font-size-asian="9pt" style:font-weight-asian="bold" style:font-size-complex="9pt" style:font-weight-complex="bold"/>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ing" style:next-style-name="Text_20_body" style:default-outline-level="9" style:list-style-name="" style:class="chapter">
      <style:paragraph-properties fo:margin-top="0.106cm" fo:margin-bottom="0.106cm" style:contextual-spacing="false"/>
      <style:text-properties fo:font-size="10.5pt" fo:font-weight="bold" style:font-size-asian="10.5pt" style:font-weight-asian="bold" style:font-size-complex="10.5pt" style:font-weight-complex="bold"/>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Слика" style:family="paragraph" style:parent-style-name="Caption" style:default-outline-level=""/>
    <style:style style:name="Table_20_Contents" style:display-name="Table Contents" style:family="paragraph" style:parent-style-name="Standard" style:default-outline-level="" style:class="extra">
      <style:paragraph-properties fo:orphans="0" fo:widows="0" text:number-lines="false" text:line-number="0"/>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normaltextrun" style:family="text" style:parent-style-name="Default_20_Paragraph_20_Font"/>
    <style:style style:name="eop" style:family="text" style:parent-style-name="Default_20_Paragraph_20_Font"/>
    <style:style style:name="tabchar"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Symbol" style:font-family-complex="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Symbol" style:font-family-complex="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Symbol" style:font-family-complex="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Symbol" style:font-family-complex="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Symbol" style:font-family-complex="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Symbol" style:font-family-complex="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Symbol" style:font-family-complex="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Symbol" style:font-family-complex="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Symbol" style:font-family-complex="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Symbol" style:font-family-complex="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Symbol" style:font-family-complex="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complex="Symbol" style:font-family-complex="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complex="Symbol" style:font-family-complex="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OpenSymbol1" style:font-family-complex="OpenSymbol" style:font-family-generic-complex="system" style:font-pitch-complex="variable"/>
    </style:style>
    <style:style style:name="ListLabel_20_390" style:display-name="ListLabel 390" style:family="text">
      <style:text-properties style:font-name-complex="OpenSymbol1" style:font-family-complex="OpenSymbol"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OpenSymbol1" style:font-family-complex="OpenSymbol" style:font-family-generic-complex="system" style:font-pitch-complex="variable"/>
    </style:style>
    <style:style style:name="ListLabel_20_393" style:display-name="ListLabel 393" style:family="text">
      <style:text-properties style:font-name-complex="OpenSymbol1" style:font-family-complex="OpenSymbol"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OpenSymbol1" style:font-family-complex="OpenSymbol" style:font-family-generic-complex="system" style:font-pitch-complex="variable"/>
    </style:style>
    <style:style style:name="ListLabel_20_396" style:display-name="ListLabel 396" style:family="text">
      <style:text-properties style:font-name-complex="OpenSymbol1" style:font-family-complex="OpenSymbol" style:font-family-generic-complex="system" style:font-pitch-complex="variable"/>
    </style:style>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Symbol" style:font-family-complex="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Symbol" style:font-family-complex="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style:font-name-complex="Symbol" style:font-family-complex="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Symbol" style:font-family-complex="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Symbol" style:font-family-complex="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style:font-name-complex="Symbol" style:font-family-complex="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Symbol" style:font-family-complex="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Symbol" style:font-family-complex="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Symbol" style:font-family-complex="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Symbol" style:font-family-complex="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Symbol" style:font-family-complex="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Symbol" style:font-family-complex="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Symbol" style:font-family-complex="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Symbol" style:font-family-complex="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omplex="Symbol" style:font-family-complex="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Symbol" style:font-family-complex="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Symbol" style:font-family-complex="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omplex="Symbol" style:font-family-complex="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Symbol" style:font-family-complex="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Symbol" style:font-family-complex="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omplex="Symbol" style:font-family-complex="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Symbol" style:font-family-complex="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Symbol" style:font-family-complex="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omplex="Symbol" style:font-family-complex="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Symbol" style:font-family-complex="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Symbol" style:font-family-complex="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omplex="Symbol" style:font-family-complex="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Symbol" style:font-family-complex="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Symbol" style:font-family-complex="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omplex="Symbol" style:font-family-complex="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Symbol" style:font-family-complex="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Symbol" style:font-family-complex="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omplex="Symbol" style:font-family-complex="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Symbol" style:font-family-complex="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Symbol" style:font-family-complex="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omplex="Symbol" style:font-family-complex="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Symbol" style:font-family-complex="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Symbol" style:font-family-complex="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omplex="Symbol" style:font-family-complex="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Symbol" style:font-family-complex="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Symbol" style:font-family-complex="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omplex="Symbol" style:font-family-complex="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Symbol" style:font-family-complex="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Symbol" style:font-family-complex="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omplex="Symbol" style:font-family-complex="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Symbol" style:font-family-complex="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Symbol" style:font-family-complex="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omplex="Symbol" style:font-family-complex="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Symbol" style:font-family-complex="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Symbol" style:font-family-complex="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omplex="Symbol" style:font-family-complex="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Symbol" style:font-family-complex="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Symbol" style:font-family-complex="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omplex="Symbol" style:font-family-complex="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Symbol" style:font-family-complex="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Symbol" style:font-family-complex="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omplex="Symbol" style:font-family-complex="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Symbol" style:font-family-complex="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Symbol" style:font-family-complex="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omplex="Symbol" style:font-family-complex="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Symbol" style:font-family-complex="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Symbol" style:font-family-complex="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omplex="Symbol" style:font-family-complex="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Symbol" style:font-family-complex="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Symbol" style:font-family-complex="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omplex="Symbol" style:font-family-complex="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Symbol" style:font-family-complex="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Symbol" style:font-family-complex="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omplex="Symbol" style:font-family-complex="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Symbol" style:font-family-complex="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Symbol" style:font-family-complex="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omplex="Symbol" style:font-family-complex="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Symbol" style:font-family-complex="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Symbol" style:font-family-complex="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omplex="Symbol" style:font-family-complex="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Symbol" style:font-family-complex="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Symbol" style:font-family-complex="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omplex="Symbol" style:font-family-complex="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Symbol" style:font-family-complex="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Symbol" style:font-family-complex="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omplex="Symbol" style:font-family-complex="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Symbol" style:font-family-complex="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Symbol" style:font-family-complex="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omplex="Symbol" style:font-family-complex="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Symbol" style:font-family-complex="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Symbol" style:font-family-complex="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omplex="Symbol" style:font-family-complex="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Symbol" style:font-family-complex="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Symbol" style:font-family-complex="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omplex="Symbol" style:font-family-complex="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Symbol" style:font-family-complex="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Symbol" style:font-family-complex="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omplex="Symbol" style:font-family-complex="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Symbol" style:font-family-complex="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Symbol" style:font-family-complex="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omplex="Symbol" style:font-family-complex="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Symbol" style:font-family-complex="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Symbol" style:font-family-complex="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omplex="Symbol" style:font-family-complex="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Symbol" style:font-family-complex="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Symbol" style:font-family-complex="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Symbol" style:font-family-complex="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Symbol" style:font-family-complex="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Symbol" style:font-family-complex="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Symbol" style:font-family-complex="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Symbol" style:font-family-complex="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Symbol" style:font-family-complex="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Symbol" style:font-family-complex="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Symbol" style:font-family-complex="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Symbol" style:font-family-complex="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2%.%3%.%4%]" style:num-prefix="["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3%.%4%.%5%]" style:num-prefix="["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4%.%5%.%6%]" style:num-prefix="["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5%.%6%.%7%]" style:num-prefix="["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6%.%7%.%8%]" style:num-prefix="["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7%.%8%.%9%]" style:num-prefix="["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4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7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0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1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2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3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4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5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6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6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7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48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9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0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1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2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3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4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5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5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6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7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58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59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0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1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2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63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64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64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6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66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67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68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69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0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1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2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3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74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loext:graphic-properties draw:fill="none"/>
      <style:paragraph-properties fo:margin-left="0cm" fo:margin-right="0cm" fo:margin-top="0cm" fo:margin-bottom="0cm" style:contextual-spacing="false" fo:text-align="start" style:justify-single-word="false" fo:orphans="0" fo:widows="0" fo:hyphenation-ladder-count="no-limit" fo:hyphenation-keep="auto" loext:hyphenation-keep-type="column" loext:hyphenation-keep-line="false" fo:text-indent="0cm" style:auto-text-indent="false" style:page-number="auto" fo:background-color="transparent" style:punctuation-wrap="simple" style:writing-mode="lr-tb">
        <style:tab-stops>
          <style:tab-stop style:position="8.255cm" style:type="center"/>
          <style:tab-stop style:position="16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8.255cm" style:type="center"/>
          <style:tab-stop style:position="17cm" style:type="right"/>
        </style:tab-stops>
      </style:paragraph-properties>
    </style:style>
    <style:style style:name="MP4" style:family="paragraph" style:parent-style-name="Header">
      <style:paragraph-properties>
        <style:tab-stops>
          <style:tab-stop style:position="8.255cm" style:type="center"/>
          <style:tab-stop style:position="15.997cm" style:type="right"/>
        </style:tab-stops>
      </style:paragraph-properties>
    </style:style>
    <style:style style:name="MT1" style:family="text">
      <style:text-properties fo:language="sr" fo:country="RS" officeooo:rsid="00428376" style:font-name-asian="Times New Roman1" style:font-name-complex="Times New Roman1"/>
    </style:style>
    <style:style style:name="MT2" style:family="text">
      <style:text-properties fo:language="sr" fo:country="RS" style:font-name-asian="Times New Roman1" style:font-name-complex="Times New Roman1"/>
    </style:style>
    <style:style style:name="MT3" style:family="text">
      <style:text-properties fo:language="sr" fo:country="RS" officeooo:rsid="00605377" style:font-name-asian="Times New Roman1" style:font-name-complex="Times New Roman1"/>
    </style:style>
    <style:style style:name="MT4" style:family="text">
      <style:text-properties fo:language="sr" fo:country="RS" officeooo:rsid="004c0761" style:font-name-asian="Times New Roman1" style:font-name-complex="Times New Roman1"/>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14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13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94cm" fo:margin-left="0cm" fo:margin-right="0cm" fo:margin-bottom="0.995cm" style:dynamic-spacing="true"/>
      </style:header-style>
      <style:footer-style>
        <style:header-footer-properties fo:min-height="0.101cm" fo:margin-left="0cm" fo:margin-right="0cm" fo:margin-top="0.002cm" style:dynamic-spacing="true"/>
      </style:footer-style>
    </style:page-layout>
    <style:page-layout style:name="Mpm3">
      <style:page-layout-properties fo:page-width="21.001cm" fo:page-height="29.7cm" style:num-format="1" style:print-orientation="portrait" fo:margin-top="2.499cm" fo:margin-bottom="2.499cm" fo:margin-left="2.499cm" fo:margin-right="1.499cm" style:writing-mode="lr-tb" style:layout-grid-color="#c0c0c0" style:layout-grid-lines="13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0.101cm" fo:margin-left="0cm" fo:margin-right="0cm" fo:margin-top="0.002cm" style:dynamic-spacing="true"/>
      </style:footer-style>
    </style:page-layout>
    <style:page-layout style:name="Mpm4">
      <style:page-layout-properties fo:page-width="21.001cm" fo:page-height="29.7cm" style:num-format="1" style:print-orientation="portrait" fo:margin-top="2.499cm" fo:margin-bottom="2.499cm" fo:margin-left="2.501cm" fo:margin-right="2.501cm" style:writing-mode="lr-tb" style:layout-grid-color="#c0c0c0" style:layout-grid-lines="12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Семинарски рад</text:span> <text:s/><text:tab/><text:tab/><text:span text:style-name="MT2">Алекса Јовановић</text:span></text:p>
      </style:header>
      <style:footer>
        <text:p text:style-name="MP2"><text:page-number text:select-page="current">2</text:page-number></text:p>
        <text:p text:style-name="Footer"/>
      </style:footer>
    </style:master-page>
    <style:master-page style:name="Converted2" style:page-layout-name="Mpm3" draw:style-name="Mdp1">
      <style:header>
        <text:p text:style-name="MP3"><text:span text:style-name="MT3">Семинарски</text:span><text:span text:style-name="MT2"> рад</text:span> <text:s/><text:tab/><text:tab/><text:span text:style-name="MT2">Алекса Јовановић</text:span></text:p>
      </style:header>
      <style:footer>
        <text:p text:style-name="MP2"><text:page-number text:select-page="current">3</text:page-number></text:p>
        <text:p text:style-name="Footer"/>
      </style:footer>
    </style:master-page>
    <style:master-page style:name="Converted3" style:page-layout-name="Mpm4" draw:style-name="Mdp1">
      <style:header>
        <text:p text:style-name="MP4"><text:span text:style-name="MT4">Семинарски</text:span> <text:span text:style-name="MT2">рад</text:span> <text:s/><text:tab/><text:tab/><text:span text:style-name="MT2">Алекса Јовановић</text:span></text:p>
      </style:header>
      <style:footer>
        <text:p text:style-name="MP2"><text:page-number text:select-page="current">25</text:page-number></text:p>
        <text:p text:style-name="Footer"/>
      </style:footer>
    </style:master-page>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dc:language>sr-RS</dc:language>
    <meta:user-defined meta:name="AppVersion" meta:value-type="string">15.0000</meta:user-defined>
    <meta:user-defined meta:name="Created" meta:value-type="date">2021-07-02</meta:user-defined>
    <meta:user-defined meta:name="Creator" meta:value-type="string">Microsoft® Word 2016</meta:user-defined>
    <meta:user-defined meta:name="LastSaved" meta:value-type="date">2024-09-28</meta:user-defined>
    <meta:document-statistic meta:page-count="25" meta:table-count="2" meta:image-count="2" meta:object-count="0" meta:paragraph-count="268" meta:word-count="6499" meta:character-count="43503"/>
  </office:meta>
</office:document-meta>
</file>