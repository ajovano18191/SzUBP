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D3000000D3BEEA7A65.png" manifest:media-type="image/png"/>
  <manifest:file-entry manifest:full-path="Pictures/10000001000000B0000000B03A3C75E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118cm" fo:margin-left="-0.078cm" fo:margin-top="0cm" fo:margin-bottom="0cm" table:align="left" style:writing-mode="lr-tb"/>
    </style:style>
    <style:style style:name="Table1.A" style:family="table-column">
      <style:table-column-properties style:column-width="8.1cm"/>
    </style:style>
    <style:style style:name="Table1.B" style:family="table-column">
      <style:table-column-properties style:column-width="8.019cm"/>
    </style:style>
    <style:style style:name="Table1.1" style:family="table-row">
      <style:table-row-properties style:min-row-height="0.72cm" fo:keep-together="auto"/>
    </style:style>
    <style:style style:name="Table1.A1" style:family="table-cell">
      <style:table-cell-properties fo:padding="0cm" fo:border="none"/>
    </style:style>
    <style:style style:name="P1" style:family="paragraph" style:parent-style-name="Text_20_body">
      <style:paragraph-properties fo:text-align="center" style:justify-single-word="false"/>
      <style:text-properties fo:color="#000000" loext:opacity="100%" fo:font-size="18pt" fo:language="sr" fo:country="RS" fo:font-weight="bold" officeooo:paragraph-rsid="001da82d" fo:background-color="#ffffff" style:font-name-asian="Times New Roman1" style:font-size-asian="18pt" style:font-weight-asian="bold" style:font-name-complex="Times New Roman1" style:font-size-complex="18pt" style:font-weight-complex="bold"/>
    </style:style>
    <style:style style:name="P2" style:family="paragraph" style:parent-style-name="Text_20_body">
      <style:paragraph-properties fo:text-align="center" style:justify-single-word="false"/>
      <style:text-properties fo:color="#000000" loext:opacity="100%" fo:font-size="18pt" fo:language="sr" fo:country="RS" fo:font-weight="bold" fo:background-color="#ffffff" style:font-name-asian="Times New Roman1" style:font-size-asian="18pt" style:font-weight-asian="bold" style:font-name-complex="Times New Roman1" style:font-size-complex="18pt" style:font-weight-complex="bold"/>
    </style:style>
    <style:style style:name="P3" style:family="paragraph" style:parent-style-name="Text_20_body">
      <style:paragraph-properties fo:text-align="center" style:justify-single-word="false"/>
      <style:text-properties officeooo:paragraph-rsid="00fbcf1a"/>
    </style:style>
    <style:style style:name="P4" style:family="paragraph" style:parent-style-name="Text_20_body">
      <style:paragraph-properties fo:text-align="center" style:justify-single-word="false"/>
      <style:text-properties style:use-window-font-color="true" loext:opacity="0%" fo:font-size="10pt" style:font-size-asian="10pt"/>
    </style:style>
    <style:style style:name="P5" style:family="paragraph" style:parent-style-name="Text_20_body">
      <style:text-properties style:use-window-font-color="true" loext:opacity="0%" fo:font-size="10pt" style:font-size-asian="10pt"/>
    </style:style>
    <style:style style:name="P6" style:family="paragraph" style:parent-style-name="paragraph">
      <style:paragraph-properties fo:margin-top="0cm" fo:margin-bottom="0cm" style:contextual-spacing="false" fo:text-align="center" style:justify-single-word="false" style:vertical-align="baseline"/>
    </style:style>
    <style:style style:name="P7" style:family="paragraph" style:parent-style-name="paragraph">
      <style:paragraph-properties fo:margin-top="0cm" fo:margin-bottom="0cm" style:contextual-spacing="false" fo:text-align="center" style:justify-single-word="false" style:vertical-align="baseline"/>
      <style:text-properties officeooo:paragraph-rsid="00413cb9"/>
    </style:style>
    <style:style style:name="P8" style:family="paragraph" style:parent-style-name="paragraph">
      <style:paragraph-properties fo:margin-top="0cm" fo:margin-bottom="0cm" style:contextual-spacing="false" fo:text-align="center" style:justify-single-word="false" style:vertical-align="baseline"/>
      <style:text-properties fo:font-size="14pt" style:font-size-asian="14pt" style:font-size-complex="14pt"/>
    </style:style>
    <style:style style:name="P9" style:family="paragraph" style:parent-style-name="Text_20_body">
      <style:paragraph-properties fo:margin-top="0.019cm" fo:margin-bottom="0cm" style:contextual-spacing="false"/>
      <style:text-properties style:use-window-font-color="true" loext:opacity="0%" fo:font-size="10pt" style:font-size-asian="10pt"/>
    </style:style>
    <style:style style:name="P10" style:family="paragraph" style:parent-style-name="Table_20_Paragraph">
      <style:paragraph-properties fo:margin-left="0.321cm" fo:margin-right="1.027cm" fo:line-height="0.469cm" fo:text-align="center" style:justify-single-word="false" fo:orphans="0" fo:widows="0" fo:text-indent="0cm" style:auto-text-indent="false"/>
      <style:text-properties style:use-window-font-color="true" loext:opacity="0%" fo:font-size="12pt" fo:language="sr" fo:country="RS" style:font-name-asian="Times New Roman1" style:font-size-asian="12pt" style:font-name-complex="Times New Roman1"/>
    </style:style>
    <style:style style:name="P11" style:family="paragraph" style:parent-style-name="Table_20_Paragraph">
      <style:paragraph-properties fo:margin-left="1.032cm" fo:margin-right="0.321cm" fo:line-height="0.469cm" fo:text-align="center" style:justify-single-word="false" fo:orphans="0" fo:widows="0" fo:text-indent="0cm" style:auto-text-indent="false"/>
      <style:text-properties style:use-window-font-color="true" loext:opacity="0%" fo:font-size="12pt" fo:language="sr" fo:country="RS" style:font-name-asian="Times New Roman1" style:font-size-asian="12pt" style:font-name-complex="Times New Roman1"/>
    </style:style>
    <style:style style:name="P12" style:family="paragraph" style:parent-style-name="Table_20_Paragraph">
      <style:paragraph-properties fo:margin-left="0.321cm" fo:margin-right="1.028cm" fo:margin-top="0.235cm" fo:margin-bottom="0cm" style:contextual-spacing="false" fo:text-align="center" style:justify-single-word="false" fo:orphans="0" fo:widows="0" fo:text-indent="0cm" style:auto-text-indent="false"/>
      <style:text-properties style:use-window-font-color="true" loext:opacity="0%" fo:font-size="12pt" fo:language="sr" fo:country="RS" style:font-name-asian="Times New Roman1" style:font-size-asian="12pt" style:font-name-complex="Times New Roman1"/>
    </style:style>
    <style:style style:name="P13" style:family="paragraph" style:parent-style-name="Table_20_Paragraph">
      <style:paragraph-properties fo:margin-left="0.499cm" fo:margin-right="0.3cm" fo:margin-top="0.235cm" fo:margin-bottom="0cm" style:contextual-spacing="false" fo:line-height="0.452cm" fo:text-align="center" style:justify-single-word="false" fo:orphans="0" fo:widows="0" fo:text-indent="0cm" style:auto-text-indent="false" style:writing-mode="lr-tb"/>
      <style:text-properties style:use-window-font-color="true" loext:opacity="0%" fo:font-size="12pt" fo:language="sr" fo:country="RS" style:font-name-asian="Times New Roman1" style:font-size-asian="12pt" style:font-name-complex="Times New Roman1"/>
    </style:style>
    <style:style style:name="P14" style:family="paragraph" style:parent-style-name="Text_20_body">
      <style:text-properties style:use-window-font-color="true" loext:opacity="0%" fo:font-size="10pt" style:font-size-asian="10pt" style:font-size-complex="10pt"/>
    </style:style>
    <style:style style:name="P15" style:family="paragraph" style:parent-style-name="Text_20_body">
      <style:paragraph-properties fo:margin-top="0.159cm" fo:margin-bottom="0cm" style:contextual-spacing="false" fo:text-align="center" style:justify-single-word="false"/>
      <style:text-properties style:use-window-font-color="true" loext:opacity="0%" fo:font-size="12pt" fo:language="sr" fo:country="RS" style:font-name-asian="Times New Roman1" style:font-size-asian="12pt" style:font-name-complex="Times New Roman1" style:font-size-complex="12pt"/>
    </style:style>
    <style:style style:name="P16" style:family="paragraph" style:parent-style-name="Standard" style:master-page-name="Converted1">
      <style:paragraph-properties fo:margin-left="0.4cm" fo:margin-right="0cm" fo:margin-top="0.122cm" fo:margin-bottom="0cm" style:contextual-spacing="false" fo:text-align="start" style:justify-single-word="false" fo:orphans="0" fo:widows="0" fo:text-indent="0cm" style:auto-text-indent="false" style:page-number="auto" style:writing-mode="lr-tb"/>
      <style:text-properties style:use-window-font-color="true" loext:opacity="0%"/>
    </style:style>
    <style:style style:name="P17" style:family="paragraph" style:parent-style-name="Standard">
      <style:paragraph-properties fo:margin-left="0.4cm" fo:margin-right="0cm" fo:margin-top="0.122cm" fo:margin-bottom="0cm" style:contextual-spacing="false" fo:text-align="start" style:justify-single-word="false" fo:orphans="0" fo:widows="0" fo:text-indent="0cm" style:auto-text-indent="false" style:writing-mode="lr-tb"/>
      <style:text-properties style:use-window-font-color="true" loext:opacity="0%" fo:font-size="16pt" fo:letter-spacing="0.002cm" fo:language="sr" fo:country="RS" style:font-name-asian="Times New Roman1" style:font-size-asian="16pt" style:font-name-complex="Times New Roman1" style:font-size-complex="16pt"/>
    </style:style>
    <style:style style:name="P18" style:family="paragraph" style:parent-style-name="Text_20_body">
      <style:paragraph-properties fo:margin-top="0.007cm" fo:margin-bottom="0cm" style:contextual-spacing="false"/>
      <style:text-properties style:use-window-font-color="true" loext:opacity="0%" fo:font-size="24pt" style:font-size-asian="24pt"/>
    </style:style>
    <style:style style:name="P19" style:family="paragraph" style:parent-style-name="Text_20_body">
      <style:text-properties officeooo:paragraph-rsid="00413cb9"/>
    </style:style>
    <style:style style:name="P20" style:family="paragraph" style:parent-style-name="Text_20_body">
      <style:text-properties style:use-window-font-color="true" loext:opacity="0%" fo:font-size="13pt" fo:font-weight="bold" fo:background-color="transparent" style:font-size-asian="13pt" style:font-weight-asian="bold"/>
    </style:style>
    <style:style style:name="P21" style:family="paragraph" style:parent-style-name="paragraph" style:master-page-name="">
      <loext:graphic-properties draw:fill="none"/>
      <style:paragraph-properties fo:margin-left="0cm" fo:margin-right="0cm" fo:margin-top="0cm" fo:margin-bottom="0cm" style:contextual-spacing="false" fo:text-align="justify" style:justify-single-word="false" fo:orphans="2" fo:widows="2" fo:hyphenation-ladder-count="no-limit" fo:hyphenation-keep="auto" loext:hyphenation-keep-type="column" loext:hyphenation-keep-line="false" fo:text-indent="0cm" style:auto-text-indent="false" style:page-number="auto" fo:background-color="transparent" style:punctuation-wrap="simple"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P22" style:family="paragraph" style:parent-style-name="paragraph">
      <style:paragraph-properties fo:margin-top="0cm" fo:margin-bottom="0cm" style:contextual-spacing="false" style:vertical-align="baseline"/>
    </style:style>
    <style:style style:name="P23" style:family="paragraph" style:parent-style-name="paragraph" style:master-page-name="">
      <loext:graphic-properties draw:fill="none"/>
      <style:paragraph-properties fo:margin-left="0cm" fo:margin-right="0cm" fo:margin-top="0cm" fo:margin-bottom="0cm" style:contextual-spacing="false" fo:text-align="justify" style:justify-single-word="false" fo:orphans="2" fo:widows="2" fo:hyphenation-ladder-count="no-limit" fo:hyphenation-keep="auto" loext:hyphenation-keep-type="column" loext:hyphenation-keep-line="false" fo:text-indent="0cm" style:auto-text-indent="false" style:page-number="auto" fo:background-color="transparent" style:punctuation-wrap="simple" style:vertical-align="baseline" style:writing-mode="lr-tb"/>
      <style:text-properties officeooo:paragraph-rsid="00428376" fo:hyphenate="false" fo:hyphenation-remain-char-count="2" fo:hyphenation-push-char-count="2" loext:hyphenation-no-caps="false" loext:hyphenation-no-last-word="false" loext:hyphenation-word-char-count="no-limit" loext:hyphenation-zone="no-limit"/>
    </style:style>
    <style:style style:name="P24" style:family="paragraph" style:parent-style-name="paragraph">
      <loext:graphic-properties draw:fill="none"/>
      <style:paragraph-properties fo:margin-left="0cm" fo:margin-right="0cm" fo:margin-top="0cm" fo:margin-bottom="0cm" style:contextual-spacing="false" fo:text-align="justify" style:justify-single-word="false" fo:orphans="2" fo:widows="2" fo:hyphenation-ladder-count="no-limit" fo:hyphenation-keep="auto" loext:hyphenation-keep-type="column" loext:hyphenation-keep-line="false" fo:text-indent="0cm" style:auto-text-indent="false" fo:background-color="transparent" style:punctuation-wrap="simple" style:vertical-align="baseline" style:writing-mode="lr-tb"/>
      <style:text-properties officeooo:paragraph-rsid="00be3553" fo:hyphenate="false" fo:hyphenation-remain-char-count="2" fo:hyphenation-push-char-count="2" loext:hyphenation-no-caps="false" loext:hyphenation-no-last-word="false" loext:hyphenation-word-char-count="no-limit" loext:hyphenation-zone="no-limit"/>
    </style:style>
    <style:style style:name="P25" style:family="paragraph" style:parent-style-name="Text_20_body">
      <style:text-properties style:use-window-font-color="true" loext:opacity="0%"/>
    </style:style>
    <style:style style:name="P26" style:family="paragraph" style:parent-style-name="paragraph" style:master-page-name="">
      <loext:graphic-properties draw:fill="none"/>
      <style:paragraph-properties fo:margin-left="0cm" fo:margin-right="0cm" fo:margin-top="0.494cm" fo:margin-bottom="0.494cm" style:contextual-spacing="false" fo:text-align="justify" style:justify-single-word="false" fo:orphans="2" fo:widows="2" fo:hyphenation-ladder-count="no-limit" fo:hyphenation-keep="auto" loext:hyphenation-keep-type="column" loext:hyphenation-keep-line="false" fo:text-indent="0cm" style:auto-text-indent="false" style:page-number="auto" fo:background-color="transparent" style:punctuation-wrap="simple" style:writing-mode="lr-tb"/>
      <style:text-properties officeooo:paragraph-rsid="00896c18" fo:hyphenate="false" fo:hyphenation-remain-char-count="2" fo:hyphenation-push-char-count="2" loext:hyphenation-no-caps="false" loext:hyphenation-no-last-word="false" loext:hyphenation-word-char-count="no-limit" loext:hyphenation-zone="no-limit"/>
    </style:style>
    <style:style style:name="P27" style:family="paragraph" style:parent-style-name="Text_20_body">
      <style:text-properties fo:font-size="10pt" fo:font-style="italic" style:font-size-asian="10pt" style:font-style-asian="italic"/>
    </style:style>
    <style:style style:name="P28" style:family="paragraph" style:parent-style-name="Text_20_body">
      <style:paragraph-properties fo:margin-top="0.012cm" fo:margin-bottom="0cm" style:contextual-spacing="false"/>
      <style:text-properties fo:font-size="11pt" fo:font-style="italic" style:font-size-asian="11pt" style:font-style-asian="italic"/>
    </style:style>
    <style:style style:name="P29" style:family="paragraph" style:parent-style-name="Text_20_body">
      <style:paragraph-properties fo:margin-left="0.349cm" fo:margin-right="11.088cm" fo:margin-top="0.159cm" fo:margin-bottom="0cm" style:contextual-spacing="false" fo:line-height="143%" fo:text-align="justify" style:justify-single-word="false" fo:text-indent="0cm" style:auto-text-indent="false"/>
      <style:text-properties fo:font-size="8pt" style:font-size-asian="8pt"/>
    </style:style>
    <style:style style:name="P30" style:family="paragraph" style:parent-style-name="Contents_20_Heading" style:master-page-name="Converted2">
      <style:paragraph-properties style:page-number="auto"/>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Heading_20_1" style:master-page-name="Converted3">
      <style:paragraph-properties fo:margin-left="1.302cm" fo:margin-right="0cm" fo:text-indent="-0.954cm" style:auto-text-indent="false" style:page-number="auto"/>
      <style:text-properties fo:font-size="18pt" fo:language="sr" fo:country="RS" fo:font-weight="bold" style:font-name-asian="Times New Roman1" style:font-size-asian="18pt" style:font-weight-asian="bold" style:font-name-complex="Times New Roman1" style:font-size-complex="18pt" style:font-weight-complex="bold"/>
    </style:style>
    <style:style style:name="P35" style:family="paragraph" style:parent-style-name="paragraph">
      <style:text-properties fo:font-size="12pt" fo:language="sr" fo:country="RS" officeooo:rsid="00be3553" officeooo:paragraph-rsid="00be3553" style:font-name-asian="Times New Roman1" style:font-size-asian="12pt" style:font-name-complex="Times New Roman1" style:font-size-complex="12pt"/>
    </style:style>
    <style:style style:name="P36" style:family="paragraph" style:parent-style-name="paragraph">
      <style:text-properties fo:font-size="12pt" fo:language="sr" fo:country="RS" officeooo:rsid="00ff874d" officeooo:paragraph-rsid="00ff874d" style:font-name-asian="Times New Roman1" style:font-size-asian="12pt" style:font-name-complex="Times New Roman1" style:font-size-complex="12pt"/>
    </style:style>
    <style:style style:name="P37" style:family="paragraph" style:parent-style-name="paragraph">
      <style:text-properties fo:font-size="12pt" fo:language="sr" fo:country="RS" officeooo:rsid="0102ed52" officeooo:paragraph-rsid="0102ed52" style:font-name-asian="Times New Roman1" style:font-size-asian="12pt" style:font-name-complex="Times New Roman1" style:font-size-complex="12pt"/>
    </style:style>
    <style:style style:name="P38" style:family="paragraph" style:parent-style-name="Heading_20_1">
      <style:paragraph-properties fo:margin-left="1.302cm" fo:margin-right="0cm" fo:text-indent="-0.954cm" style:auto-text-indent="false" fo:break-before="page"/>
      <style:text-properties fo:language="sr" fo:country="RS" officeooo:rsid="0105c5a5" officeooo:paragraph-rsid="0105c5a5"/>
    </style:style>
    <style:style style:name="P39" style:family="paragraph" style:parent-style-name="paragraph">
      <style:text-properties fo:font-size="12pt" fo:language="sr" fo:country="RS" officeooo:rsid="010695c6" officeooo:paragraph-rsid="00c03028" style:font-name-asian="Times New Roman1" style:font-size-asian="12pt" style:font-name-complex="Times New Roman1" style:font-size-complex="12pt"/>
    </style:style>
    <style:style style:name="P40" style:family="paragraph" style:parent-style-name="paragraph">
      <style:text-properties fo:font-size="12pt" fo:language="sr" fo:country="RS" officeooo:rsid="010695c6" officeooo:paragraph-rsid="010695c6" style:font-name-asian="Times New Roman1" style:font-size-asian="12pt" style:font-name-complex="Times New Roman1" style:font-size-complex="12pt"/>
    </style:style>
    <style:style style:name="P41" style:family="paragraph" style:parent-style-name="Heading_20_2">
      <style:paragraph-properties fo:margin-left="1.302cm" fo:margin-right="0cm" fo:text-indent="-0.954cm" style:auto-text-indent="false"/>
      <style:text-properties fo:language="sr" fo:country="RS" officeooo:rsid="010b37fc" officeooo:paragraph-rsid="010b37fc"/>
    </style:style>
    <style:style style:name="P42" style:family="paragraph" style:parent-style-name="paragraph">
      <style:text-properties fo:font-size="12pt" fo:language="sr" fo:country="RS" officeooo:rsid="010b37fc" officeooo:paragraph-rsid="010b37fc" style:font-size-asian="12pt" style:font-size-complex="12pt"/>
    </style:style>
    <style:style style:name="P43" style:family="paragraph" style:parent-style-name="paragraph" style:list-style-name="L1">
      <style:text-properties fo:font-size="12pt" fo:language="sr" fo:country="RS" officeooo:rsid="010b37fc" officeooo:paragraph-rsid="010b37fc" style:font-size-asian="12pt" style:font-size-complex="12pt"/>
    </style:style>
    <style:style style:name="P44" style:family="paragraph" style:parent-style-name="paragraph" style:list-style-name="L1">
      <style:text-properties fo:font-size="12pt" fo:language="sr" fo:country="RS" officeooo:rsid="010c3567" officeooo:paragraph-rsid="010c3567" style:font-size-asian="12pt" style:font-size-complex="12pt"/>
    </style:style>
    <style:style style:name="P45" style:family="paragraph" style:parent-style-name="paragraph">
      <style:text-properties fo:font-size="12pt" fo:language="sr" fo:country="RS" officeooo:rsid="010c3567" officeooo:paragraph-rsid="010c3567" style:font-name-asian="Times New Roman1" style:font-size-asian="12pt" style:font-name-complex="Times New Roman1" style:font-size-complex="12pt"/>
    </style:style>
    <style:style style:name="P46" style:family="paragraph" style:parent-style-name="paragraph" style:list-style-name="L2">
      <style:text-properties fo:font-size="12pt" fo:language="sr" fo:country="RS" officeooo:rsid="010c3567" officeooo:paragraph-rsid="010c3567" style:font-name-asian="Times New Roman1" style:font-size-asian="12pt" style:font-name-complex="Times New Roman1" style:font-size-complex="12pt"/>
    </style:style>
    <style:style style:name="P47" style:family="paragraph" style:parent-style-name="Heading_20_2">
      <style:paragraph-properties fo:margin-left="1.302cm" fo:margin-right="0cm" fo:text-indent="-0.954cm" style:auto-text-indent="false"/>
      <style:text-properties fo:language="sr" fo:country="RS" officeooo:rsid="010db8b1" officeooo:paragraph-rsid="010db8b1"/>
    </style:style>
    <style:style style:name="P48" style:family="paragraph" style:parent-style-name="paragraph">
      <style:text-properties fo:font-size="12pt" fo:language="sr" fo:country="RS" officeooo:rsid="010db8b1" officeooo:paragraph-rsid="010db8b1" style:font-name-asian="Times New Roman1" style:font-size-asian="12pt" style:font-name-complex="Times New Roman1" style:font-size-complex="12pt"/>
    </style:style>
    <style:style style:name="P49" style:family="paragraph" style:parent-style-name="paragraph">
      <style:text-properties fo:language="sr" fo:country="RS" officeooo:rsid="0107ad75" officeooo:paragraph-rsid="0107ad75"/>
    </style:style>
    <style:style style:name="P50" style:family="paragraph" style:parent-style-name="paragraph">
      <style:text-properties fo:font-size="12pt" fo:language="sr" fo:country="RS" officeooo:rsid="00c197a3" officeooo:paragraph-rsid="00c197a3" style:font-size-asian="12pt" style:font-size-complex="12pt"/>
    </style:style>
    <style:style style:name="P51" style:family="paragraph" style:parent-style-name="paragraph">
      <style:text-properties fo:font-size="12pt" fo:language="sr" fo:country="RS" officeooo:rsid="010db8b1" officeooo:paragraph-rsid="010db8b1" style:font-size-asian="12pt" style:font-size-complex="12pt"/>
    </style:style>
    <style:style style:name="P52" style:family="paragraph" style:parent-style-name="paragraph">
      <style:text-properties fo:font-size="12pt" fo:language="sr" fo:country="RS" officeooo:rsid="010ed5a7" officeooo:paragraph-rsid="010ed5a7" style:font-size-asian="12pt" style:font-size-complex="12pt"/>
    </style:style>
    <style:style style:name="P53" style:family="paragraph" style:parent-style-name="paragraph" style:list-style-name="L3">
      <style:text-properties fo:font-size="12pt" fo:language="sr" fo:country="RS" officeooo:rsid="01108f59" officeooo:paragraph-rsid="01108f59" style:font-size-asian="12pt" style:font-size-complex="12pt"/>
    </style:style>
    <style:style style:name="P54" style:family="paragraph" style:parent-style-name="Heading_20_2">
      <style:paragraph-properties fo:margin-left="1.302cm" fo:margin-right="0cm" fo:text-indent="-0.954cm" style:auto-text-indent="false"/>
      <style:text-properties fo:language="sr" fo:country="RS" officeooo:rsid="01114fd4" officeooo:paragraph-rsid="01114fd4"/>
    </style:style>
    <style:style style:name="P55" style:family="paragraph" style:parent-style-name="paragraph">
      <style:text-properties fo:font-size="12pt" fo:language="sr" fo:country="RS" officeooo:rsid="010ed5a7" officeooo:paragraph-rsid="01114fd4" style:font-size-asian="12pt" style:font-size-complex="12pt"/>
    </style:style>
    <style:style style:name="P56" style:family="paragraph" style:parent-style-name="Heading_20_3">
      <style:paragraph-properties fo:margin-left="1.302cm" fo:margin-right="0cm" fo:text-indent="-0.954cm" style:auto-text-indent="false"/>
      <style:text-properties fo:language="en" fo:country="US" officeooo:rsid="01132307" officeooo:paragraph-rsid="01132307"/>
    </style:style>
    <style:style style:name="P57" style:family="paragraph" style:parent-style-name="paragraph">
      <style:text-properties fo:font-size="12pt" fo:language="sr" fo:country="RS" officeooo:rsid="01132307" officeooo:paragraph-rsid="01144ffb" style:font-size-asian="12pt" style:font-size-complex="12pt"/>
    </style:style>
    <style:style style:name="P58" style:family="paragraph" style:parent-style-name="Heading_20_3">
      <style:paragraph-properties fo:margin-left="1.302cm" fo:margin-right="0cm" fo:text-indent="-0.954cm" style:auto-text-indent="false"/>
      <style:text-properties fo:font-size="14pt" fo:language="en" fo:country="US" officeooo:rsid="01132307" officeooo:paragraph-rsid="01144ffb" style:font-size-asian="14pt" style:font-size-complex="14pt"/>
    </style:style>
    <style:style style:name="P59" style:family="paragraph" style:parent-style-name="Heading_20_3">
      <style:paragraph-properties fo:margin-left="1.302cm" fo:margin-right="0cm" fo:text-indent="-0.954cm" style:auto-text-indent="false"/>
      <style:text-properties fo:language="en" fo:country="US" officeooo:rsid="01132307" officeooo:paragraph-rsid="01144ffb"/>
    </style:style>
    <style:style style:name="P60" style:family="paragraph" style:parent-style-name="paragraph">
      <style:text-properties fo:font-size="12pt" fo:language="sr" fo:country="RS" officeooo:rsid="01144ffb" officeooo:paragraph-rsid="01144ffb" style:font-size-asian="12pt" style:font-size-complex="12pt"/>
    </style:style>
    <style:style style:name="P61" style:family="paragraph" style:parent-style-name="Heading_20_3">
      <style:paragraph-properties fo:margin-left="1.302cm" fo:margin-right="0cm" fo:text-indent="-0.954cm" style:auto-text-indent="false"/>
      <style:text-properties fo:language="sr" fo:country="RS" officeooo:rsid="01147b71" officeooo:paragraph-rsid="01147b71"/>
    </style:style>
    <style:style style:name="P62" style:family="paragraph" style:parent-style-name="paragraph">
      <style:text-properties fo:font-size="12pt" fo:language="sr" fo:country="RS" officeooo:rsid="01148087" officeooo:paragraph-rsid="01148087" style:font-size-asian="12pt" style:font-size-complex="12pt"/>
    </style:style>
    <style:style style:name="P63" style:family="paragraph" style:parent-style-name="paragraph">
      <style:text-properties fo:font-size="12pt" fo:language="sr" fo:country="RS" officeooo:rsid="01132307" officeooo:paragraph-rsid="01148087" style:font-size-asian="12pt" style:font-size-complex="12pt"/>
    </style:style>
    <style:style style:name="P64" style:family="paragraph" style:parent-style-name="paragraph">
      <style:text-properties fo:font-size="12pt" fo:language="sr" fo:country="RS" officeooo:rsid="01132307" officeooo:paragraph-rsid="011612cb" style:font-size-asian="12pt" style:font-size-complex="12pt"/>
    </style:style>
    <style:style style:name="P65" style:family="paragraph" style:parent-style-name="Heading_20_2">
      <style:paragraph-properties fo:margin-left="1.302cm" fo:margin-right="0cm" fo:text-indent="-0.954cm" style:auto-text-indent="false"/>
      <style:text-properties fo:language="sr" fo:country="RS" officeooo:rsid="01114fd4" officeooo:paragraph-rsid="0117b170"/>
    </style:style>
    <style:style style:name="P66" style:family="paragraph" style:parent-style-name="paragraph">
      <style:text-properties fo:font-size="12pt" fo:language="sr" fo:country="RS" officeooo:rsid="0117b170" officeooo:paragraph-rsid="0117b170" style:font-size-asian="12pt" style:font-size-complex="12pt"/>
    </style:style>
    <style:style style:name="P67" style:family="paragraph" style:parent-style-name="Heading_20_3">
      <style:paragraph-properties fo:margin-left="1.302cm" fo:margin-right="0cm" fo:text-indent="-0.954cm" style:auto-text-indent="false"/>
      <style:text-properties fo:language="sr" fo:country="RS" officeooo:rsid="011876e8" officeooo:paragraph-rsid="011876e8"/>
    </style:style>
    <style:style style:name="P68" style:family="paragraph" style:parent-style-name="paragraph">
      <style:text-properties fo:font-size="12pt" fo:language="sr" fo:country="RS" officeooo:rsid="011876e8" officeooo:paragraph-rsid="011876e8" style:font-size-asian="12pt" style:font-size-complex="12pt"/>
    </style:style>
    <style:style style:name="P69" style:family="paragraph" style:parent-style-name="paragraph">
      <style:text-properties fo:font-size="12pt" fo:language="sr" fo:country="RS" officeooo:rsid="01132307" officeooo:paragraph-rsid="011876e8" style:font-size-asian="12pt" style:font-size-complex="12pt"/>
    </style:style>
    <style:style style:name="P70" style:family="paragraph" style:parent-style-name="paragraph">
      <style:text-properties fo:font-size="12pt" fo:language="sr" fo:country="RS" officeooo:rsid="01132307" officeooo:paragraph-rsid="0119fb60" style:font-size-asian="12pt" style:font-size-complex="12pt"/>
    </style:style>
    <style:style style:name="P71" style:family="paragraph" style:parent-style-name="Heading_20_3">
      <style:paragraph-properties fo:margin-left="1.302cm" fo:margin-right="0cm" fo:text-indent="-0.954cm" style:auto-text-indent="false"/>
      <style:text-properties fo:language="sr" fo:country="RS" officeooo:rsid="011876e8" officeooo:paragraph-rsid="0119fb60"/>
    </style:style>
    <style:style style:name="P72" style:family="paragraph" style:parent-style-name="paragraph">
      <style:text-properties fo:font-size="12pt" fo:language="sr" fo:country="RS" officeooo:rsid="0119fb60" officeooo:paragraph-rsid="0119fb60" style:font-size-asian="12pt" style:font-size-complex="12pt"/>
    </style:style>
    <style:style style:name="P73" style:family="paragraph" style:parent-style-name="paragraph">
      <style:text-properties fo:font-size="12pt" fo:language="sr" fo:country="RS" officeooo:rsid="011a9a81" officeooo:paragraph-rsid="011bd8e5" style:font-size-asian="12pt" style:font-size-complex="12pt"/>
    </style:style>
    <style:style style:name="P74" style:family="paragraph" style:parent-style-name="Heading_20_3">
      <style:paragraph-properties fo:margin-left="1.302cm" fo:margin-right="0cm" fo:text-indent="-0.954cm" style:auto-text-indent="false"/>
      <style:text-properties fo:language="sr" fo:country="RS" officeooo:rsid="011876e8" officeooo:paragraph-rsid="011bd8e5"/>
    </style:style>
    <style:style style:name="P75" style:family="paragraph" style:parent-style-name="paragraph">
      <style:text-properties fo:font-size="12pt" fo:language="sr" fo:country="RS" officeooo:rsid="011bd8e5" officeooo:paragraph-rsid="011bd8e5" style:font-size-asian="12pt" style:font-size-complex="12pt"/>
    </style:style>
    <style:style style:name="P76" style:family="paragraph" style:parent-style-name="paragraph">
      <style:text-properties fo:font-size="12pt" fo:language="sr" fo:country="RS" officeooo:rsid="011bd8e5" officeooo:paragraph-rsid="011c8aa9" style:font-size-asian="12pt" style:font-size-complex="12pt"/>
    </style:style>
    <style:style style:name="P77" style:family="paragraph" style:parent-style-name="paragraph">
      <style:text-properties fo:font-size="12pt" fo:language="sr" fo:country="RS" fo:font-style="normal" officeooo:rsid="011c8aa9" officeooo:paragraph-rsid="011c8aa9" style:font-size-asian="12pt" style:font-style-asian="normal" style:font-size-complex="12pt" style:font-style-complex="normal"/>
    </style:style>
    <style:style style:name="P78" style:family="paragraph" style:parent-style-name="paragraph">
      <style:text-properties fo:font-size="12pt" fo:language="sr" fo:country="RS" officeooo:rsid="011bd8e5" officeooo:paragraph-rsid="011e3de5" style:font-size-asian="12pt" style:font-size-complex="12pt"/>
    </style:style>
    <style:style style:name="P79" style:family="paragraph" style:parent-style-name="paragraph">
      <style:text-properties fo:font-size="12pt" fo:language="sr" fo:country="RS" officeooo:rsid="011bd8e5" officeooo:paragraph-rsid="011f5a07" style:font-size-asian="12pt" style:font-size-complex="12pt"/>
    </style:style>
    <style:style style:name="P80" style:family="paragraph" style:parent-style-name="paragraph">
      <style:text-properties fo:font-size="12pt" fo:language="sr" fo:country="RS" officeooo:rsid="011bd8e5" officeooo:paragraph-rsid="01204530" style:font-size-asian="12pt" style:font-size-complex="12pt"/>
    </style:style>
    <style:style style:name="P81" style:family="paragraph" style:parent-style-name="Heading_20_2">
      <style:paragraph-properties fo:margin-left="1.302cm" fo:margin-right="0cm" fo:text-indent="-0.954cm" style:auto-text-indent="false"/>
      <style:text-properties fo:language="sr" fo:country="RS" officeooo:rsid="01114fd4" officeooo:paragraph-rsid="012cd147"/>
    </style:style>
    <style:style style:name="P82" style:family="paragraph" style:parent-style-name="paragraph">
      <style:text-properties fo:font-size="12pt" fo:language="sr" fo:country="RS" officeooo:rsid="012831b6" officeooo:paragraph-rsid="012831b6" style:font-size-asian="12pt" style:font-size-complex="12pt"/>
    </style:style>
    <style:style style:name="P83" style:family="paragraph" style:parent-style-name="paragraph" style:list-style-name="L4">
      <style:text-properties fo:font-size="12pt" fo:language="sr" fo:country="RS" officeooo:rsid="012831b6" officeooo:paragraph-rsid="012831b6" style:font-size-asian="12pt" style:font-size-complex="12pt"/>
    </style:style>
    <style:style style:name="P84" style:family="paragraph" style:parent-style-name="paragraph" style:list-style-name="L5">
      <style:text-properties fo:font-size="12pt" fo:language="sr" fo:country="RS" officeooo:rsid="0129ed23" officeooo:paragraph-rsid="0129ed23" style:font-size-asian="12pt" style:font-size-complex="12pt"/>
    </style:style>
    <style:style style:name="P85" style:family="paragraph" style:parent-style-name="paragraph">
      <style:text-properties fo:font-size="12pt" fo:language="sr" fo:country="RS" officeooo:rsid="0129ed23" officeooo:paragraph-rsid="0129ed23" style:font-size-asian="12pt" style:font-size-complex="12pt"/>
    </style:style>
    <style:style style:name="P86" style:family="paragraph" style:parent-style-name="Standard" style:list-style-name="L5">
      <style:text-properties fo:font-size="12pt" fo:language="sr" fo:country="RS" officeooo:rsid="0129ed23" officeooo:paragraph-rsid="0129ed23" style:font-size-asian="12pt" style:font-size-complex="12pt"/>
    </style:style>
    <style:style style:name="P87" style:family="paragraph" style:parent-style-name="paragraph">
      <style:text-properties fo:font-size="12pt" fo:language="sr" fo:country="RS" officeooo:rsid="012b53fc" officeooo:paragraph-rsid="012b53fc" style:font-size-asian="12pt" style:font-size-complex="12pt"/>
    </style:style>
    <style:style style:name="P88" style:family="paragraph" style:parent-style-name="paragraph">
      <style:text-properties fo:font-size="12pt" fo:language="sr" fo:country="RS" officeooo:rsid="013344f9" officeooo:paragraph-rsid="013344f9" style:font-name-asian="Times New Roman1" style:font-size-asian="12pt" style:font-name-complex="Times New Roman1" style:font-size-complex="12pt"/>
    </style:style>
    <style:style style:name="P89" style:family="paragraph" style:parent-style-name="Heading_20_2">
      <style:paragraph-properties fo:margin-left="1.302cm" fo:margin-right="0cm" fo:text-indent="-0.954cm" style:auto-text-indent="false"/>
      <style:text-properties fo:language="en" fo:country="US" officeooo:rsid="013344f9" officeooo:paragraph-rsid="013344f9"/>
    </style:style>
    <style:style style:name="P90" style:family="paragraph" style:parent-style-name="paragraph">
      <style:text-properties fo:font-size="12pt" fo:language="en" fo:country="US" officeooo:rsid="00d0faf6" officeooo:paragraph-rsid="00d0faf6" style:font-name-asian="Times New Roman1" style:font-size-asian="12pt" style:font-name-complex="Times New Roman1" style:font-size-complex="12pt"/>
    </style:style>
    <style:style style:name="P91" style:family="paragraph" style:parent-style-name="paragraph">
      <style:text-properties fo:font-size="12pt" fo:language="en" fo:country="US" officeooo:rsid="01347a79" officeooo:paragraph-rsid="01347a79" style:font-name-asian="Times New Roman1" style:font-size-asian="12pt" style:font-name-complex="Times New Roman1" style:font-size-complex="12pt"/>
    </style:style>
    <style:style style:name="P92" style:family="paragraph" style:parent-style-name="paragraph">
      <style:text-properties fo:font-size="12pt" fo:language="sr" fo:country="RS" officeooo:rsid="01347a79" officeooo:paragraph-rsid="01347a79" style:font-name-asian="Times New Roman1" style:font-size-asian="12pt" style:font-name-complex="Times New Roman1" style:font-size-complex="12pt"/>
    </style:style>
    <style:style style:name="P93" style:family="paragraph" style:parent-style-name="paragraph">
      <style:text-properties fo:font-size="12pt" fo:language="sr" fo:country="RS" officeooo:rsid="0135508d" officeooo:paragraph-rsid="0135508d" style:font-name-asian="Times New Roman1" style:font-size-asian="12pt" style:font-name-complex="Times New Roman1" style:font-size-complex="12pt"/>
    </style:style>
    <style:style style:name="P94" style:family="paragraph" style:parent-style-name="paragraph">
      <style:text-properties fo:language="sr" fo:country="RS" officeooo:rsid="0135508d" officeooo:paragraph-rsid="0135508d"/>
    </style:style>
    <style:style style:name="P95" style:family="paragraph" style:parent-style-name="Heading_20_3">
      <style:paragraph-properties fo:margin-left="1.302cm" fo:margin-right="0cm" fo:text-indent="-0.954cm" style:auto-text-indent="false"/>
      <style:text-properties fo:language="sr" fo:country="RS" officeooo:rsid="0137ee55" officeooo:paragraph-rsid="0137ee55"/>
    </style:style>
    <style:style style:name="P96" style:family="paragraph" style:parent-style-name="paragraph">
      <style:text-properties fo:language="sr" fo:country="RS" officeooo:rsid="01392c6a" officeooo:paragraph-rsid="01392c6a"/>
    </style:style>
    <style:style style:name="P97" style:family="paragraph" style:parent-style-name="paragraph">
      <style:text-properties fo:font-size="12pt" fo:language="en" fo:country="US" officeooo:rsid="01392c6a" officeooo:paragraph-rsid="01392c6a" style:font-name-asian="Times New Roman1" style:font-size-asian="12pt" style:font-name-complex="Times New Roman1" style:font-size-complex="12pt"/>
    </style:style>
    <style:style style:name="P98" style:family="paragraph" style:parent-style-name="paragraph">
      <style:text-properties fo:font-size="12pt" fo:language="sr" fo:country="RS" officeooo:rsid="01392c6a" officeooo:paragraph-rsid="01392c6a" style:font-name-asian="Times New Roman1" style:font-size-asian="12pt" style:font-name-complex="Times New Roman1" style:font-size-complex="12pt"/>
    </style:style>
    <style:style style:name="P99" style:family="paragraph" style:parent-style-name="Heading_20_3">
      <style:paragraph-properties fo:margin-left="1.302cm" fo:margin-right="0cm" fo:text-indent="-0.954cm" style:auto-text-indent="false"/>
      <style:text-properties fo:language="sr" fo:country="RS" officeooo:rsid="0137ee55" officeooo:paragraph-rsid="0139e2ed"/>
    </style:style>
    <style:style style:name="P100" style:family="paragraph" style:parent-style-name="paragraph">
      <style:text-properties fo:font-size="12pt" fo:language="sr" fo:country="RS" officeooo:rsid="01392c6a" officeooo:paragraph-rsid="0139e2ed" style:font-name-asian="Times New Roman1" style:font-size-asian="12pt" style:font-name-complex="Times New Roman1" style:font-size-complex="12pt"/>
    </style:style>
    <style:style style:name="P101" style:family="paragraph" style:parent-style-name="paragraph">
      <style:text-properties fo:font-size="12pt" fo:language="en" fo:country="US" officeooo:rsid="0139e2ed" officeooo:paragraph-rsid="0139e2ed" style:font-name-asian="Times New Roman1" style:font-size-asian="12pt" style:font-name-complex="Times New Roman1" style:font-size-complex="12pt"/>
    </style:style>
    <style:style style:name="P102" style:family="paragraph" style:parent-style-name="paragraph">
      <style:text-properties fo:font-size="12pt" fo:language="sr" fo:country="RS" officeooo:rsid="0139e2ed" officeooo:paragraph-rsid="0139e2ed" style:font-name-asian="Times New Roman1" style:font-size-asian="12pt" style:font-name-complex="Times New Roman1" style:font-size-complex="12pt"/>
    </style:style>
    <style:style style:name="P103" style:family="paragraph" style:parent-style-name="Heading_20_3">
      <style:paragraph-properties fo:margin-left="1.302cm" fo:margin-right="0cm" fo:text-indent="-0.954cm" style:auto-text-indent="false"/>
      <style:text-properties fo:language="sr" fo:country="RS" officeooo:rsid="0139e2ed" officeooo:paragraph-rsid="0139e2ed"/>
    </style:style>
    <style:style style:name="P104" style:family="paragraph" style:parent-style-name="Heading_20_2">
      <style:paragraph-properties fo:margin-left="1.302cm" fo:margin-right="0cm" fo:text-indent="-0.954cm" style:auto-text-indent="false"/>
      <style:text-properties fo:language="sr" fo:country="RS" officeooo:rsid="0139e2ed" officeooo:paragraph-rsid="0139e2ed"/>
    </style:style>
    <style:style style:name="P105" style:family="paragraph" style:parent-style-name="paragraph">
      <style:text-properties fo:font-size="12pt" fo:language="sr" fo:country="RS" officeooo:rsid="013ae8eb" officeooo:paragraph-rsid="013ae8eb" style:font-name-asian="Times New Roman1" style:font-size-asian="12pt" style:font-name-complex="Times New Roman1" style:font-size-complex="12pt"/>
    </style:style>
    <style:style style:name="P106" style:family="paragraph" style:parent-style-name="paragraph">
      <style:text-properties fo:font-size="12pt" fo:language="en" fo:country="US" officeooo:rsid="013ae8eb" officeooo:paragraph-rsid="013ae8eb" style:font-name-asian="Times New Roman1" style:font-size-asian="12pt" style:font-name-complex="Times New Roman1" style:font-size-complex="12pt"/>
    </style:style>
    <style:style style:name="P107" style:family="paragraph" style:parent-style-name="paragraph">
      <style:text-properties fo:font-size="12pt" fo:language="sr" fo:country="RS" officeooo:rsid="013c0fc1" officeooo:paragraph-rsid="013df047" style:font-name-asian="Times New Roman1" style:font-size-asian="12pt" style:font-name-complex="Times New Roman1" style:font-size-complex="12pt"/>
    </style:style>
    <style:style style:name="P108" style:family="paragraph" style:parent-style-name="paragraph">
      <style:text-properties fo:font-size="12pt" fo:language="sr" fo:country="RS" officeooo:rsid="013df047" officeooo:paragraph-rsid="013df047" style:font-name-asian="Times New Roman1" style:font-size-asian="12pt" style:font-name-complex="Times New Roman1" style:font-size-complex="12pt"/>
    </style:style>
    <style:style style:name="P109" style:family="paragraph" style:parent-style-name="Heading_20_2">
      <style:paragraph-properties fo:margin-left="1.302cm" fo:margin-right="0cm" fo:text-indent="-0.954cm" style:auto-text-indent="false"/>
      <style:text-properties fo:language="sr" fo:country="RS" officeooo:rsid="013e78f4" officeooo:paragraph-rsid="013e78f4"/>
    </style:style>
    <style:style style:name="P110" style:family="paragraph" style:parent-style-name="paragraph">
      <style:text-properties fo:font-size="12pt" fo:language="sr" fo:country="RS" officeooo:rsid="013e78f4" officeooo:paragraph-rsid="013e78f4" style:font-name-asian="Times New Roman1" style:font-size-asian="12pt" style:font-name-complex="Times New Roman1" style:font-size-complex="12pt"/>
    </style:style>
    <style:style style:name="P111" style:family="paragraph" style:parent-style-name="paragraph">
      <style:text-properties fo:font-size="12pt" fo:language="sr" fo:country="RS" officeooo:rsid="013fdb87" officeooo:paragraph-rsid="013fdb87" style:font-name-asian="Times New Roman1" style:font-size-asian="12pt" style:font-name-complex="Times New Roman1" style:font-size-complex="12pt"/>
    </style:style>
    <style:style style:name="P112" style:family="paragraph" style:parent-style-name="paragraph">
      <style:text-properties fo:font-size="12pt" fo:language="sr" fo:country="RS" officeooo:rsid="01415812" officeooo:paragraph-rsid="01415812" style:font-name-asian="Times New Roman1" style:font-size-asian="12pt" style:font-name-complex="Times New Roman1" style:font-size-complex="12pt"/>
    </style:style>
    <style:style style:name="P113" style:family="paragraph" style:parent-style-name="paragraph" style:list-style-name="L6">
      <style:text-properties fo:font-size="12pt" fo:language="sr" fo:country="RS" officeooo:rsid="01415812" officeooo:paragraph-rsid="01415812" style:font-name-asian="Times New Roman1" style:font-size-asian="12pt" style:font-name-complex="Times New Roman1" style:font-size-complex="12pt"/>
    </style:style>
    <style:style style:name="P114" style:family="paragraph" style:parent-style-name="paragraph" style:list-style-name="L6">
      <style:text-properties fo:font-size="12pt" fo:language="sr" fo:country="RS" officeooo:rsid="0141f000" officeooo:paragraph-rsid="0141f000" style:font-name-asian="Times New Roman1" style:font-size-asian="12pt" style:font-name-complex="Times New Roman1" style:font-size-complex="12pt"/>
    </style:style>
    <style:style style:name="P115" style:family="paragraph" style:parent-style-name="Heading_20_1">
      <style:paragraph-properties fo:margin-left="1.302cm" fo:margin-right="0cm" fo:text-indent="-0.954cm" style:auto-text-indent="false" fo:break-before="page"/>
      <style:text-properties fo:language="sr" fo:country="RS" officeooo:rsid="014838ce" officeooo:paragraph-rsid="014838ce"/>
    </style:style>
    <style:style style:name="P116" style:family="paragraph" style:parent-style-name="paragraph">
      <style:text-properties fo:font-size="12pt" fo:language="sr" fo:country="RS" officeooo:rsid="014838ce" officeooo:paragraph-rsid="014838ce" style:font-name-asian="Times New Roman1" style:font-size-asian="12pt" style:font-name-complex="Times New Roman1" style:font-size-complex="12pt"/>
    </style:style>
    <style:style style:name="P117" style:family="paragraph" style:parent-style-name="paragraph">
      <style:text-properties fo:font-size="12pt" fo:language="en" fo:country="US" officeooo:rsid="01487fc6" officeooo:paragraph-rsid="01487fc6" style:font-name-asian="Times New Roman1" style:font-size-asian="12pt" style:font-name-complex="Times New Roman1" style:font-size-complex="12pt"/>
    </style:style>
    <style:style style:name="P118" style:family="paragraph" style:parent-style-name="paragraph">
      <style:text-properties fo:font-size="12pt" fo:language="sr" fo:country="RS" officeooo:rsid="01487fc6" officeooo:paragraph-rsid="01487fc6" style:font-name-asian="Times New Roman1" style:font-size-asian="12pt" style:font-name-complex="Times New Roman1" style:font-size-complex="12pt"/>
    </style:style>
    <style:style style:name="P119" style:family="paragraph" style:parent-style-name="paragraph">
      <style:paragraph-properties fo:text-align="start" style:justify-single-word="false"/>
      <style:text-properties fo:font-size="12pt" fo:language="en" fo:country="US" officeooo:rsid="01487fc6" officeooo:paragraph-rsid="014b1191" style:font-name-asian="Times New Roman1" style:font-size-asian="12pt" style:font-name-complex="Times New Roman1" style:font-size-complex="12pt"/>
    </style:style>
    <style:style style:name="P120" style:family="paragraph" style:parent-style-name="paragraph">
      <style:text-properties fo:font-size="12pt" fo:language="sr" fo:country="RS" officeooo:rsid="014838ce" officeooo:paragraph-rsid="014d0916" style:font-name-asian="Times New Roman1" style:font-size-asian="12pt" style:font-name-complex="Times New Roman1" style:font-size-complex="12pt"/>
    </style:style>
    <style:style style:name="P121" style:family="paragraph" style:parent-style-name="paragraph">
      <style:paragraph-properties fo:text-align="start" style:justify-single-word="false"/>
      <style:text-properties fo:font-size="12pt" officeooo:rsid="01487fc6" officeooo:paragraph-rsid="014eca15" style:font-name-asian="Times New Roman1" style:font-size-asian="12pt" style:font-name-complex="Times New Roman1" style:font-size-complex="12pt"/>
    </style:style>
    <style:style style:name="P122" style:family="paragraph" style:parent-style-name="paragraph">
      <style:text-properties fo:language="sr" fo:country="RS" officeooo:rsid="01536b11" officeooo:paragraph-rsid="01536b11"/>
    </style:style>
    <style:style style:name="P123" style:family="paragraph" style:parent-style-name="paragraph">
      <style:text-properties fo:font-size="12pt" fo:language="sr" fo:country="RS" fo:font-style="normal" officeooo:rsid="01568e73" officeooo:paragraph-rsid="01568e73" style:font-name-asian="Times New Roman1" style:font-size-asian="12pt" style:font-style-asian="normal" style:font-name-complex="Times New Roman1" style:font-size-complex="12pt" style:font-style-complex="normal"/>
    </style:style>
    <style:style style:name="P124" style:family="paragraph" style:parent-style-name="Heading_20_1">
      <style:paragraph-properties fo:margin-left="1.302cm" fo:margin-right="0cm" fo:text-indent="-0.954cm" style:auto-text-indent="false" fo:break-before="page"/>
      <style:text-properties fo:language="sr" fo:country="RS" officeooo:rsid="0051367e" officeooo:paragraph-rsid="0051367e"/>
    </style:style>
    <style:style style:name="P125" style:family="paragraph" style:parent-style-name="paragraph">
      <style:text-properties fo:font-size="12pt" fo:language="sr" fo:country="RS" officeooo:rsid="0156ff92" officeooo:paragraph-rsid="0156ff92" style:font-name-asian="Times New Roman1" style:font-size-asian="12pt" style:font-name-complex="Times New Roman1" style:font-size-complex="12pt"/>
    </style:style>
    <style:style style:name="P126" style:family="paragraph" style:parent-style-name="paragraph">
      <style:text-properties fo:font-size="12pt" fo:language="sr" fo:country="RS" officeooo:rsid="0159292e" officeooo:paragraph-rsid="0159292e" style:font-name-asian="Times New Roman1" style:font-size-asian="12pt" style:font-name-complex="Times New Roman1" style:font-size-complex="12pt"/>
    </style:style>
    <style:style style:name="P127" style:family="paragraph" style:parent-style-name="paragraph">
      <style:text-properties fo:font-size="12pt" fo:language="sr" fo:country="RS" officeooo:rsid="015cae3e" officeooo:paragraph-rsid="015cae3e" style:font-name-asian="Times New Roman1" style:font-size-asian="12pt" style:font-name-complex="Times New Roman1" style:font-size-complex="12pt"/>
    </style:style>
    <style:style style:name="P128" style:family="paragraph" style:parent-style-name="Heading_20_1">
      <style:paragraph-properties fo:margin-left="1.302cm" fo:margin-right="0cm" fo:text-indent="-0.954cm" style:auto-text-indent="false" fo:break-before="page"/>
      <style:text-properties fo:language="sr" fo:country="RS"/>
    </style:style>
    <style:style style:name="P129" style:family="paragraph" style:parent-style-name="paragraph" style:list-style-name="WWNum2">
      <style:paragraph-properties fo:margin-left="1.27cm" fo:margin-right="0cm" fo:text-indent="-0.635cm" style:auto-text-indent="false"/>
      <style:text-properties fo:language="en" fo:country="US" officeooo:rsid="00d82327" officeooo:paragraph-rsid="00d82327"/>
    </style:style>
    <style:style style:name="P130" style:family="paragraph" style:parent-style-name="paragraph" style:list-style-name="WWNum2">
      <style:paragraph-properties fo:margin-left="1.27cm" fo:margin-right="0cm" fo:text-indent="-0.635cm" style:auto-text-indent="false"/>
      <style:text-properties style:rfc-language-tag="sr-Latn-RS" fo:language="sr" fo:script="Latn" fo:country="RS" officeooo:rsid="01065ccb" officeooo:paragraph-rsid="01065ccb"/>
    </style:style>
    <style:style style:name="P131" style:family="paragraph" style:parent-style-name="paragraph" style:list-style-name="WWNum2">
      <style:paragraph-properties fo:margin-left="1.27cm" fo:margin-right="0cm" fo:text-indent="-0.635cm" style:auto-text-indent="false"/>
      <style:text-properties fo:language="en" fo:country="US" officeooo:rsid="01272b64" officeooo:paragraph-rsid="01272b64"/>
    </style:style>
    <style:style style:name="P132" style:family="paragraph" style:parent-style-name="paragraph" style:list-style-name="WWNum2">
      <style:paragraph-properties fo:margin-left="1.27cm" fo:margin-right="0cm" fo:text-indent="-0.635cm" style:auto-text-indent="false"/>
      <style:text-properties fo:language="en" fo:country="US" officeooo:rsid="0156ff92" officeooo:paragraph-rsid="0156ff92"/>
    </style:style>
    <style:style style:name="T1" style:family="text">
      <style:text-properties style:use-window-font-color="true" loext:opacity="0%" fo:font-size="16pt" fo:font-weight="normal" officeooo:rsid="001da82d" fo:background-color="transparent" loext:char-shading-value="0" style:font-size-asian="16pt" style:font-weight-asian="normal" style:font-size-complex="16pt" style:font-weight-complex="normal"/>
    </style:style>
    <style:style style:name="T2" style:family="text">
      <style:text-properties fo:color="#000000" loext:opacity="100%" fo:font-size="18pt" fo:language="sr" fo:country="RS" fo:font-weight="bold" fo:background-color="#ffffff" loext:char-shading-value="0" style:font-name-asian="Times New Roman1" style:font-size-asian="18pt" style:font-weight-asian="bold" style:font-name-complex="Times New Roman1" style:font-size-complex="18pt" style:font-weight-complex="bold"/>
    </style:style>
    <style:style style:name="T3" style:family="text">
      <style:text-properties style:use-window-font-color="true" loext:opacity="0%" fo:font-size="18pt" fo:language="sr" fo:country="RS" fo:font-weight="bold" officeooo:rsid="00ff874d" fo:background-color="transparent" loext:char-shading-value="0" style:font-name-asian="Times New Roman1" style:font-size-asian="18pt" style:font-weight-asian="bold" style:font-name-complex="Times New Roman1" style:font-size-complex="18pt" style:font-weight-complex="bold"/>
    </style:style>
    <style:style style:name="T4" style:family="text">
      <style:text-properties style:use-window-font-color="true" loext:opacity="0%" fo:font-size="18pt" fo:language="en" fo:country="US" fo:font-weight="bold" officeooo:rsid="00ff874d" fo:background-color="transparent" loext:char-shading-value="0" style:font-name-asian="Times New Roman1" style:font-size-asian="18pt" style:font-weight-asian="bold" style:font-name-complex="Times New Roman1" style:font-size-complex="18pt" style:font-weight-complex="bold"/>
    </style:style>
    <style:style style:name="T5" style:family="text">
      <style:text-properties style:use-window-font-color="true" loext:opacity="0%" fo:font-size="18pt" fo:language="en" fo:country="US" fo:font-weight="bold" officeooo:rsid="00fbcf1a" fo:background-color="transparent" loext:char-shading-value="0" style:font-name-asian="Times New Roman1" style:font-size-asian="18pt" style:font-weight-asian="bold" style:font-name-complex="Times New Roman1" style:font-size-complex="18pt" style:font-weight-complex="bold"/>
    </style:style>
    <style:style style:name="T6" style:family="text">
      <style:text-properties style:use-window-font-color="true" loext:opacity="0%" fo:font-size="18pt" fo:language="sr" fo:country="RS" fo:font-weight="bold" officeooo:rsid="00fbcf1a" fo:background-color="transparent" loext:char-shading-value="0" style:font-name-asian="Times New Roman1" style:font-size-asian="18pt" style:font-weight-asian="bold" style:font-name-complex="Times New Roman1" style:font-size-complex="18pt" style:font-weight-complex="bold"/>
    </style:style>
    <style:style style:name="T7" style:family="text">
      <style:text-properties style:use-window-font-color="true" loext:opacity="0%" fo:font-size="18pt" fo:language="sr" fo:country="RS" fo:font-weight="bold" officeooo:rsid="0131bd6a" fo:background-color="transparent" loext:char-shading-value="0" style:font-name-asian="Times New Roman1" style:font-size-asian="18pt" style:font-weight-asian="bold" style:font-name-complex="Times New Roman1" style:font-size-complex="18pt" style:font-weight-complex="bold"/>
    </style:style>
    <style:style style:name="T8" style:family="text">
      <style:text-properties style:use-window-font-color="true" loext:opacity="0%" fo:font-size="18pt" fo:language="en" fo:country="US" fo:font-weight="bold" officeooo:rsid="0131bd6a" fo:background-color="transparent" loext:char-shading-value="0" style:font-name-asian="Times New Roman1" style:font-size-asian="18pt" style:font-weight-asian="bold" style:font-name-complex="Times New Roman1" style:font-size-complex="18pt" style:font-weight-complex="bold"/>
    </style:style>
    <style:style style:name="T9" style:family="text">
      <style:text-properties style:use-window-font-color="true" loext:opacity="0%" fo:font-size="14pt" fo:language="sr" fo:country="RS" officeooo:rsid="00413cb9" style:font-name-asian="Times New Roman1" style:font-size-asian="14pt" style:font-name-complex="Times New Roman1" style:font-size-complex="14pt"/>
    </style:style>
    <style:style style:name="T10" style:family="text">
      <style:text-properties style:use-window-font-color="true" loext:opacity="0%" fo:font-size="14pt" style:font-size-asian="14pt" style:font-size-complex="14pt"/>
    </style:style>
    <style:style style:name="T11" style:family="text">
      <style:text-properties style:use-window-font-color="true" loext:opacity="0%" fo:font-size="14pt" fo:language="sr" fo:country="RS" style:font-name-asian="Times New Roman1" style:font-size-asian="14pt" style:font-name-complex="Times New Roman1" style:font-size-complex="14pt"/>
    </style:style>
    <style:style style:name="T12" style:family="text">
      <style:text-properties style:use-window-font-color="true" loext:opacity="0%" fo:font-size="14pt" fo:language="sr" fo:country="RS" officeooo:rsid="00be3553" style:font-name-asian="Times New Roman1" style:font-size-asian="14pt" style:font-name-complex="Times New Roman1" style:font-size-complex="14pt"/>
    </style:style>
    <style:style style:name="T13" style:family="text">
      <style:text-properties officeooo:rsid="00413cb9"/>
    </style:style>
    <style:style style:name="T14" style:family="text">
      <style:text-properties officeooo:rsid="00be3553"/>
    </style:style>
    <style:style style:name="T15" style:family="text">
      <style:text-properties officeooo:rsid="00fbcf1a"/>
    </style:style>
    <style:style style:name="T16" style:family="text">
      <style:text-properties fo:font-size="16pt" fo:letter-spacing="0.002cm" fo:language="sr" fo:country="RS" style:font-name-asian="Times New Roman1" style:font-size-asian="16pt" style:font-name-complex="Times New Roman1" style:font-size-complex="16pt"/>
    </style:style>
    <style:style style:name="T17" style:family="text">
      <style:text-properties fo:font-size="16pt" fo:letter-spacing="0.002cm" style:font-size-asian="16pt" style:font-size-complex="16pt"/>
    </style:style>
    <style:style style:name="T18" style:family="text">
      <style:text-properties style:use-window-font-color="true" loext:opacity="0%" fo:font-size="12pt" fo:language="sr" fo:country="RS" fo:font-weight="bold" officeooo:rsid="00ff874d" fo:background-color="transparent" loext:char-shading-value="0" style:font-name-asian="Times New Roman1" style:font-size-asian="12pt" style:font-weight-asian="bold" style:font-name-complex="Times New Roman1" style:font-size-complex="12pt" style:font-weight-complex="bold"/>
    </style:style>
    <style:style style:name="T19" style:family="text">
      <style:text-properties style:use-window-font-color="true" loext:opacity="0%" fo:font-size="12pt" fo:language="en" fo:country="US" fo:font-weight="bold" officeooo:rsid="00ff874d" fo:background-color="transparent" loext:char-shading-value="0" style:font-name-asian="Times New Roman1" style:font-size-asian="12pt" style:font-weight-asian="bold" style:font-name-complex="Times New Roman1" style:font-size-complex="12pt" style:font-weight-complex="bold"/>
    </style:style>
    <style:style style:name="T20" style:family="text">
      <style:text-properties style:use-window-font-color="true" loext:opacity="0%" fo:font-size="12pt" fo:language="en" fo:country="US" fo:font-weight="bold" officeooo:rsid="00cf7fe5" fo:background-color="transparent" loext:char-shading-value="0" style:font-name-asian="Times New Roman1" style:font-size-asian="12pt" style:font-weight-asian="bold" style:font-name-complex="Times New Roman1" style:font-size-complex="12pt" style:font-weight-complex="bold"/>
    </style:style>
    <style:style style:name="T21" style:family="text">
      <style:text-properties style:use-window-font-color="true" loext:opacity="0%" fo:font-size="12pt" fo:language="sr" fo:country="RS" fo:font-weight="bold" officeooo:rsid="00cf7fe5" fo:background-color="transparent" loext:char-shading-value="0" style:font-name-asian="Times New Roman1" style:font-size-asian="12pt" style:font-weight-asian="bold" style:font-name-complex="Times New Roman1" style:font-size-complex="12pt" style:font-weight-complex="bold"/>
    </style:style>
    <style:style style:name="T22" style:family="text">
      <style:text-properties style:use-window-font-color="true" loext:opacity="0%" fo:font-size="14pt" fo:language="sr" fo:country="RS" fo:font-weight="bold" officeooo:rsid="0054ab56" style:font-name-asian="Times New Roman1" style:font-size-asian="14pt" style:font-weight-asian="bold" style:font-name-complex="Times New Roman1" style:font-size-complex="14pt" style:font-weight-complex="bold"/>
    </style:style>
    <style:style style:name="T23" style:family="text">
      <style:text-properties style:use-window-font-color="true" loext:opacity="0%" fo:font-size="14pt" fo:language="sr" fo:country="RS" fo:font-weight="bold" style:font-name-asian="Times New Roman1" style:font-size-asian="14pt" style:font-weight-asian="bold" style:font-name-complex="Times New Roman1" style:font-size-complex="14pt" style:font-weight-complex="bold"/>
    </style:style>
    <style:style style:name="T24" style:family="text">
      <style:text-properties style:use-window-font-color="true" loext:opacity="0%" fo:font-size="14pt" fo:language="sr" fo:country="RS" officeooo:rsid="00428376" style:font-name-asian="Times New Roman1" style:font-size-asian="14pt" style:font-name-complex="Times New Roman1" style:font-size-complex="14pt"/>
    </style:style>
    <style:style style:name="T25" style:family="text">
      <style:text-properties style:use-window-font-color="true" loext:opacity="0%" fo:language="sr" fo:country="RS" style:text-underline-style="solid" style:text-underline-width="auto" style:text-underline-color="font-color" fo:background-color="transparent" loext:char-shading-value="0"/>
    </style:style>
    <style:style style:name="T26" style:family="text">
      <style:text-properties style:use-window-font-color="true" loext:opacity="0%" fo:background-color="transparent" loext:char-shading-value="0"/>
    </style:style>
    <style:style style:name="T27" style:family="text">
      <style:text-properties style:use-window-font-color="true" loext:opacity="0%" officeooo:rsid="015fa946" fo:background-color="transparent" loext:char-shading-value="0"/>
    </style:style>
    <style:style style:name="T28" style:family="text">
      <style:text-properties officeooo:rsid="00fdc457"/>
    </style:style>
    <style:style style:name="T29" style:family="text">
      <style:text-properties officeooo:rsid="00fe023d"/>
    </style:style>
    <style:style style:name="T30" style:family="text">
      <style:text-properties fo:language="en" fo:country="US" officeooo:rsid="00fe023d"/>
    </style:style>
    <style:style style:name="T31" style:family="text">
      <style:text-properties fo:language="en" fo:country="US" fo:font-style="italic" style:font-style-asian="italic" style:font-style-complex="italic"/>
    </style:style>
    <style:style style:name="T32" style:family="text">
      <style:text-properties fo:language="en" fo:country="US" officeooo:rsid="01016627"/>
    </style:style>
    <style:style style:name="T33" style:family="text">
      <style:text-properties officeooo:rsid="01016627"/>
    </style:style>
    <style:style style:name="T34" style:family="text">
      <style:text-properties officeooo:rsid="01023aa3"/>
    </style:style>
    <style:style style:name="T35" style:family="text">
      <style:text-properties fo:language="en" fo:country="US" officeooo:rsid="01023aa3"/>
    </style:style>
    <style:style style:name="T36" style:family="text">
      <style:text-properties fo:language="en" fo:country="US" fo:font-style="italic" officeooo:rsid="01023aa3" style:font-style-asian="italic" style:font-style-complex="italic"/>
    </style:style>
    <style:style style:name="T37" style:family="text">
      <style:text-properties officeooo:rsid="010695c6"/>
    </style:style>
    <style:style style:name="T38" style:family="text">
      <style:text-properties fo:language="en" fo:country="US"/>
    </style:style>
    <style:style style:name="T39" style:family="text">
      <style:text-properties officeooo:rsid="0107ad75"/>
    </style:style>
    <style:style style:name="T40" style:family="text">
      <style:text-properties fo:font-size="12pt" style:font-name-asian="Times New Roman1" style:font-size-asian="12pt" style:font-name-complex="Times New Roman1" style:font-size-complex="12pt"/>
    </style:style>
    <style:style style:name="T41" style:family="text">
      <style:text-properties fo:font-size="12pt" officeooo:rsid="01098b02" style:font-name-asian="Times New Roman1" style:font-size-asian="12pt" style:font-name-complex="Times New Roman1" style:font-size-complex="12pt"/>
    </style:style>
    <style:style style:name="T42" style:family="text">
      <style:text-properties style:font-name-asian="Times New Roman1" style:font-name-complex="Times New Roman1"/>
    </style:style>
    <style:style style:name="T43" style:family="text">
      <style:text-properties officeooo:rsid="012385ba"/>
    </style:style>
    <style:style style:name="T44" style:family="text">
      <style:text-properties officeooo:rsid="010db8b1"/>
    </style:style>
    <style:style style:name="T45" style:family="text">
      <style:text-properties officeooo:rsid="010ed5a7"/>
    </style:style>
    <style:style style:name="T46" style:family="text">
      <style:text-properties officeooo:rsid="01108f59"/>
    </style:style>
    <style:style style:name="T47" style:family="text">
      <style:text-properties officeooo:rsid="01114fd4"/>
    </style:style>
    <style:style style:name="T48" style:family="text">
      <style:text-properties officeooo:rsid="01132307"/>
    </style:style>
    <style:style style:name="T49" style:family="text">
      <style:text-properties fo:language="en" fo:country="US" officeooo:rsid="01132307"/>
    </style:style>
    <style:style style:name="T50" style:family="text">
      <style:text-properties fo:language="sr" fo:country="RS"/>
    </style:style>
    <style:style style:name="T51" style:family="text">
      <style:text-properties officeooo:rsid="01144ffb"/>
    </style:style>
    <style:style style:name="T52" style:family="text">
      <style:text-properties officeooo:rsid="01148087"/>
    </style:style>
    <style:style style:name="T53" style:family="text">
      <style:text-properties fo:language="en" fo:country="US" officeooo:rsid="01144ffb"/>
    </style:style>
    <style:style style:name="T54" style:family="text">
      <style:text-properties officeooo:rsid="011612cb"/>
    </style:style>
    <style:style style:name="T55" style:family="text">
      <style:text-properties officeooo:rsid="0117b170"/>
    </style:style>
    <style:style style:name="T56" style:family="text">
      <style:text-properties officeooo:rsid="011876e8"/>
    </style:style>
    <style:style style:name="T57" style:family="text">
      <style:text-properties officeooo:rsid="0119fb60"/>
    </style:style>
    <style:style style:name="T58" style:family="text">
      <style:text-properties officeooo:rsid="01246b4f"/>
    </style:style>
    <style:style style:name="T59" style:family="text">
      <style:text-properties officeooo:rsid="011a9a81"/>
    </style:style>
    <style:style style:name="T60" style:family="text">
      <style:text-properties officeooo:rsid="01252ed3"/>
    </style:style>
    <style:style style:name="T61" style:family="text">
      <style:text-properties fo:font-style="italic" style:font-style-asian="italic" style:font-style-complex="italic"/>
    </style:style>
    <style:style style:name="T62" style:family="text">
      <style:text-properties fo:language="en" fo:country="US" fo:font-style="normal" style:font-style-asian="normal" style:font-style-complex="normal"/>
    </style:style>
    <style:style style:name="T63" style:family="text">
      <style:text-properties fo:font-style="normal" style:font-style-asian="normal" style:font-style-complex="normal"/>
    </style:style>
    <style:style style:name="T64" style:family="text">
      <style:text-properties fo:font-style="normal" officeooo:rsid="011bd8e5" style:font-style-asian="normal" style:font-style-complex="normal"/>
    </style:style>
    <style:style style:name="T65" style:family="text">
      <style:text-properties officeooo:rsid="011bd8e5"/>
    </style:style>
    <style:style style:name="T66" style:family="text">
      <style:text-properties fo:language="en" fo:country="US" fo:font-style="normal" officeooo:rsid="01132307" style:font-style-asian="normal" style:font-style-complex="normal"/>
    </style:style>
    <style:style style:name="T67" style:family="text">
      <style:text-properties style:rfc-language-tag="sr-Latn-RS" fo:language="sr" fo:script="Latn" fo:country="RS" fo:font-style="normal" style:font-style-asian="normal" style:font-style-complex="normal"/>
    </style:style>
    <style:style style:name="T68" style:family="text">
      <style:text-properties officeooo:rsid="011c8aa9"/>
    </style:style>
    <style:style style:name="T69" style:family="text">
      <style:text-properties fo:language="en" fo:country="US" officeooo:rsid="011c8aa9"/>
    </style:style>
    <style:style style:name="T70" style:family="text">
      <style:text-properties fo:font-style="normal" officeooo:rsid="011c8aa9" style:font-style-asian="normal" style:font-style-complex="normal"/>
    </style:style>
    <style:style style:name="T71" style:family="text">
      <style:text-properties fo:font-style="normal" officeooo:rsid="011e3de5" style:font-style-asian="normal" style:font-style-complex="normal"/>
    </style:style>
    <style:style style:name="T72" style:family="text">
      <style:text-properties fo:font-style="normal" officeooo:rsid="011f5a07" style:font-style-asian="normal" style:font-style-complex="normal"/>
    </style:style>
    <style:style style:name="T73" style:family="text">
      <style:text-properties fo:language="en" fo:country="US" fo:font-style="normal" officeooo:rsid="011e3de5" style:font-style-asian="normal" style:font-style-complex="normal"/>
    </style:style>
    <style:style style:name="T74" style:family="text">
      <style:text-properties style:rfc-language-tag="sr-Latn-RS" fo:language="sr" fo:script="Latn" fo:country="RS"/>
    </style:style>
    <style:style style:name="T75" style:family="text">
      <style:text-properties officeooo:rsid="011f5a07"/>
    </style:style>
    <style:style style:name="T76" style:family="text">
      <style:text-properties fo:language="en" fo:country="US" officeooo:rsid="011f5a07"/>
    </style:style>
    <style:style style:name="T77" style:family="text">
      <style:text-properties style:rfc-language-tag="sr-Latn-RS" fo:language="sr" fo:script="Latn" fo:country="RS" officeooo:rsid="011f5a07"/>
    </style:style>
    <style:style style:name="T78" style:family="text">
      <style:text-properties officeooo:rsid="01204530"/>
    </style:style>
    <style:style style:name="T79" style:family="text">
      <style:text-properties fo:language="en" fo:country="US" officeooo:rsid="01204530"/>
    </style:style>
    <style:style style:name="T80" style:family="text">
      <style:text-properties officeooo:rsid="0129ed23"/>
    </style:style>
    <style:style style:name="T81" style:family="text">
      <style:text-properties officeooo:rsid="012b53fc"/>
    </style:style>
    <style:style style:name="T82" style:family="text">
      <style:text-properties officeooo:rsid="012f45a1"/>
    </style:style>
    <style:style style:name="T83" style:family="text">
      <style:text-properties fo:language="sr" fo:country="RS" officeooo:rsid="01347a79"/>
    </style:style>
    <style:style style:name="T84" style:family="text">
      <style:text-properties officeooo:rsid="01347a79"/>
    </style:style>
    <style:style style:name="T85" style:family="text">
      <style:text-properties style:rfc-language-tag="sr-Latn-RS" fo:language="sr" fo:script="Latn" fo:country="RS" fo:font-style="italic" style:font-style-asian="italic" style:font-style-complex="italic"/>
    </style:style>
    <style:style style:name="T86" style:family="text">
      <style:text-properties fo:font-size="12pt" fo:language="en" fo:country="US" style:font-name-asian="Times New Roman1" style:font-size-asian="12pt" style:font-name-complex="Times New Roman1" style:font-size-complex="12pt"/>
    </style:style>
    <style:style style:name="T87" style:family="text">
      <style:text-properties fo:font-size="12pt" officeooo:rsid="0136e30f" style:font-name-asian="Times New Roman1" style:font-size-asian="12pt" style:font-name-complex="Times New Roman1" style:font-size-complex="12pt"/>
    </style:style>
    <style:style style:name="T88" style:family="text">
      <style:text-properties officeooo:rsid="0139e2ed"/>
    </style:style>
    <style:style style:name="T89" style:family="text">
      <style:text-properties fo:language="en" fo:country="US" officeooo:rsid="0139e2ed"/>
    </style:style>
    <style:style style:name="T90" style:family="text">
      <style:text-properties officeooo:rsid="013c0fc1"/>
    </style:style>
    <style:style style:name="T91" style:family="text">
      <style:text-properties fo:language="en" fo:country="US" officeooo:rsid="013c0fc1"/>
    </style:style>
    <style:style style:name="T92" style:family="text">
      <style:text-properties officeooo:rsid="013df047"/>
    </style:style>
    <style:style style:name="T93" style:family="text">
      <style:text-properties fo:language="en" fo:country="US" officeooo:rsid="013df047"/>
    </style:style>
    <style:style style:name="T94" style:family="text">
      <style:text-properties officeooo:rsid="01532dd8"/>
    </style:style>
    <style:style style:name="T95" style:family="text">
      <style:text-properties officeooo:rsid="01496d22"/>
    </style:style>
    <style:style style:name="T96" style:family="text">
      <style:text-properties officeooo:rsid="014b1191"/>
    </style:style>
    <style:style style:name="T97" style:family="text">
      <style:text-properties fo:language="en" fo:country="US" officeooo:rsid="014b1191"/>
    </style:style>
    <style:style style:name="T98" style:family="text">
      <style:text-properties fo:language="en" fo:country="US" officeooo:rsid="01487fc6"/>
    </style:style>
    <style:style style:name="T99" style:family="text">
      <style:text-properties officeooo:rsid="01487fc6"/>
    </style:style>
    <style:style style:name="T100" style:family="text">
      <style:text-properties fo:font-family="Consolas" style:font-family-generic="modern" style:font-pitch="fixed"/>
    </style:style>
    <style:style style:name="T101" style:family="text">
      <style:text-properties fo:font-family="Consolas" style:font-family-generic="modern" style:font-pitch="fixed" officeooo:rsid="01496d22"/>
    </style:style>
    <style:style style:name="T102" style:family="text">
      <style:text-properties fo:font-family="Consolas" style:font-family-generic="modern" style:font-pitch="fixed" officeooo:rsid="014dbd2b"/>
    </style:style>
    <style:style style:name="T103" style:family="text">
      <style:text-properties fo:font-family="Consolas" style:font-family-generic="modern" style:font-pitch="fixed" officeooo:rsid="014b1191"/>
    </style:style>
    <style:style style:name="T104" style:family="text">
      <style:text-properties officeooo:rsid="014d0916"/>
    </style:style>
    <style:style style:name="T105" style:family="text">
      <style:text-properties fo:font-family="Consolas" style:font-family-generic="modern" style:font-pitch="fixed" fo:language="en" fo:country="US"/>
    </style:style>
    <style:style style:name="T106" style:family="text">
      <style:text-properties fo:font-family="Consolas" style:font-family-generic="modern" style:font-pitch="fixed" fo:language="en" fo:country="US" officeooo:rsid="014dbd2b"/>
    </style:style>
    <style:style style:name="T107" style:family="text">
      <style:text-properties fo:font-family="Consolas" style:font-family-generic="modern" style:font-pitch="fixed" fo:language="en" fo:country="US" officeooo:rsid="014eca15"/>
    </style:style>
    <style:style style:name="T108" style:family="text">
      <style:text-properties fo:font-family="Consolas" style:font-family-generic="modern" style:font-pitch="fixed" fo:language="en" fo:country="US" officeooo:rsid="01496d22"/>
    </style:style>
    <style:style style:name="T109" style:family="text">
      <style:text-properties fo:font-family="Consolas" style:font-family-generic="modern" style:font-pitch="fixed" officeooo:rsid="014eca15"/>
    </style:style>
    <style:style style:name="T110" style:family="text">
      <style:text-properties fo:font-family="Consolas" style:font-family-generic="modern" style:font-pitch="fixed" officeooo:rsid="0150a6dc"/>
    </style:style>
    <style:style style:name="T111" style:family="text">
      <style:text-properties fo:font-family="Consolas" style:font-family-generic="modern" style:font-pitch="fixed" officeooo:rsid="01515f1c"/>
    </style:style>
    <style:style style:name="T112" style:family="text">
      <style:text-properties fo:font-size="12pt" fo:font-style="normal" style:font-name-asian="Times New Roman1" style:font-size-asian="12pt" style:font-style-asian="normal" style:font-name-complex="Times New Roman1" style:font-size-complex="12pt" style:font-style-complex="normal"/>
    </style:style>
    <style:style style:name="T113" style:family="text">
      <style:text-properties fo:font-size="12pt" fo:language="en" fo:country="US" fo:font-style="normal" style:font-name-asian="Times New Roman1" style:font-size-asian="12pt" style:font-style-asian="normal" style:font-name-complex="Times New Roman1" style:font-size-complex="12pt" style:font-style-complex="normal"/>
    </style:style>
    <style:style style:name="T114" style:family="text">
      <style:text-properties fo:font-size="12pt" fo:font-style="normal" officeooo:rsid="01556a62" style:font-name-asian="Times New Roman1" style:font-size-asian="12pt" style:font-style-asian="normal" style:font-name-complex="Times New Roman1" style:font-size-complex="12pt" style:font-style-complex="normal"/>
    </style:style>
    <style:style style:name="T115" style:family="text">
      <style:text-properties officeooo:rsid="01569a44"/>
    </style:style>
    <style:style style:name="T116" style:family="text">
      <style:text-properties officeooo:rsid="01582991"/>
    </style:style>
    <style:style style:name="T117" style:family="text">
      <style:text-properties fo:language="en" fo:country="US" officeooo:rsid="01582991"/>
    </style:style>
    <style:style style:name="T118" style:family="text">
      <style:text-properties officeooo:rsid="0159292e"/>
    </style:style>
    <style:style style:name="T119" style:family="text">
      <style:text-properties officeooo:rsid="015aaf92"/>
    </style:style>
    <style:style style:name="T120" style:family="text">
      <style:text-properties officeooo:rsid="015c4868"/>
    </style:style>
    <style:style style:name="T121" style:family="text">
      <style:text-properties fo:language="en" fo:country="US" officeooo:rsid="015c4868"/>
    </style:style>
    <style:style style:name="T122" style:family="text">
      <style:text-properties officeooo:rsid="015dfc2b"/>
    </style:style>
    <style:style style:name="T123" style:family="text">
      <style:text-properties fo:language="sr" fo:country="RS" officeooo:rsid="00fdc457"/>
    </style:style>
    <style:style style:name="fr1" style:family="graphic" style:parent-style-name="Graphics">
      <style:graphic-properties fo:margin-left="0cm" fo:margin-right="0cm" fo:margin-top="0cm" fo:margin-bottom="0cm" style:vertical-pos="top" style:vertical-rel="paragraph" style:horizontal-pos="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paragraph" style:horizontal-pos="righ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s>
      <text:p text:style-name="P1"><draw:frame draw:style-name="fr1" draw:name="image1.png" text:anchor-type="paragraph" svg:width="2.401cm" svg:height="2.401cm" draw:z-index="0"><draw:image xlink:href="Pictures/10000001000000D3000000D3BEEA7A65.png" xlink:type="simple" xlink:show="embed" xlink:actuate="onLoad" draw:mime-type="image/png"/></draw:frame><draw:frame draw:style-name="fr2" draw:name="image2.png" text:anchor-type="paragraph" svg:width="2.327cm" svg:height="2.328cm" draw:z-index="1"><draw:image xlink:href="Pictures/10000001000000B0000000B03A3C75ED.png" xlink:type="simple" xlink:show="embed" xlink:actuate="onLoad" draw:mime-type="image/png"/></draw:frame><text:span text:style-name="normaltextrun"><text:span text:style-name="T1">УНИВЕРЗИТЕТ У НИШУ</text:span></text:span></text:p>
      <text:p text:style-name="P1"><text:span text:style-name="normaltextrun"><text:span text:style-name="T1">ЕЛЕКТРОНСКИ ФАКУЛТЕТ</text:span></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3"><text:span text:style-name="normaltextrun"><text:span text:style-name="T3">Аутоматизација</text:span></text:span><text:span text:style-name="normaltextrun"><text:span text:style-name="T4"> backup</text:span></text:span><text:span text:style-name="normaltextrun"><text:span text:style-name="T3"> процеса</text:span></text:span><text:span text:style-name="normaltextrun"><text:span text:style-name="T5"> </text:span></text:span><text:span text:style-name="normaltextrun"><text:span text:style-name="T6">код </text:span></text:span><text:span text:style-name="normaltextrun"><text:span text:style-name="T7">P</text:span></text:span><text:span text:style-name="normaltextrun"><text:span text:style-name="T8">ostgreSQL</text:span></text:span><text:span text:style-name="normaltextrun"><text:span text:style-name="T5"> </text:span></text:span><text:span text:style-name="normaltextrun"><text:span text:style-name="T6">база података</text:span></text:span></text:p>
      <text:p text:style-name="P4"/>
      <text:p text:style-name="P5"/>
      <text:p text:style-name="P6"><text:span text:style-name="normaltextrun"><text:span text:style-name="T9">Семинарски рад</text:span></text:span><text:span text:style-name="eop"><text:span text:style-name="T10"> </text:span></text:span></text:p>
      <text:p text:style-name="P6"><text:span text:style-name="normaltextrun"><text:span text:style-name="T11">Студијиски програм: </text:span></text:span><text:span text:style-name="normaltextrun"><text:span text:style-name="T9">Рачунарство и информатика</text:span></text:span></text:p>
      <text:p text:style-name="P7"><text:span text:style-name="normaltextrun"><text:span text:style-name="T11">Модул: </text:span></text:span><text:span text:style-name="normaltextrun"><text:span text:style-name="T9">Софтверско инжењерство</text:span></text:span></text:p>
      <text:p text:style-name="P7"><text:span text:style-name="normaltextrun"><text:span text:style-name="T9">Предмет: </text:span></text:span><text:span text:style-name="eop"><text:span text:style-name="T12">Системи за управљање базама података</text:span></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8"><text:span text:style-name="eop"><text:span text:style-name="T10"/></text:span></text:p>
      <text:p text:style-name="P9"/>
      <table:table table:name="Table1" table:style-name="Table1">
        <table:table-column table:style-name="Table1.A"/>
        <table:table-column table:style-name="Table1.B"/>
        <table:table-row table:style-name="Table1.1">
          <table:table-cell table:style-name="Table1.A1" office:value-type="string">
            <text:p text:style-name="P10">Студент:</text:p>
          </table:table-cell>
          <table:table-cell table:style-name="Table1.A1" office:value-type="string">
            <text:p text:style-name="P11">Ментор:</text:p>
          </table:table-cell>
        </table:table-row>
        <table:table-row table:style-name="Table1.1">
          <table:table-cell table:style-name="Table1.A1" office:value-type="string">
            <text:p text:style-name="P12">Алекса Јовановић <text:span text:style-name="T13">2090</text:span></text:p>
          </table:table-cell>
          <table:table-cell table:style-name="Table1.A1" office:value-type="string">
            <text:p text:style-name="P13"><text:span text:style-name="T14">проф. др</text:span> <text:span text:style-name="T14">Александар Станимировић</text:span></text:p>
          </table:table-cell>
        </table:table-row>
      </table:table>
      <text:p text:style-name="P5"/>
      <text:p text:style-name="P5"/>
      <text:p text:style-name="P14"/>
      <text:p text:style-name="P5"/>
      <text:p text:style-name="P15">Ниш, <text:span text:style-name="T15">јун</text:span> 202<text:span text:style-name="T13">6</text:span>. година</text:p>
      <text:p text:style-name="P16"><text:span text:style-name="T16">Универзитет у Нишу</text:span><text:span text:style-name="T17"> </text:span></text:p>
      <text:p text:style-name="P17">Електронски факултет</text:p>
      <text:p text:style-name="P18"/>
      <text:p text:style-name="P19"><text:span text:style-name="normaltextrun"><text:span text:style-name="T18">Аутоматизација</text:span></text:span><text:span text:style-name="normaltextrun"><text:span text:style-name="T19"> backup</text:span></text:span><text:span text:style-name="normaltextrun"><text:span text:style-name="T18"> процеса</text:span></text:span><text:span text:style-name="normaltextrun"><text:span text:style-name="T20"> </text:span></text:span><text:span text:style-name="normaltextrun"><text:span text:style-name="T21">код PostgreSQL база податак</text:span></text:span><text:span text:style-name="normaltextrun"><text:span text:style-name="T18">а</text:span></text:span></text:p>
      <text:p text:style-name="P20"/>
      <text:p text:style-name="P21"><text:span text:style-name="eop"><text:span text:style-name="T22">Семинарски</text:span></text:span><text:span text:style-name="eop"><text:span text:style-name="T23"> рад</text:span></text:span><text:span text:style-name="eop"><text:span text:style-name="T10"> </text:span></text:span></text:p>
      <text:p text:style-name="P22"><text:span text:style-name="eop"><text:span text:style-name="T10"> </text:span></text:span></text:p>
      <text:p text:style-name="P21"><text:span text:style-name="normaltextrun"><text:span text:style-name="T11">Студијиски програм: Електротехника и рачунарство</text:span></text:span><text:span text:style-name="eop"><text:span text:style-name="T10"> </text:span></text:span></text:p>
      <text:p text:style-name="P23"><text:span text:style-name="normaltextrun"><text:span text:style-name="T11">Модул: Рачунарство и информатика</text:span></text:span></text:p>
      <text:p text:style-name="P24"><text:span text:style-name="normaltextrun"><text:span text:style-name="T24">Предмет: </text:span></text:span><text:span text:style-name="eop"><text:span text:style-name="T12">Системи за управљање базама података</text:span></text:span></text:p>
      <text:p text:style-name="P25"/>
      <text:p text:style-name="P21"><text:span text:style-name="normaltextrun"><text:span text:style-name="T11">Студент: Алекса Јовановић, бр. инд. </text:span></text:span><text:span text:style-name="normaltextrun"><text:span text:style-name="T24">2090</text:span></text:span><text:span text:style-name="eop"><text:span text:style-name="T10"> </text:span></text:span></text:p>
      <text:p text:style-name="P21"><text:span text:style-name="normaltextrun"><text:span text:style-name="T11">Ментор: </text:span></text:span><text:span text:style-name="normaltextrun"><text:span text:style-name="T12">проф. др</text:span></text:span><text:span text:style-name="normaltextrun"><text:span text:style-name="T11"> </text:span></text:span><text:span text:style-name="eop"><text:span text:style-name="T12">Александар Станимировић</text:span></text:span></text:p>
      <text:p text:style-name="Text_20_body"/>
      <text:p text:style-name="P26"><text:span text:style-name="normaltextrun"><text:span text:style-name="T25">Задатак</text:span></text:span><text:span text:style-name="normaltextrun"><text:span text:style-name="T26">: </text:span></text:span><text:span text:style-name="normaltextrun"><text:span text:style-name="T27">/</text:span></text:span></text:p>
      <text:p text:style-name="P27"/>
      <text:p text:style-name="P27"/>
      <text:p text:style-name="P27"/>
      <text:p text:style-name="P27"/>
      <text:p text:style-name="P28"/>
      <text:p text:style-name="P29"/>
      <text:table-of-content text:style-name="Sect1" text:protected="true" text:name="Table of Contents1">
        <text:table-of-content-source text:outline-level="3" text:use-index-marks="false">
          <text:index-title-template text:style-name="Contents_20_Heading">САДРЖАЈ</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P30">САДРЖАЈ</text:p>
          </text:index-title>
          <text:p text:style-name="P31"><text:a xlink:type="simple" xlink:href="#__RefHeading___Toc12646_3546172039" office:name="Увод" text:style-name="Index_20_Link" text:visited-style-name="Index_20_Link">1 Увод<text:tab/>4</text:a></text:p>
          <text:p text:style-name="P31"><text:a xlink:type="simple" xlink:href="#__RefHeading___Toc17197_2913585186" office:name="Резервне копије" text:style-name="Index_20_Link" text:visited-style-name="Index_20_Link">2 Резервне копије<text:tab/>5</text:a></text:p>
          <text:p text:style-name="P32"><text:a xlink:type="simple" xlink:href="#__RefHeading___Toc802_4027400509%20Copy%201" office:name="Важност израде резервне копије" text:style-name="Index_20_Link" text:visited-style-name="Index_20_Link">2.1 Важност израде резервне копије<text:tab/>5</text:a></text:p>
          <text:p text:style-name="P32"><text:a xlink:type="simple" xlink:href="#__RefHeading___Toc802_4027400509%20Copy%201%20Copy%201" office:name="Анализа ефеката и трошкова резервне копије" text:style-name="Index_20_Link" text:visited-style-name="Index_20_Link">2.2 Анализа ефеката и трошкова резервне копије<text:tab/>6</text:a></text:p>
          <text:p text:style-name="P32"><text:a xlink:type="simple" xlink:href="#__RefHeading___Toc802_4027400509%20Copy%202" office:name="Основни типови резервних копија" text:style-name="Index_20_Link" text:visited-style-name="Index_20_Link">2.3 Основни типови резервних копија<text:tab/>7</text:a></text:p>
          <text:p text:style-name="P33"><text:a xlink:type="simple" xlink:href="#__RefHeading___Toc802_4027400509%20Copy%202%20Copy%201" office:name="Full резервна копија" text:style-name="Index_20_Link" text:visited-style-name="Index_20_Link">2.3.1 Full резервна копија<text:tab/>8</text:a></text:p>
          <text:p text:style-name="P33"><text:a xlink:type="simple" xlink:href="#__RefHeading___Toc802_4027400509%20Copy%202%20Copy%201%20Copy%201" office:name="Differential резервна копија" text:style-name="Index_20_Link" text:visited-style-name="Index_20_Link">2.3.2 Differential резервна копија<text:tab/>8</text:a></text:p>
          <text:p text:style-name="P33"><text:a xlink:type="simple" xlink:href="#__RefHeading___Toc802_4027400509%20Copy%202%20Copy%201%20Copy%202" office:name="Log резервна копија" text:style-name="Index_20_Link" text:visited-style-name="Index_20_Link">2.3.3 Log резервна копија<text:tab/>8</text:a></text:p>
          <text:p text:style-name="P33"><text:a xlink:type="simple" xlink:href="#__RefHeading___Toc802_4027400509%20Copy%202%20Copy%201%20Copy%202%20Copy%201" office:name="Комбинација типова" text:style-name="Index_20_Link" text:visited-style-name="Index_20_Link">2.3.4 Комбинација типова<text:tab/>8</text:a></text:p>
          <text:p text:style-name="P32"><text:a xlink:type="simple" xlink:href="#__RefHeading___Toc802_4027400509%20Copy%202%20Copy%202" office:name="Стратегије за израду резервних копија" text:style-name="Index_20_Link" text:visited-style-name="Index_20_Link">2.4 Стратегије за израду резервних копија<text:tab/>9</text:a></text:p>
          <text:p text:style-name="P33"><text:a xlink:type="simple" xlink:href="#__RefHeading___Toc2676_2494577596" office:name="Резервна копија базе података" text:style-name="Index_20_Link" text:visited-style-name="Index_20_Link">2.4.1 Резервна копија базе података<text:tab/>10</text:a></text:p>
          <text:p text:style-name="P33"><text:a xlink:type="simple" xlink:href="#__RefHeading___Toc2678_2494577596" office:name="Резервна копија дневника трансакција" text:style-name="Index_20_Link" text:visited-style-name="Index_20_Link">2.4.2 Резервна копија дневника трансакција<text:tab/>10</text:a></text:p>
          <text:p text:style-name="P33"><text:a xlink:type="simple" xlink:href="#__RefHeading___Toc2680_2494577596" office:name="Резервна копија датотека" text:style-name="Index_20_Link" text:visited-style-name="Index_20_Link">2.4.3 Резервна копија датотека<text:tab/>11</text:a></text:p>
          <text:p text:style-name="P32"><text:a xlink:type="simple" xlink:href="#__RefHeading___Toc2680_2494577596%20Copy%201%20Copy%201" office:name="Израда плана израде резервних копија" text:style-name="Index_20_Link" text:visited-style-name="Index_20_Link">2.5 Израда плана израде резервних копија<text:tab/>12</text:a></text:p>
          <text:p text:style-name="P31"><text:a xlink:type="simple" xlink:href="#__RefHeading___Toc17197_2913585186%20Copy%203" office:name="Резервне копије код PostgreSQL -а" text:style-name="Index_20_Link" text:visited-style-name="Index_20_Link">3 Резервне копије код PostgreSQL -а<text:tab/>15</text:a></text:p>
          <text:p text:style-name="P32"><text:a xlink:type="simple" xlink:href="#__RefHeading___Toc1968_4007534867" office:name="SQL извоз" text:style-name="Index_20_Link" text:visited-style-name="Index_20_Link">3.1 SQL извоз<text:tab/>15</text:a></text:p>
          <text:p text:style-name="P33"><text:a xlink:type="simple" xlink:href="#__RefHeading___Toc3590_2494577596" office:name="Повратак SQL извоза" text:style-name="Index_20_Link" text:visited-style-name="Index_20_Link">3.1.1 Повратак SQL извоза<text:tab/>16</text:a></text:p>
          <text:p text:style-name="P33"><text:a xlink:type="simple" xlink:href="#__RefHeading___Toc3590_2494577596%20Copy%201" office:name="Коришћење pg_dumpall" text:style-name="Index_20_Link" text:visited-style-name="Index_20_Link">3.1.2 Коришћење pg_dumpall<text:tab/>16</text:a></text:p>
          <text:p text:style-name="P33"><text:a xlink:type="simple" xlink:href="#__RefHeading___Toc3733_2494577596" office:name="Управљање великим базама података" text:style-name="Index_20_Link" text:visited-style-name="Index_20_Link">3.1.3 Управљање великим базама података<text:tab/>17</text:a></text:p>
          <text:p text:style-name="P32"><text:a xlink:type="simple" xlink:href="#__RefHeading___Toc1968_4007534867%20Copy%201" office:name="Израда резервне копије на нивоу датотечног система" text:style-name="Index_20_Link" text:visited-style-name="Index_20_Link">3.2 Израда резервне копије на нивоу датотечног система<text:tab/>17</text:a></text:p>
          <text:p text:style-name="P32"><text:a xlink:type="simple" xlink:href="#__RefHeading___Toc1968_4007534867%20Copy%201%20Copy%201" office:name="Континуирано архивирање и опоравак у тренутку" text:style-name="Index_20_Link" text:visited-style-name="Index_20_Link">3.3 Континуирано архивирање и опоравак у тренутку<text:tab/>19</text:a></text:p>
          <text:p text:style-name="P31"><text:a xlink:type="simple" xlink:href="#__RefHeading___Toc17197_2913585186%20Copy%202" office:name="Пример аутоматизације израде резервне копије" text:style-name="Index_20_Link" text:visited-style-name="Index_20_Link">4 Пример аутоматизације израде резервне копије<text:tab/>22</text:a></text:p>
          <text:p text:style-name="P31"><text:a xlink:type="simple" xlink:href="#__RefHeading___Toc8802_2913585186%20Copy%202" office:name="Закључак" text:style-name="Index_20_Link" text:visited-style-name="Index_20_Link">5 Закључак<text:tab/>24</text:a></text:p>
          <text:p text:style-name="P31"><text:a xlink:type="simple" xlink:href="#__RefHeading___Toc12644_3546172039" office:name="Литература" text:style-name="Index_20_Link" text:visited-style-name="Index_20_Link">6 Литература<text:tab/>25</text:a></text:p>
        </text:index-body>
      </text:table-of-content>
      <text:h text:style-name="P34" text:outline-level="1"><text:bookmark-start text:name="__RefHeading___Toc12646_3546172039"/>Увод<text:bookmark-end text:name="__RefHeading___Toc12646_3546172039"/></text:h>
      <text:p text:style-name="P35"><text:span text:style-name="T28">Трансакција је трансформација стања која има својства атомичности, конзистентности, изолације и трајности</text:span><text:span text:style-name="T29">, тзв. </text:span><text:span text:style-name="T30">ACID</text:span><text:span text:style-name="T29"> својства</text:span><text:span text:style-name="T28">.</text:span><text:span text:style-name="T29"> Атомичност - подразумева све или ништа, односно корисник мора увек знати, шта год се догодило,</text:span><text:span text:style-name="T28"> </text:span><text:span text:style-name="T29">у ком је стању. Конзистентност - трансакција достиже свој нормалан крај чиме се потврђује њен резултат, другим речима, свака успешна трансакција по дефиницији потврђује само исправне резултате. Изолација - налаже да догађаји у једној трансакцији морају бити скривени од других трансакција које се извршавају паралелно. Трајност - када се трансакција заврши и њени резултати буду потврђени у бази података, систем мора гарантовати да ће ти резултати преживети било који накнадни квар. Ова четири својства дефинишу главне карактеристике парадигме трансакција, која је утицала на многе аспекте развоја система база података (у даљем тескту ДБМС).</text:span></text:p>
      <text:p text:style-name="P36">Како би смо обезбедили својство трајности и услед хардверске грешке и услед софтверске грешке, а и услед људске грешке користићемо најпознатији и најсигурни метод за то - израду резервне копије(енг. <text:span text:style-name="T31">backup</text:span>).<text:span text:style-name="T32"> </text:span><text:span text:style-name="T33">Најпростоији и најпоузданији метод за обезбеђивање поузданости података би био да се увек угаси сервис базе података, направи се резервна копија свих података, дневника и контролних фајлова на неком месту и да се одмах обрише након што се неки податак на оригиналном диску измени. Ово се зове тотална резервна копија. Међутим, овај метод захтева да база података буде недоступна корисницима, а и одузима доста времена и ресурса уколико су фајлови велики. </text:span><text:span text:style-name="T34">Да би се превазишле мане овог приступа, можемо чувати само модификоване фајлове. Ресурси потребни за ову врсту израде резервне копије су пропорционални трансакционој активности базе података, а не самој бази података, јер за већину апликација само мали део података се мења између два сукцесивне резервне копије. Овај приступ нам скраћује време потребно за израду резервне копије, смањује потребу за ресурсима и употребљивија је за велике базе података. Овај метода се зове извозна резервна копија</text:span><text:span text:style-name="T35">(</text:span><text:span text:style-name="T34">енг. </text:span><text:span text:style-name="T36">export backup</text:span><text:span text:style-name="T35">)</text:span><text:span text:style-name="T34">. Ова метода се даље дели на инкременталну, кумулативну и </text:span><text:span text:style-name="T37">пуна</text:span><text:span text:style-name="T34"> резервн</text:span><text:span text:style-name="T37">а</text:span><text:span text:style-name="T34"> копиј</text:span><text:span text:style-name="T37">а</text:span><text:span text:style-name="T34"> података.</text:span></text:p>
      <text:p text:style-name="P37">Као што смо видели у претходном пасусима, израда резервне копије је неопходна, а може бити и хардверски јако захтевна, а опет би је ваљало радити што чешће. Због свега наведеног итекако има смисла овај процес аутоматизовати. А ми ћемо се у овом раду бавити управо аутоматизацијом израда резервних копија, а све то ћемо и поткрепити практичним примерима на<text:span text:style-name="T38"> PostgreSQL</text:span> ДБМС -у.<text:span text:style-name="T38"> </text:span></text:p>
      <text:h text:style-name="P38" text:outline-level="1"><text:bookmark-start text:name="__RefHeading___Toc17197_2913585186"/>Резервне копије<text:bookmark-end text:name="__RefHeading___Toc17197_2913585186"/></text:h>
      <text:p text:style-name="P39">У уводу овог рада само дали дефиницију израде резервне копије, поделу резервних копија да ли се чувају сви или само иземњени подаци и подметоде за израду резервних копија са само измењеним подацима. Пуна резервна копија података чува све фајлове, а са овим начином израде резервне копије ажурирају се и атрибути архиве, што враћа базу података у почетно стање. Уколико се овај нечин пречесто примењује, сва стања базе могу бити осигурана, али ова операција у многоме повећава трошкове. Због тога се шема инкременталних или кумулативних бекапа често прилагођава и прикално извршава између пуне израде резервних копија.</text:p>
      <text:p text:style-name="P40">Инкрементална резервна копција чува само фајлове који су промењени или су новонастали од последње инкементалне или пуне резервне копије и ажурира атрибуте архиве. Са друге стране, кумулативна израда резервне копије чува само модификоване фајлове од последње потпуне резервне копије и не ажурира атрибуте архиве. <text:span text:style-name="T39">Када дође до грешке на медијуму за складиштење података, можемо реконструисати базу података увозећи све инкременталне резервне копије и потпуну копију за инкременталну шему или можемо увести фајлове последње кумулативне резервне копија и потпуне копије за кумулативну шему. Кумулативна копија чува више фајлова од једне инкременталне, али увози мање фајлова од инкременталне копије код опоравка базе података. Јако је битно да се упореде шеме инкременталне и кумулативне резервне копије.</text:span></text:p>
      <text:h text:style-name="P41" text:outline-level="2"><text:bookmark-start text:name="__RefHeading___Toc802_4027400509 Copy 1"/>Важност израде резервне копије<text:bookmark-end text:name="__RefHeading___Toc802_4027400509 Copy 1"/></text:h>
      <text:p text:style-name="P42">Свака организација би требало да користи неки ДБМС за ефикасну употребу и поставку својих база података. За управљање подацима у ДБМС -у потребан је администратор базе података. Задужен је за осигурање текућих операционих функционалности и ефикасност база података организације за коју ради. Такође, одговоран је и за апликације које приступају тим базама података. ДБМС је скуп програма који омогућава корисницима и апликацијама да деле и управљају подацима. Поред тога, омогућава им и креирање, приступ, ажурирање и чување података у исправном формату у бази података. Независно од величине организације, данас готово све организације да користе ДБМС, тако да је потражња за администраторима база података већа него икад.</text:p>
      <text:p text:style-name="P42">ДБМС је одговоран и за осигуравања интегритета и безбедности података, контролу приступа подацима, оптимизацију, аутоматско извршавањ, поновни старт и опоравак. Један од главних задатака ДБМС -а је опоравак података када дође до било какве техничке грешке. Под техничком грешком подразумевамо било какав ситан технички проблем, било хардверски или софтверски, односно грешку у програму која може довести до прекида рада саме организације. Проблеми који могу изазвати оштећење или губитак података су класификовани у следећих 5 категорија:</text:p>
      <text:list text:style-name="L1">
        <text:list-item>
          <text:p text:style-name="P43"><text:soft-page-break/>Грешке на медијуму за складиштење података</text:p>
        </text:list-item>
        <text:list-item>
          <text:p text:style-name="P43">Оштећења фајлова</text:p>
        </text:list-item>
        <text:list-item>
          <text:p text:style-name="P43">Деструктивне акције, попут вируса, хакерских напада, људске грешке, ...</text:p>
        </text:list-item>
        <text:list-item>
          <text:p text:style-name="P43">Природних непогода, попут пожара и поплава</text:p>
        </text:list-item>
        <text:list-item>
          <text:p text:style-name="P44">Случајно брисање фајлова</text:p>
        </text:list-item>
      </text:list>
      <text:p text:style-name="P45">Како би смо били спремни за било какав тип опоравка морамо развити стратегију за израду резервне копије. Резервна копија се користи за копирање корисних података и коришћење њих за повратак података после било каквог губитка података. Главна сврха израде резервне копије и опоравка базе података је чување базе података од билко каквог губитка података и опоравак базе података након губитка података. Администрација израде резервних копија подразумева следеће задатке:</text:p>
      <text:list text:style-name="L2">
        <text:list-item>
          <text:p text:style-name="P46">Планирање могућих грешака и тестирање одговора на сваку од грешака</text:p>
        </text:list-item>
        <text:list-item>
          <text:p text:style-name="P46">Поставка окружења за израду резервне копије и опоравак базе података</text:p>
        </text:list-item>
        <text:list-item>
          <text:p text:style-name="P46">Планирање времена када ће се вршити резервна копија</text:p>
        </text:list-item>
        <text:list-item>
          <text:p text:style-name="P46">Надгледање окружења са резервном копијом</text:p>
        </text:list-item>
        <text:list-item>
          <text:p text:style-name="P46">Отклањање различитих проблема са резервном копијом</text:p>
        </text:list-item>
        <text:list-item>
          <text:p text:style-name="P46">Опоравак изгубљених података након пада</text:p>
        </text:list-item>
      </text:list>
      <text:h text:style-name="P47" text:outline-level="2"><text:bookmark-start text:name="__RefHeading___Toc802_4027400509 Copy 1 Copy 1"/>Анализа ефеката и трошкова резервне копије<text:bookmark-end text:name="__RefHeading___Toc802_4027400509 Copy 1 Copy 1"/></text:h>
      <text:p text:style-name="P48">Да би осигурали оперативни ток информација у организацији, морамо имати могућност да повратимо базу на користећи валидну резервну копију података. А како би смо имали ову могућност, морамо што чешће покретати израду резервних копија и користити најбоље технологије за израду резервних копија података. </text:p>
      <text:p text:style-name="P49"><text:span text:style-name="T40">Са друге стране, врло важан проблем је и када креирати пуну копију. Пуна копија са великим пратећим трошковима се ради у дужим временским интервалима, док се инкременталне или кумулативне копија, са мањим трошковима, израђују чешће. Увек желимо да смањимо што је више могуће број пуних копија које донсе и додатне трошкове. Трошкови који долазе уз кумулативну копију се повећавају са новоизмењеним редовима, пошто листа модификованих фајлова расте сваким даном до израде следеће пуне копије која брише све атрибуте архиве. За инкременталне копије, количина података је апроксимативно константна. Додатни трошкови опоравка </text:span><text:span text:style-name="T41">који увозе фајлове од свих инкременталних и пуне копије значајно расту са повећањем броја </text:span><text:soft-page-break/><text:span text:style-name="T41">инкременталних копија, када се догоди грешка у медијуму за складиштење података. Додатни трошкови и од кумулативних копија и опоравка од кумулативне копије расту са бројем новоизмењених редова. Са ове тачке гледишта, требало би да одлучимо колико често ћемо израђивати пуну резервну копију базе података поредећи трошкове израде и опоравка.</text:span></text:p>
      <text:p text:style-name="P50"><text:span text:style-name="T42">Мора се упоставити веза између апликативног програма и </text:span>сервера<text:span text:style-name="T43"> базе података</text:span>. Апликациони програм шаље упит серверу и чека да добије резултате које сервер шаље назад.<text:span text:style-name="T44"> Главна функција сваке компаније је да прави профит или производи нову вредност користећи доступне ресурсе. Како би израдиле резервне копије података, компаније морају инвестирати своје ресурсе попут финансијиских инвестиција, капиталних добара или радног капитала. У књиговодственом одељењу орагнизације, цена ресурса ће бити приказана као трошак организације и који ће негативно утицати на финансијиске перформансе организације.</text:span></text:p>
      <text:p text:style-name="P51">Да би организација омогућила себи да поврати податке, неопходне за њено пословање, уз минималне трошкове, мора израдити план опоравка података. Овај план користе администратори базе података да обрађују догађаје који могу утицати на могућност исправног рада својих база података. Када израђујемо план за опроавак података, два кључна идникатора би требало да буду укључена. Први је количина података које организација може приуштити себи да изгуби <text:span text:style-name="T45">у случају нежељених догађаја. А други је износ новца који организација може да плати како би чувала податке чак и када нема нежељених догађаја. Ова два индикатора су у супортности и требају бити одређена управљањем ризика и анализом пословних и оперативних захтева.</text:span></text:p>
      <text:p text:style-name="P52">Анализа ризика је део плана за опоравак података у који улазе сви потенцијални ризици за организацију који се могу очекивати и анализирати. Резултат ове анализе су последице ових претњи, попут вероватноће да подацу буду корумпирани. Ризике можемо поделити на: харвдверске, софтверске и од окружења. Још један део плана за опоравак података је и анализа пословних захтева. У овој анализи непоходно је консултовати следеће критеријуме: вредност података, волатилност података, величину података и коришћење података. План за повратак података такође улази и у оперативне захтеве. Главни оперативни захтеви везани за овај план су: безбедност, перформансе и лакоћа управљања.<text:span text:style-name="T46"> Упоредном анализом ризика, пословних и оперативних захтева можемо формирати циљеве израде резервне копије. Три основна стуба израде резервне копије су:</text:span></text:p>
      <text:list text:style-name="L3">
        <text:list-item>
          <text:p text:style-name="P53">Трошак изгубљених података</text:p>
        </text:list-item>
        <text:list-item>
          <text:p text:style-name="P53">Минимизовање изгубљених података</text:p>
        </text:list-item>
        <text:list-item>
          <text:p text:style-name="P53">Минимизовање цене недоступности услуге</text:p>
        </text:list-item>
      </text:list>
      <text:h text:style-name="P54" text:outline-level="2"><text:bookmark-start text:name="__RefHeading___Toc802_4027400509 Copy 2"/>Основни типови резервних копија<text:bookmark-end text:name="__RefHeading___Toc802_4027400509 Copy 2"/></text:h>
      <text:p text:style-name="P55"><text:soft-page-break/><text:span text:style-name="T47">Након креирања плана за опоравак података, у који су укључени анализа ризика, бизнис анализа, пословни и оперативни захтеви, следећи корак је израда стратегије за прављење резервних копија и опоравка података. Да бисмо креирали ово стратегију, требало би да разликујемо основне типове резервних копија.</text:span><text:span text:style-name="T48"> А то су: F</text:span><text:span text:style-name="T49">ull, Differential и Log</text:span><text:span text:style-name="T48">.</text:span></text:p>
      <text:h text:style-name="P56" text:outline-level="3"><text:bookmark-start text:name="__RefHeading___Toc802_4027400509 Copy 2 Copy 1"/>Full <text:span text:style-name="T50">резервна копија</text:span><text:bookmark-end text:name="__RefHeading___Toc802_4027400509 Copy 2 Copy 1"/></text:h>
      <text:p text:style-name="P57"><text:span text:style-name="T47">О</text:span>вај тип подразумева поптпуну копију свих података у тренутку када се покрене израда резервне копије. Ово је основа сваке стратегије за израду резервних копија у случајевима крађе или губитка података или оштећења медијума за физичко складиштење података. У појединим ситуацијама, доступност ове резервне копије, смештене на сигурном на другој локацији, може бити једини начин за повратак свих података компаније и опоравак на новом серверу. Уколико поред овог типа постоје и <text:s/><text:span text:style-name="T38">Differential и Log</text:span> резервне копије, подаци могу бити враћени у потпуности у стање пре оштећења. Али, уколико нисмо направили ни једну <text:span text:style-name="T38">Full </text:span>резервну копију<text:span text:style-name="T51">, неће бити</text:span> <text:span text:style-name="T51">ни </text:span><text:span text:style-name="T38">Differential</text:span> ни <text:s/><text:span text:style-name="T38">Log</text:span> резервн<text:span text:style-name="T51">е</text:span> копију<text:span text:style-name="T51">, јер је </text:span><text:span text:style-name="T38">Full</text:span><text:span text:style-name="T51"> предуслов за обе, а без тога шансе са повратак података су минималне.</text:span></text:p>
      <text:h text:style-name="P58" text:outline-level="3"><text:bookmark-start text:name="__RefHeading___Toc802_4027400509 Copy 2 Copy 1 Copy 1"/>Differential <text:span text:style-name="T50">резервна копија</text:span><text:bookmark-end text:name="__RefHeading___Toc802_4027400509 Copy 2 Copy 1 Copy 1"/></text:h>
      <text:p text:style-name="P57"><text:bookmark-start text:name="__RefHeading___Toc802_4027400509 Copy 2 Copy 1 Copy 1 Copy 1"/><text:span text:style-name="T38">Differential </text:span>резервна копија<text:span text:style-name="T51"> се користи да се смањи трајање израде резервне копије података. Принцип на коме се заснива </text:span><text:span text:style-name="T38">Differential </text:span>резервна копија<text:span text:style-name="T51"> је следећи, копира се само онај део базе података који је измењен од последње </text:span><text:span text:style-name="T38">Full </text:span>резервн<text:span text:style-name="T51">е</text:span> копиј<text:span text:style-name="T51">е, уместо копирања свих података. </text:span><text:span text:style-name="T38">Differential </text:span>резервна копија<text:span text:style-name="T51"> је резервна копија података која се заснива на </text:span><text:span text:style-name="T38">Full </text:span>резервн<text:span text:style-name="T51">ој</text:span> копиј<text:span text:style-name="T51">и комплетне или дела базе података који садржи само податке који су иземењени од последње </text:span><text:span text:style-name="T38">Full </text:span>резервн<text:span text:style-name="T51">е</text:span> копиј<text:span text:style-name="T51">е. Свака сукцесивна </text:span><text:span text:style-name="T38">Differential </text:span>резервна копија<text:span text:style-name="T51"> копира податке од последње </text:span><text:span text:style-name="T38">Full </text:span>резервн<text:span text:style-name="T51">е</text:span> копиј<text:span text:style-name="T51">е. На овај начин, ако су подаци изгубљени или оштећени, морамо да повратимо податке од последње </text:span><text:span text:style-name="T38">Full </text:span>резервн<text:span text:style-name="T51">е</text:span> копиј<text:span text:style-name="T51">е па од последње </text:span><text:span text:style-name="T38">Differential </text:span>резервн<text:span text:style-name="T51">е</text:span> копиј<text:span text:style-name="T51">е. Главна предност овог типа резервне копије у односу на </text:span><text:span text:style-name="T38">Full </text:span>резервн<text:span text:style-name="T51">у</text:span> копиј<text:span text:style-name="T51">у је та што захтева мање времена за процесирање, јер садржи мање информација, уколико се регуларно рађене резервне копије.</text:span><text:bookmark-end text:name="__RefHeading___Toc802_4027400509 Copy 2 Copy 1 Copy 1 Copy 1"/></text:p>
      <text:h text:style-name="P59" text:outline-level="3"><text:bookmark-start text:name="__RefHeading___Toc802_4027400509 Copy 2 Copy 1 Copy 2"/><text:span text:style-name="T51">Log</text:span> <text:span text:style-name="T50">резервна копија</text:span><text:bookmark-end text:name="__RefHeading___Toc802_4027400509 Copy 2 Copy 1 Copy 2"/></text:h>
      <text:p text:style-name="P60">Једини тип резервне копије који не копира податке из базе података је овај. <text:span text:style-name="T38">Log</text:span><text:span text:style-name="T49"> </text:span><text:span text:style-name="T48">резервна копија</text:span> садржи трансакциони дневник који укључује све записе који нису сачувани у претходној <text:span text:style-name="T38">Log</text:span><text:span text:style-name="T49"> </text:span><text:span text:style-name="T48">резервн</text:span>ој<text:span text:style-name="T48"> копиј</text:span>и.</text:p>
      <text:h text:style-name="P61" text:outline-level="3"><text:bookmark-start text:name="__RefHeading___Toc802_4027400509 Copy 2 Copy 1 Copy 2 Copy 1"/>Комбинација типова<text:bookmark-end text:name="__RefHeading___Toc802_4027400509 Copy 2 Copy 1 Copy 2 Copy 1"/></text:h>
      <text:p text:style-name="P62">Како бисмо искористили максимално све предности свих типова резервних копија, а у складу са пословним захтевима и припадајућим трошковима, требало би да <text:soft-page-break/>комбинујемо ове основне типове. А ми ћемо у наставку дати преглед употребљивих комбинација:</text:p>
      <text:p text:style-name="P63"><text:span text:style-name="T38">Full </text:span>резервну копију<text:span text:style-name="T52"> - основни режим, овом комбинацијом користимо више </text:span><text:span text:style-name="T38">Full </text:span>резервн<text:span text:style-name="T52">их</text:span> копиј<text:span text:style-name="T52">а. Ово је уједно и најпростија комбинација. Из овога се врло лако могу повратити подаци, али ово и троши највише времена за израду, а и у већини ситуација није употребљиво. Ова комбинација се често користи за израду резервних копија развојних база података, база података намењених само читању и системских база података.</text:span></text:p>
      <text:p text:style-name="P63"><text:bookmark-start text:name="__RefHeading___Toc802_4027400509 Copy 2 Copy 1 Copy 2 Copy 2"/><text:span text:style-name="T51">Log </text:span><text:span text:style-name="T52"><text:s/>и </text:span><text:span text:style-name="T38">Full</text:span><text:span text:style-name="T52"> </text:span>резервн<text:span text:style-name="T52">а</text:span> копиј<text:span text:style-name="T52">а - ова комбинација је слична </text:span><text:span text:style-name="T38">Full </text:span>резервн<text:span text:style-name="T52">ој</text:span> копиј<text:span text:style-name="T52">и. Прво се направи </text:span><text:span text:style-name="T53">Log</text:span><text:span text:style-name="T38"> </text:span>резервна копија<text:span text:style-name="T52">, а затим <text:s/></text:span><text:span text:style-name="T38">Full </text:span>резервн<text:span text:style-name="T52">а</text:span> копиј<text:span text:style-name="T52">а. Овај начин има велику предност, чува податке, али и промене података које су се десиле после последње израде резервне копије. Користи се у организацијама где подаци нису потребни све време, нпр. подаци се користе само у радно време.</text:span><text:bookmark-end text:name="__RefHeading___Toc802_4027400509 Copy 2 Copy 1 Copy 2 Copy 2"/></text:p>
      <text:p text:style-name="P64"><text:bookmark-start text:name="__RefHeading___Toc802_4027400509 Copy 2 Copy 1 Copy 2 Copy 2 Copy 1"/><text:span text:style-name="T38">Full </text:span><text:span text:style-name="T52">и </text:span><text:span text:style-name="T51">Log</text:span><text:span text:style-name="T52"> </text:span>резервн<text:span text:style-name="T52">а</text:span> копиј<text:span text:style-name="T52">а - ова комбинација подразумева једну </text:span><text:span text:style-name="T38">Full </text:span>резервн<text:span text:style-name="T52">у</text:span> копиј<text:span text:style-name="T52">у и више </text:span><text:span text:style-name="T51">Log</text:span><text:span text:style-name="T52"> </text:span>резервн<text:span text:style-name="T52">их</text:span> копиј<text:span text:style-name="T52">а док се опет не направи </text:span><text:span text:style-name="T38">Full</text:span><text:span text:style-name="T52"> </text:span>резервн<text:span text:style-name="T52">а</text:span> копиј<text:span text:style-name="T52">а. Предност овог плана је што смањује количину изгубљених података у случајевима када сервер откаже у потпуности. </text:span><text:span text:style-name="T51">Log</text:span><text:span text:style-name="T52"> </text:span>резервн<text:span text:style-name="T52">а</text:span> копиј<text:span text:style-name="T52">а би требало чешће израђивати од </text:span>Full<text:span text:style-name="T54"> </text:span>резервн<text:span text:style-name="T54">е</text:span> копиј<text:span text:style-name="T54">е. Овај тип се користи у организацијама </text:span><text:span text:style-name="T52">где подаци нису потребни све врем</text:span><text:span text:style-name="T54">е, као и претходни тип. Али се користи и у организацијама где подаци морају бити стално доступни, али не смеју бити променљиви.</text:span><text:bookmark-end text:name="__RefHeading___Toc802_4027400509 Copy 2 Copy 1 Copy 2 Copy 2 Copy 1"/></text:p>
      <text:p text:style-name="P64"><text:bookmark-start text:name="__RefHeading___Toc802_4027400509 Copy 2 Copy 1 Copy 2 Copy 2 Copy 1 Copy 1"/><text:span text:style-name="T38">Full</text:span><text:span text:style-name="T54"> -</text:span><text:span text:style-name="T38"> Differential</text:span><text:span text:style-name="T54"> -</text:span><text:span text:style-name="T52"> </text:span><text:span text:style-name="T51">Log</text:span><text:span text:style-name="T52"> </text:span>резервн<text:span text:style-name="T52">а</text:span> копиј<text:span text:style-name="T52">а</text:span><text:span text:style-name="T54"> - у појединим ситација информације базе података су јако вредне и важно је правити резервне копије врло често. У овом сценарију, дневник резервне копије није сувишан, јер ако дође до отказа, морамо повратити сваки унос из дневника од последње </text:span><text:span text:style-name="T38">Full</text:span><text:span text:style-name="T52"> </text:span>резервн<text:span text:style-name="T54">е</text:span> копиј<text:span text:style-name="T54">е. Да бисмо решили овај проблем, користићемо ову комбинацију. У овој комбинацији, повремено ћемо израђивати </text:span><text:span text:style-name="T38">Full</text:span><text:span text:style-name="T52"> </text:span>резервн<text:span text:style-name="T54">у</text:span> копиј<text:span text:style-name="T54">у повремено, </text:span><text:span text:style-name="T38">Differential </text:span>резервн<text:span text:style-name="T54">у</text:span> копиј<text:span text:style-name="T54">у често и </text:span><text:span text:style-name="T53">Log</text:span><text:span text:style-name="T38"> </text:span>резервн<text:span text:style-name="T54">у</text:span> копи<text:span text:style-name="T54">ју врло често.</text:span><text:bookmark-end text:name="__RefHeading___Toc802_4027400509 Copy 2 Copy 1 Copy 2 Copy 2 Copy 1 Copy 1"/></text:p>
      <text:h text:style-name="P65" text:outline-level="2"><text:bookmark-start text:name="__RefHeading___Toc802_4027400509 Copy 2 Copy 2"/><text:span text:style-name="T55">Стратегије за израду</text:span> резервних копија<text:bookmark-end text:name="__RefHeading___Toc802_4027400509 Copy 2 Copy 2"/></text:h>
      <text:p text:style-name="P66"><text:span text:style-name="T54">Р</text:span>езервне копије података се сада увек изводе над базом података организације. Циљ резервне копије података је да заштити податке када дође до проблема и омогући опоравак података. Уколико је потребно само поједине податке повратити, опоравак целе базе података би било неефикасно коришћење ресурса организације и резултовало би смањењем профита. Ово је уједно и разлог зашто је неопходно израдити стратегију израде резервних копија. На основу структуре података које копирамо, резервне копије података можемо поделити у следеће категорије: резервне копије података, резервне копије трансакционих дневника и резервне копије датотека. Комбиновање основних типова резервних копија и њихових комбинација са ове три главне категорије можемо направити стратегију за израду резервних копија. Једино одређене комбинације типова и категорија су употребљиве и оне су ослонац стратегије за израду резервних копија.</text:p>
      <text:h text:style-name="P67" text:outline-level="3"><text:bookmark-start text:name="__RefHeading___Toc2676_2494577596"/><text:soft-page-break/>Резервна копија базе података<text:bookmark-end text:name="__RefHeading___Toc2676_2494577596"/></text:h>
      <text:p text:style-name="P68">Једна од три категорије резервне копије података је резервна копија базе података. База података је организовано складиште података где су подаци доступни кроз одређене елементе података.</text:p>
      <text:p text:style-name="P69"><text:span text:style-name="T38">Full </text:span>резервн<text:span text:style-name="T56">а</text:span> копиј<text:span text:style-name="T56">а базе података - копира целу базу података. </text:span><text:span text:style-name="T38">Full </text:span>резервн<text:span text:style-name="T56">а</text:span> копиј<text:span text:style-name="T56">а базе података је у суштини архива базе података, која садржи пуну копију базе података у тренутку израде резервне копије, све корисничке објекте и податке, системске податке везане за корисника базе, системске табеле и погледе и део дневника трансакција. </text:span><text:span text:style-name="T38">Full </text:span>резервн<text:span text:style-name="T56">а</text:span> копиј<text:span text:style-name="T56">а се ради у следећим ситуацијама: када је потребан опоравак целе базе података, када се развојна база података пушта у продукцију и када се развојна база података ажурира</text:span><text:span text:style-name="T57">.</text:span></text:p>
      <text:p text:style-name="P70"><text:bookmark-start text:name="__RefHeading___Toc802_4027400509 Copy 2 Copy 1 Copy 1 Copy 1 Copy 1"/><text:span text:style-name="T38">Differential </text:span>резервна копиј<text:span text:style-name="T57">а - је копија сваке странице базе података која садржи измене од последње </text:span><text:span text:style-name="T38">Full </text:span>резервн<text:span text:style-name="T57">е</text:span> копиј<text:span text:style-name="T57">е</text:span><text:span text:style-name="T56"> базе података</text:span><text:span text:style-name="T57">. Што имплицира да величина </text:span><text:span text:style-name="T38">Differential </text:span>резервн<text:span text:style-name="T57">е</text:span> копиј<text:span text:style-name="T57">е зависи од количине података који су измењени од последње <text:s/></text:span><text:span text:style-name="T38">Full </text:span>резервн<text:span text:style-name="T57">е</text:span> копиј<text:span text:style-name="T57">е. Што је </text:span><text:span text:style-name="T38">Full </text:span>резервн<text:span text:style-name="T57">а</text:span> копиј<text:span text:style-name="T57">а старија, то је </text:span><text:span text:style-name="T38">Differential </text:span>резервна копиј<text:span text:style-name="T57">а већа. Главни разлог зашто се користи </text:span><text:span text:style-name="T38">Differential </text:span>резервна копиј<text:span text:style-name="T57">а је смањење броја евиденционих фајлова који се морају повратити у ситуацијама када је </text:span><text:span text:style-name="T58">брзина опоравка кључна</text:span><text:bookmark-end text:name="__RefHeading___Toc802_4027400509 Copy 2 Copy 1 Copy 1 Copy 1 Copy 1"/></text:p>
      <text:h text:style-name="P71" text:outline-level="3"><text:bookmark-start text:name="__RefHeading___Toc2678_2494577596"/>Резервна копија <text:span text:style-name="T57">дневника трансакција</text:span><text:bookmark-end text:name="__RefHeading___Toc2678_2494577596"/></text:h>
      <text:p text:style-name="P72">Датотека дневника трансакција садржи хронолошки редослед свих акција који су одрађене над базом података. Неопходно је урадити бар једну <text:span text:style-name="T49">Full </text:span><text:span text:style-name="T48">резервн</text:span>у<text:span text:style-name="T48"> копиј</text:span>у<text:span text:style-name="T56"> базе података</text:span> која може произвести резервну копију дневника трансакција. Када год дође до промене података или структуре података у бази, детаљи промене су забележени као ред у дневнику трансакција. Резервне копије дневника трансакција се пишу секвенцијално за разлику од података који се копирају <text:span text:style-name="T59">на </text:span><text:span text:style-name="T60">нескевнецијалан </text:span><text:span text:style-name="T59">начин. Због оваквог начина писања, када дође до опоравка података, могуће је реконструисати редослед операција над подацима или објектима. Редослед извршења трансакција је битан, јер различит редослед истих трансакција може дати различите резултате. Дакле, могуће је вратити базу података у жељљено стање, под условом да су подаци сачувани.</text:span></text:p>
      <text:p text:style-name="P73">Сваки унос у дневник се уноси у датотеку дневника под јединственим бројем (енг. <text:span text:style-name="T31">Log Sequence Number</text:span><text:span text:style-name="T61"> - </text:span><text:span text:style-name="T31">LSN</text:span>). Када се база података и придружени јој дневник транскација први пут направе, први унос у дневнику означава логички почетак дневника, који се у овом случају поклапа и са физичком датотеком. <text:s/><text:span text:style-name="T62">LSN</text:span><text:span text:style-name="T63"> -ови су даље увек инкрементирају и најсвежији ред у дневнику ће увек имаји и највећи </text:span><text:span text:style-name="T62">LSN</text:span><text:span text:style-name="T63"> и означаваће крај логичког фајла. Сви уноси у девнику повезани са датом трансакцијом су повезани у ланац </text:span><text:span text:style-name="T62">LSN</text:span><text:span text:style-name="T63"> -ова са показивачима ка следећој и претходној операцију у трансакцију која следи односно претходи датој операцији. Интерно, датотека дневника трансакција је подељена на секције које називамо виртуелне датотеке дневника. Виртуелна датотека дневника је активна, ако садржи било који део активног дневника </text:span><text:soft-page-break/><text:span text:style-name="T63">или је некативна ако не садржи ниједан део. Било који ред у дневнику повезан са отвореном трансакцијом је неопходан за потенцијални повратак и мора бити део активног дневника. Са </text:span><text:span text:style-name="T62">MinLSN</text:span><text:span text:style-name="T63"> се обично обележава најстарији унос у дневнику транскација који је неопходан за успешан повратак базе или неку другу акцију или операцију над базом података. Овај унос означава и почетак активног дневника и понекад означава и "главу" дневника. Унос са најевћим </text:span><text:span text:style-name="T62">LSN</text:span><text:span text:style-name="T63"> -о</text:span><text:span text:style-name="T64">м означава крај активног дневника.</text:span></text:p>
      <text:h text:style-name="P74" text:outline-level="3"><text:bookmark-start text:name="__RefHeading___Toc2680_2494577596"/>Резервна копија <text:span text:style-name="T65">датотека</text:span><text:bookmark-end text:name="__RefHeading___Toc2680_2494577596"/></text:h>
      <text:p text:style-name="P75"><text:span text:style-name="T63">Резервне копија датотека се користе када је база података велика толико да је трошак ресурса за израду резервне копије базе података већи од укупно доступних ресурса. Додатно, цена ресурса за Основну резервну копију није урачуната. У овом случају, резервна копија се не генерише над целом базом података, већ у поједним областима базе. Код резервних копија датотека цела базе се не копира, већ један или више фајлова који су део базе података. Основни захтев, када се вржи резервна копија датотека, је да подаци садржани у резервној копији морају бити доступни само за читање или или цела резервна копија се мора користити у комбинацији са дневником трансакција и редоследу који осигурава трансакциони интегритет базе података. Ово је из разлога што резервна копија датотека не копира дневник трансакција. Употребљиве резервне копија датотека су: </text:span><text:span text:style-name="T66">Full</text:span><text:span text:style-name="T63">, </text:span><text:span text:style-name="T66">Differential</text:span><text:span text:style-name="T63">, </text:span><text:span text:style-name="T67">Partial </text:span><text:span text:style-name="T63">и </text:span><text:span text:style-name="T67">Parital Differential</text:span><text:span text:style-name="T63">.</text:span></text:p>
      <text:p text:style-name="P76"><text:span text:style-name="T49">Full</text:span> резервна копија датотека копира све податке и објекте у одређени фајл или групу фајлова. Комбинација <text:span text:style-name="T49">Full</text:span> резервне копије датотека свих фајлова у бази је еквивалентна <text:span text:style-name="T49">Full</text:span> резервној копији базе података. Број <text:span text:style-name="T49">Full</text:span> резервних копија датотека <text:span text:style-name="T68">зависи од величине бате података, броја датотека и распореда израде </text:span><text:span text:style-name="T69">Full</text:span><text:span text:style-name="T68"> резервних копија. </text:span><text:span text:style-name="T49">Full</text:span> резервна копија датотека<text:span text:style-name="T68"> има следећих предности у односу на </text:span><text:span text:style-name="T69">Full</text:span><text:span text:style-name="T68"> резервну копију базе података: коришћењем копије над фајловима можемо убрзати опоравак базе података када опорављамо само оштећене фајлове без потребе за опоравком целе базе података; коришћењем копије над фајловима повећавамо флексибилност приликом израде распореда израде резервних копија и у управљњу медијумима за складиштење података. Са друге стране, мане овог приступа у односу на копирање база података су: додатна административна компликација у процесу одржавања и надгледања комплетног скупа резервних копија који може превазићи захтеве за </text:span><text:span text:style-name="T66">Full</text:span><text:span text:style-name="T70"> резервну копије базе података; оштећење једног физичког медијума моће онемогућити опоравак целе базе података уколико датотека на оштењеном медијуму није копирана.</text:span></text:p>
      <text:p text:style-name="P77">Само једна <text:span text:style-name="T49">Full</text:span><text:span text:style-name="T65"> резервна копија датотека</text:span> може бити направљена у неком трнутку. Могуће је направити резервну копију групе датотека, али ова резервна копија захтева више времена за опоравак податак и за лоцирање поједних фајлова. Принцип израде <text:s/><text:span text:style-name="T49">Full</text:span><text:span text:style-name="T65"> резервна копиј</text:span>е групе<text:span text:style-name="T65"> датотека</text:span> је исти као и принцип израде <text:span text:style-name="T49">Full</text:span><text:span text:style-name="T65"> резервн</text:span>е<text:span text:style-name="T65"> копиј</text:span>е<text:span text:style-name="T65"> датотека</text:span>.</text:p>
      <text:p text:style-name="P78"><text:span text:style-name="T49">Differential</text:span><text:span text:style-name="T68"> резервна копија датотека копира само оне странице задатог фајла који су измењене од последње </text:span><text:span text:style-name="T66">Full</text:span><text:span text:style-name="T63"> резервн</text:span><text:span text:style-name="T70">е</text:span><text:span text:style-name="T63"> копиј</text:span><text:span text:style-name="T70">е</text:span><text:span text:style-name="T63"> датотек</text:span><text:span text:style-name="T71">а. Као и код израде резервне </text:span><text:soft-page-break/><text:span text:style-name="T71">копије базе података, </text:span><text:span text:style-name="T66">Differential</text:span><text:span text:style-name="T70"> резервна копија датотека</text:span><text:span text:style-name="T71"> може смањити број записа у дневнику које се непходан за опоравак ових </text:span><text:span text:style-name="T72">датотека</text:span><text:span text:style-name="T71">. Ова стратегија се користи као део стратегије, јер рахтева много мање времена за процесирање од </text:span><text:span text:style-name="T73">Full</text:span><text:span text:style-name="T71"> стратегије и заузима мање ресурса. У порећењеу са </text:span><text:span text:style-name="T66">Differential</text:span><text:span text:style-name="T71"> резервном копијом базе података, предност иве стратегије је краће време извршења и могућност за копирање измена у задатим датотека. Ако је број копираних датотека мањи од броја свих фајлова базе података, ова стратегија заузима мање ресурса од </text:span><text:span text:style-name="T66">Differential</text:span><text:span text:style-name="T71"> резервне копије базе података. Ако је штета настала на само једном делу базе података, коришћењем ове стратегије могуће је повратити само податке из оштећених </text:span><text:span text:style-name="T72">датитеја</text:span><text:span text:style-name="T71"> са изменама од последње </text:span><text:span text:style-name="T73">Full</text:span><text:span text:style-name="T71"> резервне копије.</text:span></text:p>
      <text:p text:style-name="P79"><text:span text:style-name="T74">Partial</text:span><text:span text:style-name="T75"> резервна копија датотека је слична </text:span><text:span text:style-name="T76">Full </text:span><text:span text:style-name="T75">и </text:span><text:span text:style-name="T76">Differential</text:span><text:span text:style-name="T75"> резервној копији датотека, јер се копира само део базе података, без потребе за копирањем целе базе података. Док </text:span><text:span text:style-name="T76">Full</text:span><text:span text:style-name="T75"> и</text:span><text:span text:style-name="T76"> Differential</text:span><text:span text:style-name="T75"> резервне копије дозвољавају копирање одређених или поједниначних датотека, </text:span><text:span text:style-name="T74">Partial</text:span><text:span text:style-name="T75"> резервна копија је само копија основних група датотека и свих датотека коришћених за упис и читања, без датотека коју су намењене само читању. Што значи да ова стратегија је корисна само код база података који садрже податке намењене само читању. Са друге стране, ова резервна копија садржи исти број података и објеката базе као и </text:span><text:span text:style-name="T76">Full</text:span><text:span text:style-name="T75"> резервна копија базе података. Исти резултат може бити постигнут креирањм одвојених </text:span><text:span text:style-name="T76">Full</text:span><text:span text:style-name="T75"> резервних копија датотека за сваку датотеку која се користи и за читање и за писање. Дакле, када се користи </text:span><text:span text:style-name="T76">Full</text:span><text:span text:style-name="T75"> резервна копија неопходно је направити и девник трансакција, али то може донети беспотребни додатни слој сложености. У овој ситуацији израде </text:span><text:span text:style-name="T76">Partial</text:span><text:span text:style-name="T75"> резервне копије, дневник трансакција је неопходан само за повратак базе у задато пређашње стање.</text:span></text:p>
      <text:p text:style-name="P80"><text:span text:style-name="T76">Differential </text:span><text:span text:style-name="T74">Partial</text:span><text:span text:style-name="T75"> резервна копија датотека је </text:span><text:span text:style-name="T76">Differential </text:span><text:span text:style-name="T75">резервна копија датотака са основном резервном копијом које је у ствари Partial резервна копија. <text:s/></text:span><text:span text:style-name="T76">Differential</text:span><text:span text:style-name="T75"> резервне копије сваке од категорија могу бити извршене само након основне резервне копије те категорије. За разлику од осталих стратегија, где основна резервна копија може бити само </text:span><text:span text:style-name="T76">full</text:span><text:span text:style-name="T75"> резервна копија, основна резервна копија код ове стратегије је </text:span><text:span text:style-name="T77">partial</text:span><text:span text:style-name="T76"> </text:span><text:span text:style-name="T75">резервна копија. Прицнип израде резервне копије код ове стратегије је </text:span><text:span text:style-name="T78">исти као и за израду </text:span><text:span text:style-name="T79">Differential</text:span><text:span text:style-name="T78"> резервне копије. Али копирање је завршено само када су укључене датотеке које се могу и читати и писати у њих и без датотека намњених само читању. Differetial </text:span><text:span text:style-name="T79">Partial </text:span><text:span text:style-name="T78">и </text:span><text:span text:style-name="T79">Partial</text:span><text:span text:style-name="T78"> стратегије се користе код база података која садрже велики број датотека намењених само читању. Одлука да ли направити </text:span><text:span text:style-name="T79">full </text:span><text:span text:style-name="T78">или </text:span><text:span text:style-name="T79">partial</text:span><text:span text:style-name="T78"> резервну копију, над целом базом података, представља разлику у коришћењу ове две стратегије за израду резервних копија података.</text:span></text:p>
      <text:h text:style-name="P81" text:outline-level="2"><text:bookmark-start text:name="__RefHeading___Toc2680_2494577596 Copy 1 Copy 1"/>Израда плана израде резервних копија<text:bookmark-end text:name="__RefHeading___Toc2680_2494577596 Copy 1 Copy 1"/></text:h>
      <text:p text:style-name="P82">Једна од кључних ствари код управљања база података је припрема базе за било какав отказ медија, хардвера или софтвера и опоравак базе током катастрофе. Да бисмо се припремили за ове услове, организација мора спровести одређђене процедуре у задатом редоследу, које дајемо у наставку:</text:p>
      <text:list text:style-name="L4">
        <text:list-item>
          <text:p text:style-name="P83"><text:soft-page-break/>Свеобухватни план израде резервних копија</text:p>
        </text:list-item>
        <text:list-item>
          <text:p text:style-name="P83">Ефикасно управљање резервним копијама</text:p>
        </text:list-item>
        <text:list-item>
          <text:p text:style-name="P83">Периодично тестирање опоравка базе података</text:p>
        </text:list-item>
        <text:list-item>
          <text:p text:style-name="P83">Направити споразумни ниво услуге за резервне копије и опоравак, и коминицирати га свим учесницима</text:p>
        </text:list-item>
        <text:list-item>
          <text:p text:style-name="P83">Израдити и документовати план за опоравак од катастрфое</text:p>
        </text:list-item>
        <text:list-item>
          <text:p text:style-name="P83">Одржавати знање и стручност запослених на овом послу о резервним копијама и опоравку база података и оперативних система.</text:p>
        </text:list-item>
      </text:list>
      <text:p text:style-name="P82">Прве две процедуре захтевају од администратора базе података да <text:span text:style-name="T80">направи јединствено дело, које називамо Управљање резервним копијама. Развој стратегија за израде резервних копија укључује следеже кораке:</text:span></text:p>
      <text:list text:style-name="L5">
        <text:list-item>
          <text:p text:style-name="P84">Одабрати шта је потребно копирати за резерву</text:p>
        </text:list-item>
        <text:list-item>
          <text:p text:style-name="P84">Одредити одговарајући тип резервне копије</text:p>
        </text:list-item>
        <text:list-item>
          <text:p text:style-name="P84">Изабрати категорију резервне копије</text:p>
        </text:list-item>
        <text:list-item>
          <text:p text:style-name="P84">Успоставити одговарајући распоред израде резервних копија</text:p>
        </text:list-item>
        <text:list-item>
          <text:p text:style-name="P84">Одлучити где ће бити чуване резервне копије</text:p>
        </text:list-item>
        <text:list-item>
          <text:p text:style-name="P84">Развити политику чувања резервних копијама</text:p>
        </text:list-item>
      </text:list>
      <text:p text:style-name="P85">Након израде адекватне стратегије резевних копија, морамо исправно управљати резервним копијама. Управљање резервним копија укључује следеће кораке:</text:p>
      <text:list text:continue-numbering="true" text:style-name="L5">
        <text:list-item>
          <text:p text:style-name="P86">Аутоматизовање израде резервних копија</text:p>
        </text:list-item>
        <text:list-item>
          <text:p text:style-name="P84">Надгледање резервних копија</text:p>
        </text:list-item>
        <text:list-item>
          <text:p text:style-name="P84">Преглед дневника и каталога резервних копија</text:p>
        </text:list-item>
        <text:list-item>
          <text:p text:style-name="P84">Одржавање каталога базе података</text:p>
        </text:list-item>
        <text:list-item>
          <text:p text:style-name="P84">Валидирање резервних копија</text:p>
        </text:list-item>
        <text:list-item>
          <text:p text:style-name="P84">Поставка зависности</text:p>
        </text:list-item>
      </text:list>
      <text:p text:style-name="P85"><text:soft-page-break/>Израда сопственог Управљања резервним копијама је могућа коришћењем различитих технологија и програма израђених спцифично за ову примену. <text:span text:style-name="T81">Уколико је у организацији администратор базе података задужен и на другим активностима, ефикасније је креирати Управљање резервним копијама у истом окружењу. Ови пословни могу бити попут креирања базе података, конфугуриасања, управљања, приступом и управљањем подацима у базе података и креирањем објеката базе података.</text:span></text:p>
      <text:p text:style-name="P87">О овом поглављу смо представили различите стратегије за израду резервних копија, а све у циљу очувања знања и интегритета организације где се користе. Теоретска основа за израду нашег плана Управљања резервним копијама је описана. Разлози за израду резервних копија су наглашени и анализа трошкова је спроведена. Принципи израде основних типова резервних копија као и комбиновање њихово су детаљно објашњени. Основне категорије и типови резервних копија су кобиноване за формирање функционалних стратегија за израду резервних копија.<text:span text:style-name="T82"> Три основна типа резервних копија података су комбинована, тако да смање број резервних копија које могу бити коришћене за опоравак у случају грешке и смањити време потребно за опоравак. Кораци за управљање резервним копијама су приказани и појашњено је како управљати резервним копијама након креирања истих. Неопходно је познавати својства базе података како би се поставила одговарајућа стратегија за израду резервних копија.</text:span></text:p>
      <text:h text:style-name="P38" text:outline-level="1"><text:bookmark-start text:name="__RefHeading___Toc17197_2913585186 Copy 3"/>Резервне копије код <text:span text:style-name="T38">PostgreSQL </text:span>-а<text:bookmark-end text:name="__RefHeading___Toc17197_2913585186 Copy 3"/></text:h>
      <text:p text:style-name="P88">Као и све што садржи вредне податке, и <text:span text:style-name="T38">PostgreSQL</text:span> базу података би требало редовно копирати на резервна места. Обзиром да је процедура веома проста, важно је имати јасно разумевање основних техника и претпоставки. Код <text:span text:style-name="T38">PostgreSQL</text:span> -а постоје три фундаментално различите тахнике за израду резервних копија, а то су: <text:span text:style-name="T38">SQL и</text:span>звоз, израда резервне копије на нивоу датотечног система и континуирано архивирање. Свака од ове тре фундаментално различите технике има своје предности и мане, а у наставку овог поглавља ћемо их детаљније продискутовати.</text:p>
      <text:h text:style-name="P89" text:outline-level="2"><text:bookmark-start text:name="__RefHeading___Toc1968_4007534867"/>SQL<text:span text:style-name="T50"> извоз</text:span><text:bookmark-end text:name="__RefHeading___Toc1968_4007534867"/></text:h>
      <text:p text:style-name="P90"><text:span text:style-name="T50"><text:s/></text:span><text:span text:style-name="T83">Ова техника нам омогућава да генеришемо фајл са </text:span><text:span text:style-name="T84">SQL</text:span><text:span text:style-name="T83"> командама, који ће када се врати серверу, успешно поново креирати базу података у исто стљње у коме се база налазила за време покретања извоза. За ово, </text:span><text:span text:style-name="T84">PostgreSQL</text:span><text:span text:style-name="T83"> нам пружа посебан услужни програм који се зове </text:span><text:span text:style-name="T84">pg_dump</text:span><text:span text:style-name="T83">. Основна синтакса позива овог програма је</text:span></text:p>
      <text:p text:style-name="P91">pg_dump <text:span text:style-name="T61">dbname</text:span> &gt; <text:span text:style-name="T61">dumpfile</text:span></text:p>
      <text:p text:style-name="P92">Као ште се види из овог позива, <text:span text:style-name="T38">pg_dump</text:span> свој излаз прослеђује на стандардни излаз. Док овај позив команде <text:span text:style-name="T38">pg_dump</text:span> креира текстуалну датотеку, можемо креирати и датотеке других формата које нам омогужавају паралелизацију и финију контролу опоравка објеката.</text:p>
      <text:p text:style-name="P91">pg_dump<text:span text:style-name="T50"> је регуларна клијентска апликација </text:span>PostgreSQL<text:span text:style-name="T50"> -а, што значи да свако ко има приступ бази података може покренуту процедуру за израду резервне копије са бли ког удаљеног рачунара, али </text:span>pg_dump<text:span text:style-name="T50"> не користи посебна овлашћења у свом раду. Конкретно, мора имати дозволу за читање свих табела чији резервну копију правимо, а ако желимо да нпаравимо резервну копију целе базе података, морамо га покренути као суперкорисник.</text:span></text:p>
      <text:p text:style-name="P93">Да би смо специфицирали који тачно сервер базе података треба да контактира, <text:span text:style-name="T38">pg_dump</text:span> импелементира параметре <text:span text:style-name="T74">-h </text:span><text:span text:style-name="T85">host</text:span><text:span text:style-name="T63"> и</text:span><text:span text:style-name="T67"> </text:span><text:span text:style-name="T74">-p </text:span><text:span text:style-name="T85">port</text:span><text:span text:style-name="T38">.</text:span> Подразумевана вредност параметра <text:span text:style-name="T74">-h</text:span><text:span text:style-name="T38"> je </text:span><text:span text:style-name="T74">localhost</text:span> односно вредност променљиве окружења<text:span text:style-name="T38"> PGHOST</text:span>, а подразумевана вредност параметра <text:span text:style-name="T38">-p</text:span> се налази у променљивој окружења <text:span text:style-name="T38">PGPORT</text:span>, а уколико ни она нема вредност, користи се дефинисана контанта за време компајлирања. Параметари <text:span text:style-name="T38">-t </text:span><text:span text:style-name="T31">table</text:span><text:span text:style-name="T38"> </text:span>и <text:span text:style-name="T38">-n </text:span><text:span text:style-name="T31">schema</text:span> сукцесивно означавају табелу односно шему чију резервну копију желимо да креирамо. Као и свака друга клијентска апликација <text:span text:style-name="T38">PostgreSQL </text:span>-а, и <text:span text:style-name="T38">pg_dump</text:span> ће подреазумевано се повезати на сервер са корисничким именом корисника оперативног система. За измену ове подразумевана вредности, користимо параметар <text:span text:style-name="T38">-U</text:span> или променљиву окружења <text:span text:style-name="T38">PGUSER</text:span>.</text:p>
      <text:p text:style-name="P94"><text:span text:style-name="T40">Важна предност коришћења овог приступа за израду резервних копија у односу на остале методе је да се излаз ове команде генерално може учитати у новије верзије </text:span><text:soft-page-break/><text:span text:style-name="T86">PostgreSQL</text:span><text:span text:style-name="T40"> -а, за разлику од остале две методе које су веома уско повезане се верзијом сервера. Ова метода је једина употребљива када вршимо миграцију </text:span><text:span text:style-name="T87">на другу архитектуру машине, попут миграције са 32-битне на 64-битну машину. Извоз креиран помоћу ове команде је интерно конзистентан, обзиром да овај извоз представља слику базе података у тренутку покретања ове команде. Ова команда не блокира остала операције над базом података за време свог извршења.</text:span></text:p>
      <text:h text:style-name="P95" text:outline-level="3"><text:bookmark-start text:name="__RefHeading___Toc3590_2494577596"/>Повратак <text:span text:style-name="T38">SQL</text:span> извоза<text:bookmark-end text:name="__RefHeading___Toc3590_2494577596"/></text:h>
      <text:p text:style-name="P96"><text:span text:style-name="T40">Текстуалне датотеке креиране коришћењем</text:span><text:span text:style-name="T86"> pg_dump</text:span><text:span text:style-name="T40"> -а су прилагођене да буду прочитане од стране</text:span><text:span text:style-name="T86"> psql</text:span><text:span text:style-name="T40"> -а са подразумеваним подешавањима. Општи облик команде за повратак базе из текстуалног извоза је:</text:span></text:p>
      <text:p text:style-name="P97">psql -X <text:span text:style-name="T61">dbname</text:span> &lt; <text:span text:style-name="T61">dumfile</text:span></text:p>
      <text:p text:style-name="P98">где је <text:span text:style-name="T31">dumpfile</text:span> датотека која садржи излаз команде <text:span text:style-name="T38">pg_dump</text:span>. Базе података са именом <text:span text:style-name="T31">dbname</text:span> неће бити креирана позивом ове команде, што значи да се прво мора ручно креирати база података пре покретања ове команде. <text:span text:style-name="T38">psql</text:span> такође подржава параметре за одабер сервера базе података и корисничког имена, а параметар <text:span text:style-name="T38">-H</text:span> наређује <text:span text:style-name="T38">psql</text:span> -у да се покрене са подразумеваним подешавањима. Нетекстуалне датотеке се могу повратити коришћењем команде <text:span text:style-name="T38">pg_restore</text:span>.</text:p>
      <text:p text:style-name="P98">Пре повратка <text:span text:style-name="T38">SQL</text:span> извоза, у бази морају постојати сви корисници који имају власништва над повраћеним објектима или имају дозволе над објектима из извоза. Уколико не постоје, повратак неће моћи успешно да поново креира објекте са оригиналним власништвом и дозволама. Подразумевано <text:span text:style-name="T38">psql</text:span> скрипта ће настави са радом након <text:span text:style-name="T38">SQL</text:span> грешке. Што значи да ћемо имате само делимично повраћену базу података.</text:p>
      <text:h text:style-name="P99" text:outline-level="3"><text:bookmark-start text:name="__RefHeading___Toc3590_2494577596 Copy 1"/><text:span text:style-name="T88">Коришћење</text:span> <text:span text:style-name="T89">pg_dumpall</text:span><text:bookmark-end text:name="__RefHeading___Toc3590_2494577596 Copy 1"/></text:h>
      <text:p text:style-name="P100"><text:s/><text:span text:style-name="T88">pg_dump извози само једну базу података истовремено и без података о улогама и просторима табела. Да би омогућио извоз целог садржаја кластера база података направљен је програм</text:span><text:span text:style-name="T89"> pg_dumpall</text:span><text:span text:style-name="T88">. </text:span><text:span text:style-name="T89">pg_dumpall</text:span><text:span text:style-name="T88"> израђује резервну копију сваке базе података у датом кластеру, а такође извози и податке који се користе шитом кластера попут улога и дефиниција простора табела. Основно коришћење ове команде је:</text:span></text:p>
      <text:p text:style-name="P101">pg_dumpall &gt; <text:span text:style-name="T61">dumpfile</text:span><text:span text:style-name="T50">, а резултујући извоз може бити повраћен помоћу </text:span>psql -X -f <text:span text:style-name="T61">dumpfile</text:span> postgres</text:p>
      <text:p text:style-name="P102">Неопходно је увек да имамо суперкориснички приступ над базом података када вршимо опоравак помоћу <text:span text:style-name="T38">pg_dumpall</text:span>, обзиром да <text:span text:style-name="T38">pg_dumpall</text:span> захтева улоге и информације о простуру табела. <text:span text:style-name="T38">pg_dumpall</text:span> функционише тако што покреће команде за поновно креирање улога, простора табела и празних база података, а затим позива <text:span text:style-name="T38">pg_dump</text:span> над сваком од база података. Што значи да ће свака базе интерно бити <text:soft-page-break/>конзистентна, али слике различитих база података неће бити синхронизоване. Подаци који се користе широм кластера могу бити извезени посебно додајући параметар <text:span text:style-name="T38">--globals-only</text:span> команди <text:span text:style-name="T38">pg_dumpall</text:span>. Ово је нопходно за потпуну резервну копију кластера, уколико је покренут <text:span text:style-name="T38">pg_dump</text:span> на појединачним базама података.</text:p>
      <text:h text:style-name="P103" text:outline-level="3"><text:bookmark-start text:name="__RefHeading___Toc3733_2494577596"/>Управљање великим базама података<text:bookmark-end text:name="__RefHeading___Toc3733_2494577596"/></text:h>
      <text:p text:style-name="P102">Поједини оперативни системи имају дефинисану максималну величину датотеке која може бити ограничавајући фактор приликом креирања велик<text:span text:style-name="T74">e</text:span><text:span text:style-name="T38"> pg_dump</text:span> датотеке. Обзиром да <text:span text:style-name="T38">pg_dump</text:span> може да пише на стандардни излаз, можемо користити алате које нам пружа стандардни <text:span text:style-name="T38">Unix</text:span> да би смо нашли заобилазно решење овог проблема. Постоји неколико различитих метода, а неке дајемо у наставку:</text:p>
      <text:p text:style-name="P101">pg_dump <text:span text:style-name="T61">dbname</text:span> | gzip &gt; <text:span text:style-name="T61">filename</text:span>.gz, <text:span text:style-name="T50">опоравак са </text:span>gunzip -c <text:span text:style-name="T61">filename</text:span>.fz | psql <text:span text:style-name="T61">dbname</text:span></text:p>
      <text:p text:style-name="P101">pg_dump <text:span text:style-name="T61">dbname</text:span> | split -b 2G - <text:span text:style-name="T61">filename</text:span><text:span text:style-name="T50">, опоравак са </text:span>cat <text:span text:style-name="T61">filename</text:span>* | psql <text:span text:style-name="T61">dbname</text:span></text:p>
      <text:p text:style-name="P102">Уколико је <text:span text:style-name="T38">PostgreSQL</text:span> изграђен за систем са <text:span text:style-name="T38">zlib</text:span> библиотеком за компресију, произвољни формат извоза може компресовати податке када их буде писао на стандардни излаз. Ово ће произвести датотеку сличне величине као и да смо користили <text:span text:style-name="T38">gzip</text:span>, али предност овога је што ће нам омогућити селективни опоравак табела. Следећа команда извози баззпу података са произвољним форматом:</text:p>
      <text:p text:style-name="P101">pg_dump -Fc <text:span text:style-name="T61">dbname</text:span> &gt; <text:span text:style-name="T61">filename</text:span><text:span text:style-name="T50">, а опоравак са</text:span> pg_restore -d <text:span text:style-name="T61">dbname</text:span> <text:span text:style-name="T61">filename</text:span></text:p>
      <text:p text:style-name="P102">За веома велике базе података, мораћемо да комбинујемо команду <text:span text:style-name="T38">split </text:span>са неким од ова две приступа. Да бисмо убрзали извоз велике базе података, можемо користити <text:span text:style-name="T38">pg_dump</text:span> у паралелизованом режиму рада, који ће извести више табела истовремено. Параметром <text:span text:style-name="T74">-j</text:span><text:span text:style-name="T38"> </text:span>контролишемо степен паралелизације и код извоза и код опоравка, а пример коришћења дајмо у наставку:</text:p>
      <text:p text:style-name="P101">pg_dump -j <text:span text:style-name="T61">num</text:span> -F d -f <text:span text:style-name="T61">out</text:span>.<text:span text:style-name="T61">dir</text:span> <text:span text:style-name="T61">dbname</text:span></text:p>
      <text:h text:style-name="P104" text:outline-level="2"><text:bookmark-start text:name="__RefHeading___Toc1968_4007534867 Copy 1"/>Израда резервне копије на нивоу датотечног система<text:bookmark-end text:name="__RefHeading___Toc1968_4007534867 Copy 1"/></text:h>
      <text:p text:style-name="P105">Алтернативна стратегија за израду резервних копија код <text:span text:style-name="T38">PostgreSQL</text:span> -а може бити директно копирање датотека које користи <text:span text:style-name="T38">PostgreSQL</text:span> за чување података у бази података. Може се користити било који метод за израду резервних копија датотека, а ми ћемо у наставку дати један пример:</text:p>
      <text:p text:style-name="P106">tar -cf backup.tar /usr/local/pgsql/data</text:p>
      <text:p text:style-name="P105">Постоје два ограничења, која чине ову методу непректичном односно мање моћном у односу на <text:span text:style-name="T38">pg_dump</text:span>.</text:p>
      <text:p text:style-name="P105"><text:soft-page-break/>Први, сервер базе података мора бити угашен како би смо добили употребљиву резервну копију. Половичне мере попут забране свих конекција неће функисонисати, делимично зато што <text:span text:style-name="T38">tar</text:span> и слични алати не праве атомични снимак стања датотечног система, али и због интерног баферовања унутар сервера. Такође и приликом опоравка базе података, сервер мора бити заустављен.</text:p>
      <text:p text:style-name="P105">А други разлог се налази у детаљима распореда датотечног система базе података. <text:s/><text:span text:style-name="T90">Можда ћемо имати потребу да направимо резервну копију или опоравак појединачних табела или база података из одговарајућих датотека или директоријума. Ово неће радити, јер информације садржане у тим датотекама нису употребљиве без дневника потврда, </text:span><text:span text:style-name="T91">pg_xact/*</text:span><text:span text:style-name="T90">, који садржи потврдне статусе свих трансакција. Датотеке табела су једнио употребљиве са овим информацијама. Такође, није могуће повратити табелу и додељено јој </text:span><text:span text:style-name="T91">pg_xact</text:span><text:span text:style-name="T90"> податке, јер би то направило бескорисним све остале табеле у кластеру базе података. Дакле, резервна копија не нивоу датотечног система једину ради као потпуна копија и опоравак целог кластера база података.</text:span></text:p>
      <text:p text:style-name="P107">Алтернатива овом приступу може бити израда конзистентне слике директоријума података, уколико датотечни систем омогућава овакву функционалност. Ова процедура подразумева израду смрзнуте слике простора који садржи базу података, затим копирање целог директоријума са подацима из слике на резервни уређај, затим отпуштање смрзнуте слике. <text:span text:style-name="T92">Ово ће радити чак и ако је сервер базе података покренут. Резервна копија креирана на овај начин чува датетеке у стању као да сервер базе података није правилно угашен, што значи да ће приликом покретања сервера над оваквим датотекама сервер помислити да се последњи пут није регуларно угасио и поново ће репродуковати </text:span><text:span text:style-name="T93">WAL</text:span><text:span text:style-name="T92">. Ово није проблем, али морамо бити свесни овога и укључити и </text:span><text:span text:style-name="T93">WAL</text:span><text:span text:style-name="T92"> у резервну копију. Да би се убрзао процес опоравка из резервне копије креиране на овај начин, може се непосредно пре креирања резервне копије позвати команда </text:span><text:span text:style-name="T93">CHECKPOINT</text:span><text:span text:style-name="T92">.</text:span></text:p>
      <text:p text:style-name="P108">Уколико је база података распоређена на више датотечних система могуће је да не постоји начин истовременог креирања замрзнутих слика свих простора. Због овога је нопходно се добро упознати са датотечним системом пре него што одаберемо ову технику за израду резервних копија. Када ова опција није могућа док ради сервер, могућа је када се сервер заустиви довољно дуго да се успоставе истоветне слике свих датотека. А друга опција је континуирано архивирање, о чему је бити више речи у наредном потпоглављу. </text:p>
      <text:p text:style-name="P108">Још једна потенцијална опција је коришћење команде <text:span text:style-name="T38">rsync</text:span> за прављење копије датотечног система. Прво се покрене <text:span text:style-name="T38">rsync</text:span> док сервер још ради, а затим се сервер искључи док се не израчуна контролна сума командом <text:span text:style-name="T38">rsync --checksum</text:span>. Друго покретање команде <text:span text:style-name="T38">rsync</text:span> ће бити значајно брже, јер неће имати много података за пренос, а крајњи резултат ће бити конзистентан, јер сервер није радио. Ова метода нам омогућава минимално време застоја за израду резервне копије копирањем датотека.</text:p>
      <text:p text:style-name="P108"><text:soft-page-break/>Резервна копија датотечног система ће бити већа од <text:span text:style-name="T38">SQL</text:span> извоза података, јер нпр. <text:span text:style-name="T38">pg_dump</text:span> не мора да извози садржај индекса већ само команду за његово поновно креирање. Док са друге стране, <text:span text:style-name="T38">pg_dump</text:span> је и спорији.</text:p>
      <text:h text:style-name="P109" text:outline-level="2"><text:bookmark-start text:name="__RefHeading___Toc1968_4007534867 Copy 1 Copy 1"/>Континуирано архивирање и опоравак у тренутку<text:bookmark-end text:name="__RefHeading___Toc1968_4007534867 Copy 1 Copy 1"/></text:h>
      <text:p text:style-name="P110">Све време <text:span text:style-name="T38">PostgrSQL </text:span>одржава <text:span text:style-name="T38">write ahead log(WAL)</text:span> у <text:span text:style-name="T38">pg_wal/</text:span> поддиректоријуму директоријума кластера података. Записи у овом дневнику су свака промена направљена над датотекама са подацима базе података. Овај дневник је првенствено направљен за осигурање од отаказа. Уколико систем падне, база података може бити повраћена у конзистентно стање поновном репродукцијом уноса дневника направљеним од последње контролне тачке. А постојање овог дневника нам омогућава и трећи начин за изерду резервне копије базе података. Као што смо и навели у претходном поглављу, можемо комбиновати резервну копију датотечног система са резервном копијом овог дневника. Када дође до опоравка, прво ћемо повратити податке из резервне копије датотечног система, а затим ћемо поново репродуковати ставке овог дневника како би смо повратили систем у стање непосредно пре пада. Уједно, овај приступ је и најкомпликованији од свих до сада наведених, али има и својих предности:</text:p>
      <text:p text:style-name="P110">Не захтева савршено конзистентну резервну копију датотечно система на почетку. Било каква интерна неконзистентност у резервној копији ће бити поправљена поновном репродукцијом <text:span text:style-name="T38">WAL</text:span> дневника, што се и иначе дешава код опоравка од пада система. Дакле, не треба нам датотечни систем са могућношћу атомичног снимања, већ само <text:span text:style-name="T38">tar</text:span> или неки сличан програм за управљање компресованим датотекама.</text:p>
      <text:p text:style-name="P110">Обзиром да имамо могућност комбиновања неограничено дугог низа <text:span text:style-name="T38">WAL </text:span>датотека за репордуковање, континуирана израда резервних копија се постиже једноставним наставком архивирања ових датотека. Ово је посебно битно за велике базе података, где је честно незахвално правити потпуну резервну копију учестално.</text:p>
      <text:p text:style-name="P110">Нисмо у обавези да репродукујемо све записе у <text:span text:style-name="T38">WAL</text:span> дневнику до краја, већ можемо репродуковања зауставити у било којој тачи и имати конзистентно стање базе података у датом времену. Што значи да нам ова техника омогућава опоравак у тренутно, односно могуће је повратити базу података у стање било ког тренутка у времену од последње основне резервне копије.</text:p>
      <text:p text:style-name="P111">Уколико редовно преносимо серију <text:span text:style-name="T38">WAL</text:span> датотека на другу машину која је учитана са истом основном резервном датотеком, имамо систем у спремнон стању, односно имамо систем који у било ком тренутку можемо покренути и имати готово идентичну копије базе података.</text:p>
      <text:p text:style-name="P111">Са друге стране, не смемо користити <text:span text:style-name="T38">pg_dump </text:span>и <text:span text:style-name="T38">pg_dumpall</text:span> као до континуираног архивирања, јер овај начин израде резервних копија садржи логиче информације које не садрже довољно информација потребне за <text:span text:style-name="T38">WAL</text:span> репродуковање.</text:p>
      <text:p text:style-name="P111"><text:soft-page-break/>Како и код резервне копије датотечног система, и ова метода за израду резервних копија подржава опоравак само целог кластера базе података, а не подскупа. Поред сбих предности, једна од мана је и што захтева доста простора на медијуму за скалдиштење података, основна резервна копија може бити огромна, а заузет систем ће генерисати велику количину података у <text:span text:style-name="T38">WAL</text:span> дневнику који се мора копирати. Али ова техника је и намењена за посебне ситуације где је потребна висока поузданост. Да би опоравак био успешан коришћењем ове технике, потребан је континуирани низ архивираних <text:span text:style-name="T38">WAL</text:span> датотека који датира из времена започчињања почетка израде резервних копија. А пре почетка коришћења овог начина за архивирање, потребно је подесити и тестирати процедуру за архивирање помоћу <text:span text:style-name="T38">WAL</text:span> датотека пре него што се направи прва резервна копија.</text:p>
      <text:p text:style-name="P112">Поступак опоравка базе података из <text:span text:style-name="T38">WAL </text:span>датотека је следећи:</text:p>
      <text:list text:style-name="L6">
        <text:list-item>
          <text:p text:style-name="P113">Угаси се сервер, уколико је упаљен.</text:p>
        </text:list-item>
        <text:list-item>
          <text:p text:style-name="P114">Уколико има довољно простора, копираћемо цео директоријум са подацима о кластеру и све просторе табела на привремену локацију за случај да нам затреба касније. Уколико немамо довољно простора, минимално што би требало да копирамо је садржај кластеровог поддиректоријума <text:span text:style-name="T38">pg_wal</text:span>, који садржи <text:span text:style-name="T38">WAL </text:span>датотеке које нису архивиране пре него што је систем угашен.</text:p>
        </text:list-item>
        <text:list-item>
          <text:p text:style-name="P114">Обирсати све постојеће датотеке и поддиректоријуме унутар кластеровог диркеторијума са подацима и унутар кореног директоријума било ког простора табела који користимо.</text:p>
        </text:list-item>
        <text:list-item>
          <text:p text:style-name="P114">Уколико опорављамо базу из потпуне резервне копије, можемо повратити датетеке базе података у задате директоријуме дирктно. Морамо им обезбедити одговарајућа власничка права и пермисије.</text:p>
        </text:list-item>
        <text:list-item>
          <text:p text:style-name="P114">Уколико опорављамо базу из инкременталне резервне копије, морамо повратити инкременталну резервну копију и све раније резервне копије које директно или индиректно зависе од машине где се врши опоравак.</text:p>
        </text:list-item>
        <text:list-item>
          <text:p text:style-name="P114">Обирсати све датотеке из директоријума <text:span text:style-name="T38">pg_wal/</text:span>, оне потичу из резервне копије датотечног систам и због тога су вероватно застареле у односу на актуелне. Уколико није архивиран директоријум <text:span text:style-name="T38">pg_wal</text:span>/, поново ћемо га креирати са одговарајућим дозволама и водећи рачуна да га поново упоставимо као симболичку везу, уколико је то био и пре отказа система.</text:p>
        </text:list-item>
        <text:list-item>
          <text:p text:style-name="P114">Уколико имамо неархивиране сегменте <text:span text:style-name="T38">WAL</text:span> датотека сачуваних у кораку 2, копираћемо их у директоријум <text:span text:style-name="T38">pg_wal/</text:span>.</text:p>
        </text:list-item>
        <text:list-item>
          <text:p text:style-name="P114">Постављаму конфигурацију опоравка у <text:span text:style-name="T38">postgresql.conf</text:span> датотеци и правимо датотеку <text:span text:style-name="T38">recovery.sign</text:span><text:span text:style-name="T74">al</text:span><text:span text:style-name="T38"> </text:span>у кластеровом директоријуму података. Такође, требало <text:soft-page-break/>би и привремено забранити осталим корисницима повезивање на базу док опоравк не буде успешан, а то радимо модификацијом датотеке <text:span text:style-name="T38">pg_hba.conf</text:span>.</text:p>
        </text:list-item>
        <text:list-item>
          <text:p text:style-name="P114">Покрећемо сервер, који улази у мод опоравка и креће са читањем архивираних <text:span text:style-name="T38">WAL</text:span> датотека које су му потребне. Уколико се опоравак прекине због спољне грешке, сервер можемо рестартоваи и опоравак ће се наставити. Након завршетка опоравка, сервер ће обрисати датотеку <text:span text:style-name="T38">recovery.signal</text:span> коју смо креирали у кораку 8.</text:p>
        </text:list-item>
        <text:list-item>
          <text:p text:style-name="P114">Проверићемо садржај базе података да бисмо се осигрурали да смо повратили базу на исправно стање. Уколико је провера неуспешна враћамо се на корак 1, а уколико је успешна дозвољавамо корисницима повезивање на базу, модификацијом <text:span text:style-name="T38">pg_hba.conf</text:span> датотеке.</text:p>
        </text:list-item>
      </text:list>
      <text:h text:style-name="P115" text:outline-level="1"><text:bookmark-start text:name="__RefHeading___Toc17197_2913585186 Copy 2"/><text:span text:style-name="T94">Пример а</text:span>утоматизациј<text:span text:style-name="T94">е</text:span> израде резервн<text:span text:style-name="T94">е</text:span> копиј<text:span text:style-name="T94">е</text:span><text:bookmark-end text:name="__RefHeading___Toc17197_2913585186 Copy 2"/></text:h>
      <text:p text:style-name="P116">Најлакша за реализацију и за разумевање мето<text:span text:style-name="T95">д</text:span> израде резервне копије у <text:span text:style-name="T38">PostgreSQL</text:span> -у је коришћењем команде <text:span text:style-name="T38">pg_dumpall.</text:span> У наставку овог рада даћемо предлог скрипте која ће се покретати свако<text:span text:style-name="T95">г</text:span> дана у 04:00 по локалном времену и правити резервну копију целе базе података, и то тако што ће <text:span text:style-name="T96">се </text:span>чувати до 7 дана у назад резервне копије<text:span text:style-name="T95">, у компресованом формату</text:span>.<text:span text:style-name="T96"> Иста ова резервна копија ће се чувати и на физички другом серверу који је поделио директоријум са сервером базе података преко</text:span><text:span text:style-name="T97"> NFS</text:span><text:span text:style-name="T96"> протокола.</text:span><text:span text:style-name="T38"> </text:span>За покретање ове скрипте у задато време користићемо Линукс сервис <text:span text:style-name="T38">cron.</text:span> У наставку дајемо конфигурацију <text:span text:style-name="T38">cron</text:span> сервиса:</text:p>
      <text:p text:style-name="P116">0 4 * * *<text:span text:style-name="T98"> postgres</text:span> /<text:span text:style-name="T38">backups/sql_dump</text:span>/<text:span text:style-name="T38">backup</text:span>.sh</text:p>
      <text:p text:style-name="P116">Овај <text:span text:style-name="T38">cron </text:span>израз има 5 поља<text:span text:style-name="T99"> за одређивање времена</text:span> раздвојених размаком од којих свако представља<text:span text:style-name="T99">, следеће поље одређује који корисник ће покренути скрипту, а последње поље говори где се налази скрипта</text:span>:</text:p>
      <text:p text:style-name="P116">0 - покрени у нултом минуту</text:p>
      <text:p text:style-name="P116">4 - покрени у 4 сата</text:p>
      <text:p text:style-name="P116">* - покрени било ког дана у месецу</text:p>
      <text:p text:style-name="P116">* - покрени било ког месеца у години</text:p>
      <text:p text:style-name="P116">* - покрени било ког дана у недељи</text:p>
      <text:p text:style-name="P117">postgres - <text:span text:style-name="T50">име корисника које ће покретати скрипту</text:span></text:p>
      <text:p text:style-name="P118">Овај изарз је потребно додати на крај системске датотеке <text:span text:style-name="T38">/etc/crontab</text:span>.</text:p>
      <text:p text:style-name="P118">Скрипта које ће се користити за израду резервне копије дата је у наставку:</text:p>
      <text:p text:style-name="P119"><text:span text:style-name="T100">#!/bin/bash<text:line-break/><text:tab/>export PATH="/usr/lib/postgresql/18/bin:/usr/bin:/bin:$PATH"<text:line-break/><text:tab/>pg_dumpall</text:span><text:span text:style-name="T101"> | gzip &gt; </text:span><text:span text:style-name="T100">/backups/sql_dump/backup$(dat</text:span><text:span text:style-name="T102">e</text:span><text:span text:style-name="T100"> +"%u").</text:span><text:span text:style-name="T101">gz<text:line-break/></text:span><text:span text:style-name="T103"><text:tab/>cp </text:span><text:span text:style-name="T100">/backups/sql_dump/backup$(dat</text:span><text:span text:style-name="T102">e</text:span><text:span text:style-name="T100"> +"%u").</text:span><text:span text:style-name="T101">gz</text:span><text:span text:style-name="T103"> /mnt/nfs-server/</text:span></text:p>
      <text:p text:style-name="P120">О<text:span text:style-name="T104">бавезна, а врло често и заборављена ствар код израде резервних копија је тестирање и надгледање израђених резервних копија. За то ћемо користити посебну скрипту чији садржај дајемо у наставку:</text:span></text:p>
      <text:p text:style-name="P121"><text:span text:style-name="T105">#!/bin/bash<text:line-break/><text:tab/></text:span><text:span text:style-name="T106">ts=$(date</text:span><text:span text:style-name="T107"> </text:span><text:span text:style-name="T106">+%s)<text:line-break/></text:span><text:soft-page-break/><text:span text:style-name="T106"><text:tab/></text:span><text:span text:style-name="T102">gunzip -c /backups/</text:span><text:span text:style-name="T105">sql_dump/backup$(dat</text:span><text:span text:style-name="T106">e</text:span><text:span text:style-name="T105"> +"%u").</text:span><text:span text:style-name="T108">gz</text:span><text:span text:style-name="T102"> | psql postgres<text:line-break/><text:tab/>rv=$?<text:line-break/><text:tab/>te=$(date</text:span><text:span text:style-name="T109"> +%s</text:span><text:span text:style-name="T102">)<text:line-break/><text:tab/>rto=$</text:span><text:span text:style-name="T109">((</text:span><text:span text:style-name="T102">te – ts</text:span><text:span text:style-name="T109">))<text:line-break/><text:tab/>if [ $rv </text:span><text:span text:style-name="T110">-</text:span><text:span text:style-name="T109">eq 0 ]<text:line-break/></text:span><text:span text:style-name="T111"><text:tab/>then</text:span><text:span text:style-name="T109"><text:line-break/><text:tab/><text:tab/>echo "Restore completed successfully. RTO: $rto"<text:line-break/><text:tab/>else<text:line-break/><text:tab/><text:tab/>echo "Restore didn't completed successfully."<text:line-break/><text:tab/>fi</text:span></text:p>
      <text:p text:style-name="P122"><text:span text:style-name="T112">На почетку ове скрипте запамтимо време у милисекундама од 1. 1. 1970. године, затим декомпресујемо датотеку са резервном копијом и покренемо опоравак базе података, запамтимо вредност која нам говори да ли је опоравак успешан, израчунавамо </text:span><text:span text:style-name="T113">RTO</text:span><text:span text:style-name="T112"> (</text:span><text:span text:style-name="T113">eng. Recovery Time Objective</text:span><text:span text:style-name="T112">), односно време потребно за опоравак</text:span><text:span text:style-name="T114">, и на крају исписујемо да ли је опоравак био успешан и уколико јесте, време потребно за опоравак.</text:span></text:p>
      <text:p text:style-name="P123">Ова скрипта би требало да се извршава над неком независном инстанцом ДБМС сервера, никако над продукционом. Али како би смо истакли најважније делове који се тичу саме аутоматизације израде резервне копије, за потребе овог семинарског рада, извршило смо је над продукционом инстанцом.<text:span text:style-name="T115"> Такође, није довољно да скрипта испише резултате на стандардни излаз, већ би требало да контактира неки сервис који ће даље процусуирате добијене податке, али то превазилази обим овог рада.</text:span></text:p>
      <text:h text:style-name="P124" text:outline-level="1"><text:bookmark-start text:name="__RefHeading___Toc8802_2913585186 Copy 2"/>Закључак<text:bookmark-end text:name="__RefHeading___Toc8802_2913585186 Copy 2"/></text:h>
      <text:p text:style-name="P125">У овом раду смо дали теоријиски увод за резервне копије база података, <text:span text:style-name="T116">затим смо продискутовали важност израде резервних копија као и ефекте и трошкове израде резервних копија. Затим смо дали поделу типова резервних копија и стратегија за израду резервних копија, а на крају смо дали и смернице за израду плана прављења резервних копија. У следећем поглављу смо објаснили 3 основна типа резервних копија које подржава </text:span><text:span text:style-name="T117">PostgreSQL </text:span><text:span text:style-name="T116">ДБМС, и то, </text:span><text:span text:style-name="T117">SQL</text:span><text:span text:style-name="T116"> извоз, израду резервне копије на нивоу датотечног система и континуирано архивирање и опоравак у тренутку.</text:span><text:span text:style-name="T118"> У четвртом поглављу смо дали пример скрипте и начин покретања, који нам омогућава израду резервних копија сваког дана, са чувањем до 7 дана у назад, на 2 физички различите локације. А након тога смо и дали пример скрипте која тестира направљену резервну копију.</text:span></text:p>
      <text:p text:style-name="P126">Као што се и види кроз сам рад, <text:span text:style-name="T119">израда резервних копија и стратегије за израду резервних копија уопште није једноставан посао, али је врло важан за сваку организацију која чува своје податке у бази података.</text:span><text:span text:style-name="T120"> Ми смо у овом раду покушали читаоцима да представимо један од најлакшијих начина за аутоматизацију израде резервне копије код </text:span><text:span text:style-name="T121">PostgreSQL</text:span><text:span text:style-name="T120"> ДБМС -а, али смо му и нагласили и дали пример како на крајње аутоматизован начин може тестирати израђену резервну копију.</text:span></text:p>
      <text:p text:style-name="P127">Главно унапређење ове скрипте је свакако прелазак на континуирано архивирање и опоровак у тренутку. Али коришћењем датог начина израде резервне копије задржавамо<text:span text:style-name="T122"> могућност миграције података и</text:span> лакоћу имплементације, јер у неким случајевима нису увек најбитније перформансе. Интеграција са алатима попут <text:span text:style-name="T38">Prometheus</text:span> -а, за надгледање заузећа простора на диску од стране резервних копија и алармирање за поенцијални недостатак простора би било врло значајно<text:span text:style-name="T122"> унапређење</text:span>.</text:p>
      <text:h text:style-name="P128" text:outline-level="1"><text:bookmark-start text:name="__RefHeading___Toc12644_3546172039"/>Литература<text:bookmark-end text:name="__RefHeading___Toc12644_3546172039"/></text:h>
      <text:list text:style-name="WWNum2">
        <text:list-item>
          <text:p text:style-name="P129"><text:span text:style-name="T28">Jim Gray</text:span>, "<text:span text:style-name="T28">The Transaction Concept: Virtues and Limitations</text:span>", <text:span text:style-name="T28">Tandem Computers Incorporated</text:span>,<text:span text:style-name="T50"> </text:span><text:span text:style-name="T123">1</text:span><text:span text:style-name="T28">981</text:span><text:span text:style-name="T50">.</text:span></text:p>
        </text:list-item>
        <text:list-item>
          <text:p text:style-name="P130">S. Nakamura, T. Nakagawa, <text:span text:style-name="T38">"Stochastic Reliability Modeling, Optimiyation and Applications", World Scientific, 2010.</text:span></text:p>
        </text:list-item>
        <text:list-item>
          <text:p text:style-name="P131">M. Dudjak, M. Kohler, I. Lukic, "Survey of Database Backup Management", OTO, 2018.</text:p>
        </text:list-item>
        <text:list-item>
          <text:p text:style-name="P132">https://www.postgresql.org/docs/curren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fo:hyphenation-keep="auto" loext:hyphenation-keep-type="column" loext:hyphenation-keep-line="false"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Standard" style:default-outline-level="1" style:class="chapter">
      <style:paragraph-properties fo:margin-left="1.302cm" fo:margin-right="0cm" fo:margin-top="0.15cm" fo:margin-bottom="0cm" style:contextual-spacing="false" fo:text-indent="-0.954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chapter">
      <style:paragraph-properties fo:margin-left="1.111cm" fo:margin-right="0cm" fo:text-indent="-0.764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chapter">
      <style:paragraph-properties fo:margin-top="0.125cm" fo:margin-bottom="0cm" style:contextual-spacing="false"/>
      <style:text-properties fo:font-size="14pt" style:font-size-asian="14pt" style:font-size-complex="14pt"/>
    </style:style>
    <style:style style:name="Heading_20_4" style:display-name="Heading 4" style:family="paragraph" style:parent-style-name="Standard" style:default-outline-level="4" style:list-style-name="" style:class="chapter">
      <style:paragraph-properties fo:margin-left="0.349cm" fo:margin-right="0cm" fo:text-indent="0cm" style:auto-text-indent="false"/>
      <style:text-properties fo:font-size="12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1" style:display-name="Contents 1" style:family="paragraph" style:parent-style-name="Standard" style:default-outline-level="" style:class="index">
      <style:paragraph-properties fo:margin-left="0cm" fo:margin-right="0.335cm" fo:margin-top="0.496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Contents_20_2" style:display-name="Contents 2" style:family="paragraph" style:parent-style-name="Standard" style:default-outline-level="" style:class="index">
      <style:paragraph-properties fo:margin-left="1.205cm" fo:margin-right="0cm" fo:margin-top="0.222cm" fo:margin-bottom="0cm" style:contextual-spacing="false" fo:text-indent="-0.848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Standard" style:default-outline-level="" style:class="index">
      <style:paragraph-properties fo:margin-left="1.903cm" fo:margin-right="0cm" fo:text-indent="-1.132cm" style:auto-text-indent="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0.984cm" fo:margin-right="0cm" fo:text-indent="-0.635cm" style:auto-text-indent="false"/>
    </style:style>
    <style:style style:name="Table_20_Paragraph" style:display-name="Table Paragraph" style:family="paragraph" style:parent-style-name="Standard" style:default-outline-level="">
      <style:paragraph-properties fo:margin-left="0.189cm" fo:margin-right="0cm" fo:line-height="0.452cm"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 style:family="paragraph" style:parent-style-name="Standard" style:default-outline-level="">
      <style:paragraph-properties fo:margin-left="0cm" fo:margin-right="0cm" fo:margin-top="0.494cm" fo:margin-bottom="0.494cm" style:contextual-spacing="false" fo:text-align="justify" style:justify-single-word="false" fo:orphans="2" fo:widows="2" fo:text-indent="1.27cm" style:auto-text-indent="false"/>
      <style:text-properties fo:font-size="12pt" style:font-size-asian="12pt"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fo:orphans="2" fo:widows="2"/>
      <style:text-properties fo:font-size="12pt" style:font-size-asian="12pt" style:font-size-complex="12pt"/>
    </style:style>
    <style:style style:name="TOC_20_Heading" style:display-name="TOC Heading" style:family="paragraph" style:parent-style-name="Index_20_Heading" style:next-style-name="Standard" style:default-outline-level="" style:list-style-name="">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9" style:list-style-name="" style:class="chapter">
      <style:paragraph-properties fo:margin-top="0.106cm" fo:margin-bottom="0.106cm" style:contextual-spacing="false"/>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Слика" style:family="paragraph" style:parent-style-name="Caption" style:default-outline-level=""/>
    <style:style style:name="Table_20_Contents" style:display-name="Table Contents" style:family="paragraph" style:parent-style-name="Standard" style:default-outline-level=""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complex="OpenSymbol1" style:font-family-complex="Open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omplex="Symbol" style:font-family-complex="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Symbol" style:font-family-complex="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Symbol" style:font-family-complex="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omplex="Symbol" style:font-family-complex="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Symbol" style:font-family-complex="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Symbol" style:font-family-complex="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omplex="Symbol" style:font-family-complex="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Symbol" style:font-family-complex="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Symbol" style:font-family-complex="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omplex="Symbol" style:font-family-complex="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Symbol" style:font-family-complex="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Symbol" style:font-family-complex="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omplex="Symbol" style:font-family-complex="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Symbol" style:font-family-complex="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Symbol" style:font-family-complex="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omplex="Symbol" style:font-family-complex="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Symbol" style:font-family-complex="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Symbol" style:font-family-complex="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omplex="Symbol" style:font-family-complex="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Symbol" style:font-family-complex="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Symbol" style:font-family-complex="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Symbol" style:font-family-complex="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Symbol" style:font-family-complex="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Symbol" style:font-family-complex="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omplex="Symbol" style:font-family-complex="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Symbol" style:font-family-complex="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Symbol" style:font-family-complex="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omplex="Symbol" style:font-family-complex="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Symbol" style:font-family-complex="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Symbol" style:font-family-complex="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omplex="Symbol" style:font-family-complex="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Symbol" style:font-family-complex="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Symbol" style:font-family-complex="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omplex="Symbol" style:font-family-complex="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Symbol" style:font-family-complex="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Symbol" style:font-family-complex="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omplex="Symbol" style:font-family-complex="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Symbol" style:font-family-complex="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Symbol" style:font-family-complex="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omplex="Symbol" style:font-family-complex="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Symbol" style:font-family-complex="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Symbol" style:font-family-complex="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omplex="Symbol" style:font-family-complex="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Symbol" style:font-family-complex="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Symbol" style:font-family-complex="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omplex="Symbol" style:font-family-complex="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Symbol" style:font-family-complex="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Symbol" style:font-family-complex="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omplex="Symbol" style:font-family-complex="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Symbol" style:font-family-complex="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Symbol" style:font-family-complex="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omplex="Symbol" style:font-family-complex="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Symbol" style:font-family-complex="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Symbol" style:font-family-complex="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Symbol" style:font-family-complex="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Symbol" style:font-family-complex="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Symbol" style:font-family-complex="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omplex="Symbol" style:font-family-complex="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Symbol" style:font-family-complex="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Symbol" style:font-family-complex="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omplex="Symbol" style:font-family-complex="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Symbol" style:font-family-complex="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Symbol" style:font-family-complex="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omplex="Symbol" style:font-family-complex="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Symbol" style:font-family-complex="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Symbol" style:font-family-complex="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omplex="Symbol" style:font-family-complex="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Symbol" style:font-family-complex="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Symbol" style:font-family-complex="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Symbol" style:font-family-complex="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Symbol" style:font-family-complex="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Symbol" style:font-family-complex="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Symbol" style:font-family-complex="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Symbol" style:font-family-complex="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Symbol" style:font-family-complex="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Symbol" style:font-family-complex="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Symbol" style:font-family-complex="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Symbol" style:font-family-complex="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2%.%3%.%4%]" style:num-prefix="["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3%.%4%.%5%]" style:num-prefix="["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4%.%5%.%6%]" style:num-prefix="["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5%.%6%.%7%]" style:num-prefix="["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6%.%7%.%8%]" style:num-prefix="["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7%.%8%.%9%]" style:num-prefix="["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1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2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3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7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48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2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3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4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5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5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6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7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58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59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0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1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2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3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4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4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6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7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68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69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0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1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2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3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4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cm" fo:margin-top="0cm" fo:margin-bottom="0cm" style:contextual-spacing="false" fo:text-align="start" style:justify-single-word="false" fo:orphans="0" fo:widows="0" fo:hyphenation-ladder-count="no-limit" fo:hyphenation-keep="auto" loext:hyphenation-keep-type="column" loext:hyphenation-keep-line="false" fo:text-indent="0cm" style:auto-text-indent="false" style:page-number="auto" fo:background-color="transparent" style:punctuation-wrap="simple" style:writing-mode="lr-tb">
        <style:tab-stops>
          <style:tab-stop style:position="8.255cm" style:type="center"/>
          <style:tab-stop style:position="16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8.255cm" style:type="center"/>
          <style:tab-stop style:position="17cm" style:type="right"/>
        </style:tab-stops>
      </style:paragraph-properties>
    </style:style>
    <style:style style:name="MP4" style:family="paragraph" style:parent-style-name="Header">
      <style:paragraph-properties>
        <style:tab-stops>
          <style:tab-stop style:position="8.255cm" style:type="center"/>
          <style:tab-stop style:position="15.997cm" style:type="right"/>
        </style:tab-stops>
      </style:paragraph-properties>
    </style:style>
    <style:style style:name="MT1" style:family="text">
      <style:text-properties fo:language="sr" fo:country="RS" officeooo:rsid="00428376" style:font-name-asian="Times New Roman1" style:font-name-complex="Times New Roman1"/>
    </style:style>
    <style:style style:name="MT2" style:family="text">
      <style:text-properties fo:language="sr" fo:country="RS" style:font-name-asian="Times New Roman1" style:font-name-complex="Times New Roman1"/>
    </style:style>
    <style:style style:name="MT3" style:family="text">
      <style:text-properties fo:language="sr" fo:country="RS" officeooo:rsid="00605377" style:font-name-asian="Times New Roman1" style:font-name-complex="Times New Roman1"/>
    </style:style>
    <style:style style:name="MT4" style:family="text">
      <style:text-properties fo:language="sr" fo:country="RS" officeooo:rsid="004c0761" style:font-name-asian="Times New Roman1" style:font-name-complex="Times New Roman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1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94cm" fo:margin-left="0cm" fo:margin-right="0cm" fo:margin-bottom="0.995cm" style:dynamic-spacing="true"/>
      </style:header-style>
      <style:footer-style>
        <style:header-footer-properties fo:min-height="0.101cm" fo:margin-left="0cm" fo:margin-right="0cm" fo:margin-top="0.002cm" style:dynamic-spacing="true"/>
      </style:footer-style>
    </style:page-layout>
    <style:page-layout style:name="Mpm3">
      <style:page-layout-properties fo:page-width="21.001cm" fo:page-height="29.7cm" style:num-format="1" style:print-orientation="portrait" fo:margin-top="2.499cm" fo:margin-bottom="2.499cm" fo:margin-left="2.499cm" fo:margin-right="1.499cm" style:writing-mode="lr-tb" style:layout-grid-color="#c0c0c0" style:layout-grid-lines="1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0.101cm" fo:margin-left="0cm" fo:margin-right="0cm" fo:margin-top="0.002cm" style:dynamic-spacing="true"/>
      </style:footer-style>
    </style:page-layout>
    <style:page-layout style:name="Mpm4">
      <style:page-layout-properties fo:page-width="21.001cm" fo:page-height="29.7cm" style:num-format="1" style:print-orientation="portrait" fo:margin-top="2.499cm" fo:margin-bottom="2.499cm" fo:margin-left="2.501cm" fo:margin-right="2.501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Семинарски рад</text:span> <text:s/><text:tab/><text:tab/><text:span text:style-name="MT2">Алекса Јовановић</text:span></text:p>
      </style:header>
      <style:footer>
        <text:p text:style-name="MP2"><text:page-number text:select-page="current">2</text:page-number></text:p>
        <text:p text:style-name="Footer"/>
      </style:footer>
    </style:master-page>
    <style:master-page style:name="Converted2" style:page-layout-name="Mpm3" draw:style-name="Mdp1">
      <style:header>
        <text:p text:style-name="MP3"><text:span text:style-name="MT3">Семинарски</text:span><text:span text:style-name="MT2"> рад</text:span> <text:s/><text:tab/><text:tab/><text:span text:style-name="MT2">Алекса Јовановић</text:span></text:p>
      </style:header>
      <style:footer>
        <text:p text:style-name="MP2"><text:page-number text:select-page="current">3</text:page-number></text:p>
        <text:p text:style-name="Footer"/>
      </style:footer>
    </style:master-page>
    <style:master-page style:name="Converted3" style:page-layout-name="Mpm4" draw:style-name="Mdp1">
      <style:header>
        <text:p text:style-name="MP4"><text:span text:style-name="MT4">Семинарски</text:span> <text:span text:style-name="MT2">рад</text:span> <text:s/><text:tab/><text:tab/><text:span text:style-name="MT2">Алекса Јовановић</text:span></text:p>
      </style:header>
      <style:footer>
        <text:p text:style-name="MP2"><text:page-number text:select-page="current">25</text:page-number></text:p>
        <text:p text:style-name="Footer"/>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6.2$Windows_X86_64 LibreOffice_project/b4b39682cd9868fa725bc664aff94278d315bd04</meta:generator>
    <dc:language>sr-RS</dc:language>
    <meta:user-defined meta:name="AppVersion" meta:value-type="string">15.0000</meta:user-defined>
    <meta:user-defined meta:name="Created" meta:value-type="date">2021-07-02</meta:user-defined>
    <meta:user-defined meta:name="Creator" meta:value-type="string">Microsoft® Word 2016</meta:user-defined>
    <meta:user-defined meta:name="LastSaved" meta:value-type="date">2024-09-28</meta:user-defined>
    <meta:document-statistic meta:page-count="25" meta:table-count="1" meta:image-count="2" meta:object-count="0" meta:paragraph-count="220" meta:word-count="7306" meta:character-count="49463"/>
  </office:meta>
</office:document-meta>
</file>